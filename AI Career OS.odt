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AI Career OS</text:p>
      <text:p text:style-name="Normal"/>
      <text:p text:style-name="Normal"># Creative Direction &amp; Design Specification</text:p>
      <text:p text:style-name="Normal"/>
      <text:p text:style-name="Normal">Version 1.0</text:p>
      <text:p text:style-name="Normal"/>
      <text:p text:style-name="Normal">Status: Living Design Document</text:p>
      <text:p text:style-name="Normal"/>
      <text:p text:style-name="Normal">---</text:p>
      <text:p text:style-name="Normal"/>
      <text:p text:style-name="Normal"># 1. Design Philosophy</text:p>
      <text:p text:style-name="Normal"/>
      <text:p text:style-name="Normal">## Our Goal</text:p>
      <text:p text:style-name="Normal"/>
      <text:p text:style-name="Normal">We are NOT designing a website.</text:p>
      <text:p text:style-name="Normal"/>
      <text:p text:style-name="Normal">We are designing a digital place.</text:p>
      <text:p text:style-name="Normal"/>
      <text:p text:style-name="Normal">Users should not feel that they opened another browser tab.</text:p>
      <text:p text:style-name="Normal"/>
      <text:p text:style-name="Normal">They should feel they entered an intelligent environment.</text:p>
      <text:p text:style-name="Normal"/>
      <text:p text:style-name="Normal">The product should feel alive.</text:p>
      <text:p text:style-name="Normal"/>
      <text:p text:style-name="Normal">Every interaction should reinforce one message:</text:p>
      <text:p text:style-name="Normal"/>
      <text:p text:style-name="Normal">"This platform understands me."</text:p>
      <text:p text:style-name="Normal"/>
      <text:soft-page-break/>
      <text:p text:style-name="Normal">---</text:p>
      <text:p text:style-name="Normal"/>
      <text:p text:style-name="Normal">## Product Identity</text:p>
      <text:p text:style-name="Normal"/>
      <text:p text:style-name="Normal">AI Career OS is:</text:p>
      <text:p text:style-name="Normal"/>
      <text:p text:style-name="Normal">• Intelligent</text:p>
      <text:p text:style-name="Normal"/>
      <text:p text:style-name="Normal">• Premium</text:p>
      <text:p text:style-name="Normal"/>
      <text:p text:style-name="Normal">• Elegant</text:p>
      <text:p text:style-name="Normal"/>
      <text:p text:style-name="Normal">• Human</text:p>
      <text:p text:style-name="Normal"/>
      <text:p text:style-name="Normal">• Futuristic</text:p>
      <text:p text:style-name="Normal"/>
      <text:p text:style-name="Normal">• Calm</text:p>
      <text:p text:style-name="Normal"/>
      <text:p text:style-name="Normal">• Inspiring</text:p>
      <text:p text:style-name="Normal"/>
      <text:p text:style-name="Normal">• Trustworthy</text:p>
      <text:p text:style-name="Normal"/>
      <text:p text:style-name="Normal">• Interactive</text:p>
      <text:p text:style-name="Normal"/>
      <text:p text:style-name="Normal">• Adaptive</text:p>
      <text:p text:style-name="Normal"/>
      <text:p text:style-name="Normal">It is NEVER:</text:p>
      <text:p text:style-name="Normal"/>
      <text:soft-page-break/>
      <text:p text:style-name="Normal">• Corporate</text:p>
      <text:p text:style-name="Normal"/>
      <text:p text:style-name="Normal">• Generic</text:p>
      <text:p text:style-name="Normal"/>
      <text:p text:style-name="Normal">• Noisy</text:p>
      <text:p text:style-name="Normal"/>
      <text:p text:style-name="Normal">• Cold</text:p>
      <text:p text:style-name="Normal"/>
      <text:p text:style-name="Normal">• Overwhelming</text:p>
      <text:p text:style-name="Normal"/>
      <text:p text:style-name="Normal">• Childish</text:p>
      <text:p text:style-name="Normal"/>
      <text:p text:style-name="Normal">• Gaming UI</text:p>
      <text:p text:style-name="Normal"/>
      <text:p text:style-name="Normal">• Cyberpunk</text:p>
      <text:p text:style-name="Normal"/>
      <text:p text:style-name="Normal">• Typical SaaS</text:p>
      <text:p text:style-name="Normal"/>
      <text:p text:style-name="Normal">---</text:p>
      <text:p text:style-name="Normal"/>
      <text:p text:style-name="Normal">## Emotional Experience</text:p>
      <text:p text:style-name="Normal"/>
      <text:p text:style-name="Normal">The user journey should continuously create these emotions:</text:p>
      <text:p text:style-name="Normal"/>
      <text:p text:style-name="Normal">Curiosity</text:p>
      <text:p text:style-name="Normal"/>
      <text:p text:style-name="Normal">↓</text:p>
      <text:p text:style-name="Normal"/>
      <text:soft-page-break/>
      <text:p text:style-name="Normal">Hope</text:p>
      <text:p text:style-name="Normal"/>
      <text:p text:style-name="Normal">↓</text:p>
      <text:p text:style-name="Normal"/>
      <text:p text:style-name="Normal">Trust</text:p>
      <text:p text:style-name="Normal"/>
      <text:p text:style-name="Normal">↓</text:p>
      <text:p text:style-name="Normal"/>
      <text:p text:style-name="Normal">Excitement</text:p>
      <text:p text:style-name="Normal"/>
      <text:p text:style-name="Normal">↓</text:p>
      <text:p text:style-name="Normal"/>
      <text:p text:style-name="Normal">Confidence</text:p>
      <text:p text:style-name="Normal"/>
      <text:p text:style-name="Normal">↓</text:p>
      <text:p text:style-name="Normal"/>
      <text:p text:style-name="Normal">Momentum</text:p>
      <text:p text:style-name="Normal"/>
      <text:p text:style-name="Normal">↓</text:p>
      <text:p text:style-name="Normal"/>
      <text:p text:style-name="Normal">Achievement</text:p>
      <text:p text:style-name="Normal"/>
      <text:p text:style-name="Normal">↓</text:p>
      <text:p text:style-name="Normal"/>
      <text:p text:style-name="Normal">Belonging</text:p>
      <text:p text:style-name="Normal"/>
      <text:p text:style-name="Normal">↓</text:p>
      <text:p text:style-name="Normal"/>
      <text:soft-page-break/>
      <text:p text:style-name="Normal">Professional Growth</text:p>
      <text:p text:style-name="Normal"/>
      <text:p text:style-name="Normal">Every screen should intentionally reinforce one or more of these emotions.</text:p>
      <text:p text:style-name="Normal"/>
      <text:p text:style-name="Normal">---</text:p>
      <text:p text:style-name="Normal"/>
      <text:p text:style-name="Normal"># 2. Experience Philosophy</text:p>
      <text:p text:style-name="Normal"/>
      <text:p text:style-name="Normal">Users should never feel like they are navigating pages.</text:p>
      <text:p text:style-name="Normal"/>
      <text:p text:style-name="Normal">Users should feel like they are progressing through an intelligent system.</text:p>
      <text:p text:style-name="Normal"/>
      <text:p text:style-name="Normal">Navigation becomes progression.</text:p>
      <text:p text:style-name="Normal"/>
      <text:p text:style-name="Normal">Scrolling becomes exploration.</text:p>
      <text:p text:style-name="Normal"/>
      <text:p text:style-name="Normal">Pages become environments.</text:p>
      <text:p text:style-name="Normal"/>
      <text:p text:style-name="Normal">Menus become pathways.</text:p>
      <text:p text:style-name="Normal"/>
      <text:p text:style-name="Normal">Artificial Intelligence becomes the guide.</text:p>
      <text:p text:style-name="Normal"/>
      <text:p text:style-name="Normal">---</text:p>
      <text:p text:style-name="Normal"/>
      <text:p text:style-name="Normal"># 3. Core Design Principles</text:p>
      <text:p text:style-name="Normal"/>
      <text:p text:style-name="Normal">Everything should follow these principles.</text:p>
      <text:p text:style-name="Normal"/>
      <text:soft-page-break/>
      <text:p text:style-name="Normal">## Clarity before Complexity</text:p>
      <text:p text:style-name="Normal"/>
      <text:p text:style-name="Normal">Never impress users by making interfaces complicated.</text:p>
      <text:p text:style-name="Normal"/>
      <text:p text:style-name="Normal">Impress them by making difficult things feel simple.</text:p>
      <text:p text:style-name="Normal"/>
      <text:p text:style-name="Normal">---</text:p>
      <text:p text:style-name="Normal"/>
      <text:p text:style-name="Normal">## Guidance before Information</text:p>
      <text:p text:style-name="Normal"/>
      <text:p text:style-name="Normal">Every screen should answer:</text:p>
      <text:p text:style-name="Normal"/>
      <text:p text:style-name="Normal">What should I do next?</text:p>
      <text:p text:style-name="Normal"/>
      <text:p text:style-name="Normal">Never leave users wondering.</text:p>
      <text:p text:style-name="Normal"/>
      <text:p text:style-name="Normal">---</text:p>
      <text:p text:style-name="Normal"/>
      <text:p text:style-name="Normal">## Personalization before Standardization</text:p>
      <text:p text:style-name="Normal"/>
      <text:p text:style-name="Normal">No two users should experience identical products.</text:p>
      <text:p text:style-name="Normal"/>
      <text:p text:style-name="Normal">The interface itself should adapt.</text:p>
      <text:p text:style-name="Normal"/>
      <text:p text:style-name="Normal">---</text:p>
      <text:p text:style-name="Normal"/>
      <text:p text:style-name="Normal">## Motion before Decoration</text:p>
      <text:p text:style-name="Normal"/>
      <text:soft-page-break/>
      <text:p text:style-name="Normal">Animation should communicate.</text:p>
      <text:p text:style-name="Normal"/>
      <text:p text:style-name="Normal">Never decorate.</text:p>
      <text:p text:style-name="Normal"/>
      <text:p text:style-name="Normal">Every movement has meaning.</text:p>
      <text:p text:style-name="Normal"/>
      <text:p text:style-name="Normal">---</text:p>
      <text:p text:style-name="Normal"/>
      <text:p text:style-name="Normal">## Intelligence before Automation</text:p>
      <text:p text:style-name="Normal"/>
      <text:p text:style-name="Normal">Recommendations should always explain WHY.</text:p>
      <text:p text:style-name="Normal"/>
      <text:p text:style-name="Normal">Reasoning builds trust.</text:p>
      <text:p text:style-name="Normal"/>
      <text:p text:style-name="Normal">Automation without reasoning feels random.</text:p>
      <text:p text:style-name="Normal"/>
      <text:p text:style-name="Normal">---</text:p>
      <text:p text:style-name="Normal"/>
      <text:p text:style-name="Normal">## Ecosystem before Features</text:p>
      <text:p text:style-name="Normal"/>
      <text:p text:style-name="Normal">Every feature should connect with every other feature.</text:p>
      <text:p text:style-name="Normal"/>
      <text:p text:style-name="Normal">Nothing should exist in isolation.</text:p>
      <text:p text:style-name="Normal"/>
      <text:p text:style-name="Normal">---</text:p>
      <text:p text:style-name="Normal"/>
      <text:p text:style-name="Normal"># 4. The First Five Seconds</text:p>
      <text:p text:style-name="Normal"/>
      <text:soft-page-break/>
      <text:p text:style-name="Normal">The first five seconds determine whether users trust the platform.</text:p>
      <text:p text:style-name="Normal"/>
      <text:p text:style-name="Normal">The landing experience must create:</text:p>
      <text:p text:style-name="Normal"/>
      <text:p text:style-name="Normal">Wonder.</text:p>
      <text:p text:style-name="Normal"/>
      <text:p text:style-name="Normal">Trust.</text:p>
      <text:p text:style-name="Normal"/>
      <text:p text:style-name="Normal">Curiosity.</text:p>
      <text:p text:style-name="Normal"/>
      <text:p text:style-name="Normal">Professionalism.</text:p>
      <text:p text:style-name="Normal"/>
      <text:p text:style-name="Normal">Future.</text:p>
      <text:p text:style-name="Normal"/>
      <text:p text:style-name="Normal">Users should immediately think:</text:p>
      <text:p text:style-name="Normal"/>
      <text:p text:style-name="Normal">"This is unlike anything I've seen before."</text:p>
      <text:p text:style-name="Normal"/>
      <text:p text:style-name="Normal">Not because of visual effects.</text:p>
      <text:p text:style-name="Normal"/>
      <text:p text:style-name="Normal">Because of thoughtful design.</text:p>
      <text:p text:style-name="Normal"/>
      <text:p text:style-name="Normal">---</text:p>
      <text:p text:style-name="Normal"/>
      <text:p text:style-name="Normal"># 5. Landing Scene</text:p>
      <text:p text:style-name="Normal"/>
      <text:p text:style-name="Normal">IMPORTANT</text:p>
      <text:p text:style-name="Normal"/>
      <text:soft-page-break/>
      <text:p text:style-name="Normal">We are NOT building a Landing Page.</text:p>
      <text:p text:style-name="Normal"/>
      <text:p text:style-name="Normal">We are building a Landing Scene.</text:p>
      <text:p text:style-name="Normal"/>
      <text:p text:style-name="Normal">Difference:</text:p>
      <text:p text:style-name="Normal"/>
      <text:p text:style-name="Normal">Landing Page</text:p>
      <text:p text:style-name="Normal"/>
      <text:p text:style-name="Normal">↓</text:p>
      <text:p text:style-name="Normal"/>
      <text:p text:style-name="Normal">Hero</text:p>
      <text:p text:style-name="Normal"/>
      <text:p text:style-name="Normal">↓</text:p>
      <text:p text:style-name="Normal"/>
      <text:p text:style-name="Normal">Cards</text:p>
      <text:p text:style-name="Normal"/>
      <text:p text:style-name="Normal">↓</text:p>
      <text:p text:style-name="Normal"/>
      <text:p text:style-name="Normal">Testimonials</text:p>
      <text:p text:style-name="Normal"/>
      <text:p text:style-name="Normal">↓</text:p>
      <text:p text:style-name="Normal"/>
      <text:p text:style-name="Normal">Footer</text:p>
      <text:p text:style-name="Normal"/>
      <text:p text:style-name="Normal">Landing Scene</text:p>
      <text:p text:style-name="Normal"/>
      <text:p text:style-name="Normal">↓</text:p>
      <text:p text:style-name="Normal"/>
      <text:soft-page-break/>
      <text:p text:style-name="Normal">Immersion</text:p>
      <text:p text:style-name="Normal"/>
      <text:p text:style-name="Normal">↓</text:p>
      <text:p text:style-name="Normal"/>
      <text:p text:style-name="Normal">Exploration</text:p>
      <text:p text:style-name="Normal"/>
      <text:p text:style-name="Normal">↓</text:p>
      <text:p text:style-name="Normal"/>
      <text:p text:style-name="Normal">Journey</text:p>
      <text:p text:style-name="Normal"/>
      <text:p text:style-name="Normal">↓</text:p>
      <text:p text:style-name="Normal"/>
      <text:p text:style-name="Normal">Discovery</text:p>
      <text:p text:style-name="Normal"/>
      <text:p text:style-name="Normal">↓</text:p>
      <text:p text:style-name="Normal"/>
      <text:p text:style-name="Normal">Career Network</text:p>
      <text:p text:style-name="Normal"/>
      <text:p text:style-name="Normal">The user should never feel like they entered a marketing website.</text:p>
      <text:p text:style-name="Normal"/>
      <text:p text:style-name="Normal">---</text:p>
      <text:p text:style-name="Normal"/>
      <text:p text:style-name="Normal"># 6. Hero Experience</text:p>
      <text:p text:style-name="Normal"/>
      <text:p text:style-name="Normal">The Hero should feel cinematic.</text:p>
      <text:p text:style-name="Normal"/>
      <text:p text:style-name="Normal">Minimal content.</text:p>
      <text:p text:style-name="Normal"/>
      <text:soft-page-break/>
      <text:p text:style-name="Normal">Maximum impact.</text:p>
      <text:p text:style-name="Normal"/>
      <text:p text:style-name="Normal">One clear headline.</text:p>
      <text:p text:style-name="Normal"/>
      <text:p text:style-name="Normal">One supporting sentence.</text:p>
      <text:p text:style-name="Normal"/>
      <text:p text:style-name="Normal">One CTA.</text:p>
      <text:p text:style-name="Normal"/>
      <text:p text:style-name="Normal">Nothing else competes for attention.</text:p>
      <text:p text:style-name="Normal"/>
      <text:p text:style-name="Normal">No secondary CTA.</text:p>
      <text:p text:style-name="Normal"/>
      <text:p text:style-name="Normal">No unnecessary sections above the fold.</text:p>
      <text:p text:style-name="Normal"/>
      <text:p text:style-name="Normal">---</text:p>
      <text:p text:style-name="Normal"/>
      <text:p text:style-name="Normal"># 7. Visual Atmosphere</text:p>
      <text:p text:style-name="Normal"/>
      <text:p text:style-name="Normal">The environment should feel alive.</text:p>
      <text:p text:style-name="Normal"/>
      <text:p text:style-name="Normal">Background should never feel static.</text:p>
      <text:p text:style-name="Normal"/>
      <text:p text:style-name="Normal">Instead:</text:p>
      <text:p text:style-name="Normal"/>
      <text:p text:style-name="Normal">Subtle neural movement.</text:p>
      <text:p text:style-name="Normal"/>
      <text:p text:style-name="Normal">Soft particle motion.</text:p>
      <text:p text:style-name="Normal"/>
      <text:soft-page-break/>
      <text:p text:style-name="Normal">Living gradients.</text:p>
      <text:p text:style-name="Normal"/>
      <text:p text:style-name="Normal">Intelligent lighting.</text:p>
      <text:p text:style-name="Normal"/>
      <text:p text:style-name="Normal">Floating connections.</text:p>
      <text:p text:style-name="Normal"/>
      <text:p text:style-name="Normal">Minimal ambient motion.</text:p>
      <text:p text:style-name="Normal"/>
      <text:p text:style-name="Normal">The environment should quietly communicate intelligence.</text:p>
      <text:p text:style-name="Normal"/>
      <text:p text:style-name="Normal">---</text:p>
      <text:p text:style-name="Normal"/>
      <text:p text:style-name="Normal"># 8. Color System</text:p>
      <text:p text:style-name="Normal"/>
      <text:p text:style-name="Normal">Primary</text:p>
      <text:p text:style-name="Normal"/>
      <text:p text:style-name="Normal">Deep Indigo</text:p>
      <text:p text:style-name="Normal"/>
      <text:p text:style-name="Normal">Primary Accent</text:p>
      <text:p text:style-name="Normal"/>
      <text:p text:style-name="Normal">Electric Blue</text:p>
      <text:p text:style-name="Normal"/>
      <text:p text:style-name="Normal">Secondary Accent</text:p>
      <text:p text:style-name="Normal"/>
      <text:p text:style-name="Normal">Violet</text:p>
      <text:p text:style-name="Normal"/>
      <text:p text:style-name="Normal">Highlight</text:p>
      <text:p text:style-name="Normal"/>
      <text:soft-page-break/>
      <text:p text:style-name="Normal">Soft Cyan</text:p>
      <text:p text:style-name="Normal"/>
      <text:p text:style-name="Normal">Success</text:p>
      <text:p text:style-name="Normal"/>
      <text:p text:style-name="Normal">Emerald</text:p>
      <text:p text:style-name="Normal"/>
      <text:p text:style-name="Normal">Warning</text:p>
      <text:p text:style-name="Normal"/>
      <text:p text:style-name="Normal">Amber</text:p>
      <text:p text:style-name="Normal"/>
      <text:p text:style-name="Normal">Error</text:p>
      <text:p text:style-name="Normal"/>
      <text:p text:style-name="Normal">Soft Red</text:p>
      <text:p text:style-name="Normal"/>
      <text:p text:style-name="Normal">Background</text:p>
      <text:p text:style-name="Normal"/>
      <text:p text:style-name="Normal">Near Black</text:p>
      <text:p text:style-name="Normal"/>
      <text:p text:style-name="Normal">Cards</text:p>
      <text:p text:style-name="Normal"/>
      <text:p text:style-name="Normal">Dark Glass</text:p>
      <text:p text:style-name="Normal"/>
      <text:p text:style-name="Normal">The palette should never become neon.</text:p>
      <text:p text:style-name="Normal"/>
      <text:p text:style-name="Normal">Glow should be subtle.</text:p>
      <text:p text:style-name="Normal"/>
      <text:p text:style-name="Normal">Luxury over excitement.</text:p>
      <text:p text:style-name="Normal"/>
      <text:soft-page-break/>
      <text:p text:style-name="Normal">---</text:p>
      <text:p text:style-name="Normal"/>
      <text:p text:style-name="Normal"># 9. Typography</text:p>
      <text:p text:style-name="Normal"/>
      <text:p text:style-name="Normal">Typography should feel premium.</text:p>
      <text:p text:style-name="Normal"/>
      <text:p text:style-name="Normal">Minimal.</text:p>
      <text:p text:style-name="Normal"/>
      <text:p text:style-name="Normal">Confident.</text:p>
      <text:p text:style-name="Normal"/>
      <text:p text:style-name="Normal">Readable.</text:p>
      <text:p text:style-name="Normal"/>
      <text:p text:style-name="Normal">Large headings.</text:p>
      <text:p text:style-name="Normal"/>
      <text:p text:style-name="Normal">Generous spacing.</text:p>
      <text:p text:style-name="Normal"/>
      <text:p text:style-name="Normal">Short paragraphs.</text:p>
      <text:p text:style-name="Normal"/>
      <text:p text:style-name="Normal">Comfortable reading.</text:p>
      <text:p text:style-name="Normal"/>
      <text:p text:style-name="Normal">Whitespace is part of the design.</text:p>
      <text:p text:style-name="Normal"/>
      <text:p text:style-name="Normal">---</text:p>
      <text:p text:style-name="Normal"/>
      <text:p text:style-name="Normal"># 10. Spatial Design</text:p>
      <text:p text:style-name="Normal"/>
      <text:p text:style-name="Normal">Nothing should feel crowded.</text:p>
      <text:p text:style-name="Normal"/>
      <text:soft-page-break/>
      <text:p text:style-name="Normal">The interface should breathe.</text:p>
      <text:p text:style-name="Normal"/>
      <text:p text:style-name="Normal">Every component should have purpose.</text:p>
      <text:p text:style-name="Normal"/>
      <text:p text:style-name="Normal">Every empty space should create elegance.</text:p>
      <text:p text:style-name="Normal"/>
      <text:p text:style-name="Normal">Users should never feel overwhelmed.</text:p>
      <text:p text:style-name="Normal"/>
      <text:p text:style-name="Normal">---</text:p>
      <text:p text:style-name="Normal"/>
      <text:p text:style-name="Normal"># 11. Adaptive Environment</text:p>
      <text:p text:style-name="Normal"/>
      <text:p text:style-name="Normal">The environment reacts to users.</text:p>
      <text:p text:style-name="Normal"/>
      <text:p text:style-name="Normal">Mouse movement.</text:p>
      <text:p text:style-name="Normal"/>
      <text:p text:style-name="Normal">Scrolling.</text:p>
      <text:p text:style-name="Normal"/>
      <text:p text:style-name="Normal">Career selection.</text:p>
      <text:p text:style-name="Normal"/>
      <text:p text:style-name="Normal">Dashboard progress.</text:p>
      <text:p text:style-name="Normal"/>
      <text:p text:style-name="Normal">Achievements.</text:p>
      <text:p text:style-name="Normal"/>
      <text:p text:style-name="Normal">Everything influences the environment.</text:p>
      <text:p text:style-name="Normal"/>
      <text:p text:style-name="Normal">The environment becomes another interface.</text:p>
      <text:p text:style-name="Normal"/>
      <text:soft-page-break/>
      <text:p text:style-name="Normal">---</text:p>
      <text:p text:style-name="Normal"/>
      <text:p text:style-name="Normal"># 12. Navigation Philosophy</text:p>
      <text:p text:style-name="Normal"/>
      <text:p text:style-name="Normal">Navigation should disappear.</text:p>
      <text:p text:style-name="Normal"/>
      <text:p text:style-name="Normal">Users should naturally know where to go.</text:p>
      <text:p text:style-name="Normal"/>
      <text:p text:style-name="Normal">No complicated menus.</text:p>
      <text:p text:style-name="Normal"/>
      <text:p text:style-name="Normal">No mega menus.</text:p>
      <text:p text:style-name="Normal"/>
      <text:p text:style-name="Normal">No endless navigation trees.</text:p>
      <text:p text:style-name="Normal"/>
      <text:p text:style-name="Normal">The product guides users.</text:p>
      <text:p text:style-name="Normal"/>
      <text:p text:style-name="Normal">---</text:p>
      <text:p text:style-name="Normal"/>
      <text:p text:style-name="Normal"># 13. AI Career Network</text:p>
      <text:p text:style-name="Normal"/>
      <text:p text:style-name="Normal">This becomes the heart of the product.</text:p>
      <text:p text:style-name="Normal"/>
      <text:p text:style-name="Normal">Not a visualization.</text:p>
      <text:p text:style-name="Normal"/>
      <text:p text:style-name="Normal">Not an illustration.</text:p>
      <text:p text:style-name="Normal"/>
      <text:p text:style-name="Normal">The primary navigation experience.</text:p>
      <text:p text:style-name="Normal"/>
      <text:soft-page-break/>
      <text:p text:style-name="Normal">Every career exists as a node.</text:p>
      <text:p text:style-name="Normal"/>
      <text:p text:style-name="Normal">Connections represent relationships.</text:p>
      <text:p text:style-name="Normal"/>
      <text:p text:style-name="Normal">The network continuously evolves.</text:p>
      <text:p text:style-name="Normal"/>
      <text:p text:style-name="Normal">Users explore.</text:p>
      <text:p text:style-name="Normal"/>
      <text:p text:style-name="Normal">They don't browse.</text:p>
      <text:p text:style-name="Normal"/>
      <text:p text:style-name="Normal">---</text:p>
      <text:p text:style-name="Normal"/>
      <text:p text:style-name="Normal"># 14. Camera System</text:p>
      <text:p text:style-name="Normal"/>
      <text:p text:style-name="Normal">Camera movement becomes part of UX.</text:p>
      <text:p text:style-name="Normal"/>
      <text:p text:style-name="Normal">The camera should:</text:p>
      <text:p text:style-name="Normal"/>
      <text:p text:style-name="Normal">Pan</text:p>
      <text:p text:style-name="Normal"/>
      <text:p text:style-name="Normal">Zoom</text:p>
      <text:p text:style-name="Normal"/>
      <text:p text:style-name="Normal">Rotate slightly</text:p>
      <text:p text:style-name="Normal"/>
      <text:p text:style-name="Normal">Focus</text:p>
      <text:p text:style-name="Normal"/>
      <text:p text:style-name="Normal">Follow</text:p>
      <text:p text:style-name="Normal"/>
      <text:soft-page-break/>
      <text:p text:style-name="Normal">Reveal</text:p>
      <text:p text:style-name="Normal"/>
      <text:p text:style-name="Normal">Transitions should feel physical.</text:p>
      <text:p text:style-name="Normal"/>
      <text:p text:style-name="Normal">Not digital.</text:p>
      <text:p text:style-name="Normal"/>
      <text:p text:style-name="Normal">---</text:p>
      <text:p text:style-name="Normal"/>
      <text:p text:style-name="Normal"># 15. Motion Language</text:p>
      <text:p text:style-name="Normal"/>
      <text:p text:style-name="Normal">Motion communicates:</text:p>
      <text:p text:style-name="Normal"/>
      <text:p text:style-name="Normal">Hierarchy.</text:p>
      <text:p text:style-name="Normal"/>
      <text:p text:style-name="Normal">Relationships.</text:p>
      <text:p text:style-name="Normal"/>
      <text:p text:style-name="Normal">Importance.</text:p>
      <text:p text:style-name="Normal"/>
      <text:p text:style-name="Normal">State.</text:p>
      <text:p text:style-name="Normal"/>
      <text:p text:style-name="Normal">Progress.</text:p>
      <text:p text:style-name="Normal"/>
      <text:p text:style-name="Normal">Completion.</text:p>
      <text:p text:style-name="Normal"/>
      <text:p text:style-name="Normal">Movement should feel calm.</text:p>
      <text:p text:style-name="Normal"/>
      <text:p text:style-name="Normal">Never rushed.</text:p>
      <text:p text:style-name="Normal"/>
      <text:soft-page-break/>
      <text:p text:style-name="Normal">---</text:p>
      <text:p text:style-name="Normal"/>
      <text:p text:style-name="Normal"># 16. AI Presence</text:p>
      <text:p text:style-name="Normal"/>
      <text:p text:style-name="Normal">AI should always feel present.</text:p>
      <text:p text:style-name="Normal"/>
      <text:p text:style-name="Normal">Without dominating the interface.</text:p>
      <text:p text:style-name="Normal"/>
      <text:p text:style-name="Normal">Users should always know:</text:p>
      <text:p text:style-name="Normal"/>
      <text:p text:style-name="Normal">"My AI mentor is available."</text:p>
      <text:p text:style-name="Normal"/>
      <text:p text:style-name="Normal">Without seeing a giant chatbot.</text:p>
      <text:p text:style-name="Normal"/>
      <text:p text:style-name="Normal">AI becomes part of the environment.</text:p>
      <text:p text:style-name="Normal"/>
      <text:p text:style-name="Normal">---</text:p>
      <text:p text:style-name="Normal"/>
      <text:p text:style-name="Normal"># 17. Dashboard Philosophy</text:p>
      <text:p text:style-name="Normal"/>
      <text:p text:style-name="Normal">Dashboard is not analytics.</text:p>
      <text:p text:style-name="Normal"/>
      <text:p text:style-name="Normal">Dashboard is direction.</text:p>
      <text:p text:style-name="Normal"/>
      <text:p text:style-name="Normal">Every widget answers:</text:p>
      <text:p text:style-name="Normal"/>
      <text:p text:style-name="Normal">What changed?</text:p>
      <text:p text:style-name="Normal"/>
      <text:soft-page-break/>
      <text:p text:style-name="Normal">Why?</text:p>
      <text:p text:style-name="Normal"/>
      <text:p text:style-name="Normal">What next?</text:p>
      <text:p text:style-name="Normal"/>
      <text:p text:style-name="Normal">---</text:p>
      <text:p text:style-name="Normal"/>
      <text:p text:style-name="Normal"># 18. Career DNA</text:p>
      <text:p text:style-name="Normal"/>
      <text:p text:style-name="Normal">Career DNA deserves a premium reveal.</text:p>
      <text:p text:style-name="Normal"/>
      <text:p text:style-name="Normal">Not an instant report.</text:p>
      <text:p text:style-name="Normal"/>
      <text:p text:style-name="Normal">Users should feel they are discovering themselves.</text:p>
      <text:p text:style-name="Normal"/>
      <text:p text:style-name="Normal">The experience should feel meaningful.</text:p>
      <text:p text:style-name="Normal"/>
      <text:p text:style-name="Normal">---</text:p>
      <text:p text:style-name="Normal"/>
      <text:p text:style-name="Normal"># 19. CV Analyzer</text:p>
      <text:p text:style-name="Normal"/>
      <text:p text:style-name="Normal">CV upload should feel like beginning a journey.</text:p>
      <text:p text:style-name="Normal"/>
      <text:p text:style-name="Normal">Not submitting a file.</text:p>
      <text:p text:style-name="Normal"/>
      <text:p text:style-name="Normal">Everything after upload should feel intelligent.</text:p>
      <text:p text:style-name="Normal"/>
      <text:p text:style-name="Normal">Conversation.</text:p>
      <text:p text:style-name="Normal"/>
      <text:soft-page-break/>
      <text:p text:style-name="Normal">Reasoning.</text:p>
      <text:p text:style-name="Normal"/>
      <text:p text:style-name="Normal">Discovery.</text:p>
      <text:p text:style-name="Normal"/>
      <text:p text:style-name="Normal">Transformation.</text:p>
      <text:p text:style-name="Normal"/>
      <text:p text:style-name="Normal">---</text:p>
      <text:p text:style-name="Normal"/>
      <text:p text:style-name="Normal"># 20. AI Coach</text:p>
      <text:p text:style-name="Normal"/>
      <text:p text:style-name="Normal">The AI Coach should become the emotional center of the platform.</text:p>
      <text:p text:style-name="Normal"/>
      <text:p text:style-name="Normal">Users trust people.</text:p>
      <text:p text:style-name="Normal"/>
      <text:p text:style-name="Normal">Not software.</text:p>
      <text:p text:style-name="Normal"/>
      <text:p text:style-name="Normal">The AI should earn that trust.</text:p>
      <text:p text:style-name="Normal"/>
      <text:p text:style-name="Normal">Gradually.</text:p>
      <text:p text:style-name="Normal"/>
      <text:p text:style-name="Normal">---</text:p>
      <text:p text:style-name="Normal"/>
      <text:p text:style-name="Normal"># 21. Mobile Philosophy</text:p>
      <text:p text:style-name="Normal"/>
      <text:p text:style-name="Normal">Mobile is NOT desktop compressed.</text:p>
      <text:p text:style-name="Normal"/>
      <text:p text:style-name="Normal">It is a first-class experience.</text:p>
      <text:p text:style-name="Normal"/>
      <text:soft-page-break/>
      <text:p text:style-name="Normal">Navigation changes.</text:p>
      <text:p text:style-name="Normal"/>
      <text:p text:style-name="Normal">Interactions change.</text:p>
      <text:p text:style-name="Normal"/>
      <text:p text:style-name="Normal">Motion changes.</text:p>
      <text:p text:style-name="Normal"/>
      <text:p text:style-name="Normal">Layouts change.</text:p>
      <text:p text:style-name="Normal"/>
      <text:p text:style-name="Normal">The feeling remains identical.</text:p>
      <text:p text:style-name="Normal"/>
      <text:p text:style-name="Normal">---</text:p>
      <text:p text:style-name="Normal"/>
      <text:p text:style-name="Normal"># 22. Accessibility</text:p>
      <text:p text:style-name="Normal"/>
      <text:p text:style-name="Normal">Accessibility is invisible quality.</text:p>
      <text:p text:style-name="Normal"/>
      <text:p text:style-name="Normal">If users notice accessibility,</text:p>
      <text:p text:style-name="Normal"/>
      <text:p text:style-name="Normal">we designed it incorrectly.</text:p>
      <text:p text:style-name="Normal"/>
      <text:p text:style-name="Normal">Accessibility should feel natural.</text:p>
      <text:p text:style-name="Normal"/>
      <text:p text:style-name="Normal">---</text:p>
      <text:p text:style-name="Normal"/>
      <text:p text:style-name="Normal"># 23. Performance Philosophy</text:p>
      <text:p text:style-name="Normal"/>
      <text:p text:style-name="Normal">Every animation should justify its cost.</text:p>
      <text:p text:style-name="Normal"/>
      <text:soft-page-break/>
      <text:p text:style-name="Normal">60 FPS.</text:p>
      <text:p text:style-name="Normal"/>
      <text:p text:style-name="Normal">Fast loading.</text:p>
      <text:p text:style-name="Normal"/>
      <text:p text:style-name="Normal">GPU acceleration.</text:p>
      <text:p text:style-name="Normal"/>
      <text:p text:style-name="Normal">Minimal layout shifts.</text:p>
      <text:p text:style-name="Normal"/>
      <text:p text:style-name="Normal">Premium performance.</text:p>
      <text:p text:style-name="Normal"/>
      <text:p text:style-name="Normal">---</text:p>
      <text:p text:style-name="Normal"/>
      <text:p text:style-name="Normal"># 24. AI Discoverability</text:p>
      <text:p text:style-name="Normal"/>
      <text:p text:style-name="Normal">Every screen should be understandable by:</text:p>
      <text:p text:style-name="Normal"/>
      <text:p text:style-name="Normal">Humans.</text:p>
      <text:p text:style-name="Normal"/>
      <text:p text:style-name="Normal">Search engines.</text:p>
      <text:p text:style-name="Normal"/>
      <text:p text:style-name="Normal">Large Language Models.</text:p>
      <text:p text:style-name="Normal"/>
      <text:p text:style-name="Normal">Future AI systems.</text:p>
      <text:p text:style-name="Normal"/>
      <text:p text:style-name="Normal">Every component should contribute to semantic clarity.</text:p>
      <text:p text:style-name="Normal"/>
      <text:p text:style-name="Normal">---</text:p>
      <text:p text:style-name="Normal"/>
      <text:soft-page-break/>
      <text:p text:style-name="Normal"># 25. Final Principle</text:p>
      <text:p text:style-name="Normal"/>
      <text:p text:style-name="Normal">The user should never think:</text:p>
      <text:p text:style-name="Normal"/>
      <text:p text:style-name="Normal">"I'm using an AI website."</text:p>
      <text:p text:style-name="Normal"/>
      <text:p text:style-name="Normal">The user should think:</text:p>
      <text:p text:style-name="Normal"/>
      <text:p text:style-name="Normal">"I'm building my future."</text:p>
      <text:p text:style-name="Normal"/>
      <text:p text:style-name="Normal">That single sentence should guide every design decision made throughout the lifetime of AI Career 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er Tayyebialashti</meta:initial-creator>
    <dc:creator>Yaser Tayyebialashti</dc:creator>
    <meta:creation-date>2026-06-26T07:49:00Z</meta:creation-date>
    <dc:date>2026-06-26T07:51:00Z</dc:date>
    <meta:template xlink:href="Normal" xlink:type="simple"/>
    <meta:editing-cycles>1</meta:editing-cycles>
    <meta:editing-duration>PT120S</meta:editing-duration>
    <meta:document-statistic meta:page-count="24" meta:paragraph-count="14" meta:word-count="1064" meta:character-count="7118" meta:row-count="50" meta:non-whitespace-character-count="6068"/>
  </office:meta>
</office:document-meta>
</file>