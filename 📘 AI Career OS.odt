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style:font-name="Segoe UI Emoji" style:font-name-complex="Segoe UI Emoji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style:font-name="Segoe UI Emoji" style:font-name-complex="Segoe UI Emoji"/>
    </style:style>
    <style:style style:name="T36" style:parent-style-name="DefaultParagraphFont" style:family="text">
      <style:text-properties style:font-name="Segoe UI Emoji" style:font-name-complex="Segoe UI Emoji"/>
    </style:style>
    <style:style style:name="T37" style:parent-style-name="DefaultParagraphFont" style:family="text">
      <style:text-properties style:font-name="Segoe UI Emoji" style:font-name-complex="Segoe UI Emoji"/>
    </style:style>
    <style:style style:name="T38" style:parent-style-name="DefaultParagraphFont" style:family="text">
      <style:text-properties style:font-name="Segoe UI Emoji" style:font-name-complex="Segoe UI Emoji"/>
    </style:style>
    <style:style style:name="T39" style:parent-style-name="DefaultParagraphFont" style:family="text">
      <style:text-properties style:font-name="Segoe UI Emoji" style:font-name-complex="Segoe UI Emoji"/>
    </style:style>
    <style:style style:name="T40" style:parent-style-name="DefaultParagraphFont" style:family="text">
      <style:text-properties style:font-name="Segoe UI Emoji" style:font-name-complex="Segoe UI Emoji"/>
    </style:style>
    <style:style style:name="T41" style:parent-style-name="DefaultParagraphFont" style:family="text">
      <style:text-properties style:font-name="Segoe UI Emoji" style:font-name-complex="Segoe UI Emoji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style:font-name="Segoe UI Emoji" style:font-name-complex="Segoe UI Emoji"/>
    </style:style>
    <style:style style:name="T44" style:parent-style-name="DefaultParagraphFont" style:family="text">
      <style:text-properties style:font-name="Segoe UI Emoji" style:font-name-complex="Segoe UI Emoji"/>
    </style:style>
    <style:style style:name="T45" style:parent-style-name="DefaultParagraphFont" style:family="text">
      <style:text-properties style:font-name="Segoe UI Emoji" style:font-name-complex="Segoe UI Emoji"/>
    </style:style>
    <style:style style:name="T46" style:parent-style-name="DefaultParagraphFont" style:family="text">
      <style:text-properties style:font-name="Segoe UI Emoji" style:font-name-complex="Segoe UI Emoji"/>
    </style:style>
    <style:style style:name="T47" style:parent-style-name="DefaultParagraphFont" style:family="text">
      <style:text-properties style:font-name="Segoe UI Emoji" style:font-name-complex="Segoe UI Emoji"/>
    </style:style>
    <style:style style:name="T48" style:parent-style-name="DefaultParagraphFont" style:family="text">
      <style:text-properties style:font-name="Segoe UI Emoji" style:font-name-complex="Segoe UI Emoji"/>
    </style:style>
    <style:style style:name="T49" style:parent-style-name="DefaultParagraphFont" style:family="text">
      <style:text-properties style:font-name="Segoe UI Emoji" style:font-name-complex="Segoe UI Emoji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style:font-name="Segoe UI Emoji" style:font-name-complex="Segoe UI Emoji"/>
    </style:style>
    <style:style style:name="T52" style:parent-style-name="DefaultParagraphFont" style:family="text">
      <style:text-properties style:font-name="Segoe UI Emoji" style:font-name-complex="Segoe UI Emoji"/>
    </style:style>
    <style:style style:name="T53" style:parent-style-name="DefaultParagraphFont" style:family="text">
      <style:text-properties style:font-name="Segoe UI Emoji" style:font-name-complex="Segoe UI Emoji"/>
    </style:style>
    <style:style style:name="T54" style:parent-style-name="DefaultParagraphFont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📘</text:span><text:span text:style-name="T3"><text:s/>AI Career OS</text:span></text:p>
      <text:p text:style-name="P4">Product Bible</text:p>
      <text:p text:style-name="P5">Volume 1</text:p>
      <text:p text:style-name="P6">Executive Summary</text:p>
      <text:p text:style-name="P7">Version 1.0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8">1.0 Purpose of This Document</text:p>
      <text:p text:style-name="Normal">This document establishes the strategic foundation of AI Career OS.</text:p>
      <text:p text:style-name="Normal">It is the single source of truth for every future decision regarding product development, user experience, visual identity, artificial intelligence, technical architecture, marketing, branding, content strategy, and long-term business direction.</text:p>
      <text:p text:style-name="Normal">Every future feature, page, animation, AI workflow, roadmap, marketing campaign, or engineering decision should be evaluated against the principles defined in this document.</text:p>
      <text:p text:style-name="Normal">This document is intentionally written before implementation.</text:p>
      <text:p text:style-name="Normal">We believe that exceptional products are not built by writing code first.</text:p>
      <text:p text:style-name="Normal">They are built by creating clarity first.</text:p>
      <text:p text:style-name="Normal">AI Career OS is therefore designed from strategy outward—not from technology inward.</text:p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9">1.1 Executive Vision</text:p>
      <text:p text:style-name="Normal">Artificial Intelligence is creating the largest transformation of the global job market since the Industrial Revolution.</text:p>
      <text:p text:style-name="Normal">Millions of people want to enter the AI industry.</text:p>
      <text:p text:style-name="Normal">However, most people face the same questions:</text:p>
      <text:list text:style-name="LFO1" text:continue-numbering="true">
        <text:list-item>
          <text:p text:style-name="P10">Which AI career is right for me?<text:s/></text:p>
        </text:list-item>
        <text:list-item>
          <text:p text:style-name="P11">Where should I start?<text:s/></text:p>
        </text:list-item>
        <text:list-item>
          <text:p text:style-name="P12">Which skills actually matter?<text:s/></text:p>
        </text:list-item>
        <text:list-item>
          <text:p text:style-name="P13">Which courses should I take?<text:s/></text:p>
        </text:list-item>
        <text:list-item>
          <text:p text:style-name="P14">Which projects should I build?<text:s/></text:p>
        </text:list-item>
        <text:list-item>
          <text:p text:style-name="P15">How long will it take?<text:s/></text:p>
        </text:list-item>
        <text:list-item>
          <text:p text:style-name="P16">Am I ready to apply?<text:s/></text:p>
        </text:list-item>
        <text:list-item>
          <text:p text:style-name="P17">What if I choose the wrong path?<text:s/></text:p>
        </text:list-item>
      </text:list>
      <text:p text:style-name="Normal">Today's internet provides an overwhelming amount of information but very little guidance.</text:p>
      <text:p text:style-name="Normal">Users jump between YouTube videos, blog posts, roadmap websites, online courses, Reddit discussions, ChatGPT conversations, LinkedIn articles, GitHub repositories, and AI tools.</text:p>
      <text:p text:style-name="Normal">Information is abundant.</text:p>
      <text:p text:style-name="Normal">Clarity is rare.</text:p>
      <text:p text:style-name="Normal">AI Career OS exists to solve that problem.</text:p>
      <text:p text:style-name="Normal">Rather than becoming another source of information, AI Career OS becomes the intelligent system that transforms scattered information into a personalized career strategy.</text:p>
      <text:p text:style-name="Normal">The platform does not simply answer questions.</text:p>
      <text:p text:style-name="Normal">It guides decisions.</text:p>
      <text:p text:style-name="Normal">It does not simply recommend resources.</text:p>
      <text:p text:style-name="Normal">It builds careers.</text:p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18">1.2 Product Definition</text:p>
      <text:p text:style-name="Normal">AI Career OS is a Personal AI Career Operating System.</text:p>
      <text:p text:style-name="Normal">It is not merely a website.</text:p>
      <text:p text:style-name="Normal">It is not a roadmap platform.</text:p>
      <text:p text:style-name="Normal">It is not a learning management system.</text:p>
      <text:p text:style-name="Normal">It is not another AI chatbot.</text:p>
      <text:p text:style-name="Normal">Instead, it is an intelligent operating environment that continuously helps people discover, build, monitor, and achieve successful careers in Artificial Intelligence.</text:p>
      <text:p text:style-name="Normal">Every user receives a unique experience based on:</text:p>
      <text:list text:style-name="LFO2" text:continue-numbering="true">
        <text:list-item>
          <text:p text:style-name="P19">Previous experience<text:s/></text:p>
        </text:list-item>
        <text:list-item>
          <text:p text:style-name="P20">Existing skills<text:s/></text:p>
        </text:list-item>
        <text:list-item>
          <text:p text:style-name="P21">Career goals<text:s/></text:p>
        </text:list-item>
        <text:list-item>
          <text:p text:style-name="P22">Learning preferences<text:s/></text:p>
        </text:list-item>
        <text:list-item>
          <text:p text:style-name="P23">Professional background<text:s/></text:p>
        </text:list-item>
        <text:list-item>
          <text:p text:style-name="P24">Personality<text:s/></text:p>
        </text:list-item>
        <text:list-item>
          <text:p text:style-name="P25">Interests<text:s/></text:p>
        </text:list-item>
        <text:list-item>
          <text:p text:style-name="P26">Progress over time<text:s/></text:p>
        </text:list-item>
        <text:list-item>
          <text:p text:style-name="P27">AI interactions<text:s/></text:p>
        </text:list-item>
        <text:list-item>
          <text:p text:style-name="P28">Career DNA<text:s/></text:p>
        </text:list-item>
      </text:list>
      <text:p text:style-name="Normal">The product continuously evolves alongside the user.</text:p>
      <text:p text:style-name="Normal">As the user grows, the platform grows.</text:p>
      <text:p text:style-name="Normal">As new skills are learned, recommendations change.</text:p>
      <text:p text:style-name="Normal">As industries evolve, roadmaps evolve.</text:p>
      <text:p text:style-name="Normal">As AI changes, the operating system adapts.</text:p>
      <text:p text:style-name="Normal">The platform is never static.</text:p>
      <text:p text:style-name="Normal">It is a living intelligence system.</text:p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29">1.3 Why AI Career OS Exists</text:p>
      <text:p text:style-name="Normal">Entering AI has become unnecessarily difficult.</text:p>
      <text:p text:style-name="Normal">Not because learning AI is impossible.</text:p>
      <text:p text:style-name="Normal">But because choosing the right direction has become confusing.</text:p>
      <text:p text:style-name="Normal">Today, beginners typically experience something like this:</text:p>
      <text:p text:style-name="Normal">They search:</text:p>
      <text:p text:style-name="Normal">"How do I start learning AI?"</text:p>
      <text:p text:style-name="Normal">Google returns millions of pages.</text:p>
      <text:p text:style-name="Normal">YouTube recommends thousands of videos.</text:p>
      <text:p text:style-name="Normal">ChatGPT provides one opinion.</text:p>
      <text:p text:style-name="Normal">Claude provides another.</text:p>
      <text:p text:style-name="Normal">Reddit provides fifty opinions.</text:p>
      <text:soft-page-break/>
      <text:p text:style-name="Normal">LinkedIn recommends certifications.</text:p>
      <text:p text:style-name="Normal">Friends recommend bootcamps.</text:p>
      <text:p text:style-name="Normal">Companies ask for experience.</text:p>
      <text:p text:style-name="Normal">Courses promise jobs.</text:p>
      <text:p text:style-name="Normal">Roadmaps contradict one another.</text:p>
      <text:p text:style-name="Normal">The result is analysis paralysis.</text:p>
      <text:p text:style-name="Normal">People spend months researching instead of building.</text:p>
      <text:p text:style-name="Normal">Many quit before writing their first line of code.</text:p>
      <text:p text:style-name="Normal">Others spend years learning technologies they never actually need.</text:p>
      <text:p text:style-name="Normal">AI Career OS removes this uncertainty.</text:p>
      <text:p text:style-name="Normal">Instead of asking users to figure everything out themselves, the platform begins with one simple question:</text:p>
      <text:p text:style-name="Normal"><text:span text:style-name="T30">"Tell us about yourself."</text:span></text:p>
      <text:p text:style-name="Normal">From that single conversation, the platform constructs an intelligent understanding of who the user is and where they should go.</text:p>
      <text:p text:style-name="Normal">Every recommendation is then personalized.</text:p>
      <text:p text:style-name="Normal">The platform does not start with careers.</text:p>
      <text:p text:style-name="Normal">It starts with the person.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31">1.4 The Future We Believe In</text:p>
      <text:p text:style-name="Normal">We believe that within the next decade, every professional career will be influenced by Artificial Intelligence.</text:p>
      <text:p text:style-name="Normal">Some jobs will disappear.</text:p>
      <text:p text:style-name="Normal">Many jobs will evolve.</text:p>
      <text:p text:style-name="Normal">Thousands of completely new roles will emerge.</text:p>
      <text:p text:style-name="Normal">Career planning will no longer be something people do once every ten years.</text:p>
      <text:p text:style-name="Normal">It will become a continuous process.</text:p>
      <text:p text:style-name="Normal">Traditional education cannot adapt fast enough.</text:p>
      <text:p text:style-name="Normal">Traditional career counseling cannot scale globally.</text:p>
      <text:soft-page-break/>
      <text:p text:style-name="Normal">Traditional roadmap websites cannot personalize advice.</text:p>
      <text:p text:style-name="Normal">Artificial Intelligence changes all three.</text:p>
      <text:p text:style-name="Normal">AI Career OS is built for that future.</text:p>
      <text:p text:style-name="Normal">Instead of acting as a static library of knowledge, it becomes an adaptive intelligence that evolves together with every individual user.</text:p>
      <text:p text:style-name="Normal">Its purpose is not only to teach AI.</text:p>
      <text:p text:style-name="Normal">Its purpose is to prepare people for an AI-powered world.</text:p>
      <text:p text:style-name="Normal"># 1.5 What AI Career OS Is</text:p>
      <text:p text:style-name="Normal"/>
      <text:p text:style-name="Normal">AI Career OS is not a traditional website.</text:p>
      <text:p text:style-name="Normal"/>
      <text:p text:style-name="Normal">It is a living, intelligent ecosystem designed to help individuals successfully build careers in Artificial Intelligence.</text:p>
      <text:p text:style-name="Normal"/>
      <text:p text:style-name="Normal">The platform combines career discovery, AI-powered coaching, personalized learning, skill assessment, progress tracking, portfolio planning, and long-term career guidance into one seamless experience.</text:p>
      <text:p text:style-name="Normal"/>
      <text:p text:style-name="Normal">Rather than asking users to search through endless resources, AI Career OS transforms complexity into a structured and personalized journey.</text:p>
      <text:p text:style-name="Normal"/>
      <text:p text:style-name="Normal">Every recommendation is generated around the individual—not around predefined templates.</text:p>
      <text:p text:style-name="Normal"/>
      <text:p text:style-name="Normal">The platform continuously learns from the user's interactions, goals, progress, strengths, and interests.</text:p>
      <text:p text:style-name="Normal"/>
      <text:p text:style-name="Normal">As the user evolves, the platform evolves.</text:p>
      <text:p text:style-name="Normal"/>
      <text:soft-page-break/>
      <text:p text:style-name="Normal">AI Career OS is designed to become the user's long-term career companion rather than a one-time learning resource.</text:p>
      <text:p text:style-name="Normal"/>
      <text:p text:style-name="Normal">Its purpose is to remove uncertainty and replace it with confidence.</text:p>
      <text:p text:style-name="Normal"/>
      <text:p text:style-name="Normal">---</text:p>
      <text:p text:style-name="Normal"/>
      <text:p text:style-name="Normal"># 1.6 What AI Career OS Is NOT</text:p>
      <text:p text:style-name="Normal"/>
      <text:p text:style-name="Normal">Defining what the product is NOT is equally important.</text:p>
      <text:p text:style-name="Normal"/>
      <text:p text:style-name="Normal">AI Career OS is NOT:</text:p>
      <text:p text:style-name="Normal"/>
      <text:p text:style-name="Normal">• A roadmap website</text:p>
      <text:p text:style-name="Normal"/>
      <text:p text:style-name="Normal">• A collection of AI courses</text:p>
      <text:p text:style-name="Normal"/>
      <text:p text:style-name="Normal">• A job board</text:p>
      <text:p text:style-name="Normal"/>
      <text:p text:style-name="Normal">• A resume builder</text:p>
      <text:p text:style-name="Normal"/>
      <text:p text:style-name="Normal">• A CV analyzer only</text:p>
      <text:p text:style-name="Normal"/>
      <text:p text:style-name="Normal">• A chatbot</text:p>
      <text:p text:style-name="Normal"/>
      <text:p text:style-name="Normal">• A blog</text:p>
      <text:p text:style-name="Normal"/>
      <text:p text:style-name="Normal">• A documentation website</text:p>
      <text:p text:style-name="Normal"/>
      <text:p text:style-name="Normal">• A learning management system</text:p>
      <text:p text:style-name="Normal"/>
      <text:p text:style-name="Normal">• A certification platform</text:p>
      <text:p text:style-name="Normal"/>
      <text:p text:style-name="Normal">• Another AI directory</text:p>
      <text:p text:style-name="Normal"/>
      <text:p text:style-name="Normal">Although the platform contains elements of many existing products, none of those elements represent the product itself.</text:p>
      <text:p text:style-name="Normal"/>
      <text:p text:style-name="Normal">Those are tools.</text:p>
      <text:p text:style-name="Normal"/>
      <text:p text:style-name="Normal">The product is the intelligence connecting all of them together.</text:p>
      <text:p text:style-name="Normal"/>
      <text:p text:style-name="Normal">The true value comes from the personalized decision-making layer that sits above every individual feature.</text:p>
      <text:p text:style-name="Normal"/>
      <text:p text:style-name="Normal">---</text:p>
      <text:p text:style-name="Normal"/>
      <text:p text:style-name="Normal"># 1.7 The Core Promise</text:p>
      <text:p text:style-name="Normal"/>
      <text:p text:style-name="Normal">Every product should make one clear promise.</text:p>
      <text:p text:style-name="Normal"/>
      <text:p text:style-name="Normal">AI Career OS makes the following promise:</text:p>
      <text:p text:style-name="Normal"/>
      <text:p text:style-name="Normal">"We help every person discover the right AI career, understand why it fits them, build the necessary skills, measure their progress, and confidently become job-ready."</text:p>
      <text:p text:style-name="Normal"/>
      <text:p text:style-name="Normal">Everything inside the platform should support this promise.</text:p>
      <text:p text:style-name="Normal"/>
      <text:p text:style-name="Normal">Every page.</text:p>
      <text:p text:style-name="Normal"/>
      <text:p text:style-name="Normal">Every interaction.</text:p>
      <text:p text:style-name="Normal"/>
      <text:p text:style-name="Normal">Every recommendation.</text:p>
      <text:p text:style-name="Normal"/>
      <text:p text:style-name="Normal">Every animation.</text:p>
      <text:p text:style-name="Normal"/>
      <text:p text:style-name="Normal">Every AI conversation.</text:p>
      <text:p text:style-name="Normal"/>
      <text:p text:style-name="Normal">Every feature.</text:p>
      <text:p text:style-name="Normal"/>
      <text:p text:style-name="Normal">If a feature does not contribute to this promise, it should not be built.</text:p>
      <text:p text:style-name="Normal"/>
      <text:p text:style-name="Normal">This principle keeps the product focused and prevents unnecessary complexity.</text:p>
      <text:p text:style-name="Normal"/>
      <text:p text:style-name="Normal">---</text:p>
      <text:p text:style-name="Normal"/>
      <text:p text:style-name="Normal"># 1.8 The North Star</text:p>
      <text:p text:style-name="Normal"/>
      <text:p text:style-name="Normal">Every great product has one guiding idea.</text:p>
      <text:p text:style-name="Normal"/>
      <text:p text:style-name="Normal">For AI Career OS, that idea is:</text:p>
      <text:p text:style-name="Normal"/>
      <text:p text:style-name="Normal">"If ChatGPT helps people answer questions, AI Career OS helps people build careers."</text:p>
      <text:p text:style-name="Normal"/>
      <text:p text:style-name="Normal">This statement defines the product's identity.</text:p>
      <text:p text:style-name="Normal"/>
      <text:p text:style-name="Normal">The platform is not trying to become another conversational AI.</text:p>
      <text:p text:style-name="Normal"/>
      <text:p text:style-name="Normal">Instead, it uses Artificial Intelligence to create clarity, direction, confidence, and measurable progress.</text:p>
      <text:p text:style-name="Normal"/>
      <text:p text:style-name="Normal">Whenever a future decision becomes difficult, the team should ask one question:</text:p>
      <text:p text:style-name="Normal"/>
      <text:p text:style-name="Normal">"Does this help users build their AI career?"</text:p>
      <text:p text:style-name="Normal"/>
      <text:p text:style-name="Normal">If the answer is no, the feature should be reconsidered.</text:p>
      <text:p text:style-name="Normal"/>
      <text:p text:style-name="Normal">---</text:p>
      <text:p text:style-name="Normal"/>
      <text:p text:style-name="Normal"># 1.9 Product DNA</text:p>
      <text:p text:style-name="Normal"/>
      <text:p text:style-name="Normal">Every successful product has a recognizable personality.</text:p>
      <text:p text:style-name="Normal"/>
      <text:p text:style-name="Normal">AI Career OS is built around the following DNA.</text:p>
      <text:p text:style-name="Normal"/>
      <text:p text:style-name="Normal">## Intelligent</text:p>
      <text:p text:style-name="Normal"/>
      <text:p text:style-name="Normal">Every recommendation should demonstrate reasoning rather than automation.</text:p>
      <text:p text:style-name="Normal"/>
      <text:p text:style-name="Normal">The platform should explain not only *what* to do, but also *why*.</text:p>
      <text:p text:style-name="Normal"/>
      <text:p text:style-name="Normal">---</text:p>
      <text:p text:style-name="Normal"/>
      <text:soft-page-break/>
      <text:p text:style-name="Normal">## Personal</text:p>
      <text:p text:style-name="Normal"/>
      <text:p text:style-name="Normal">No two users should experience exactly the same journey.</text:p>
      <text:p text:style-name="Normal"/>
      <text:p text:style-name="Normal">Recommendations should adapt to experience, interests, learning style, goals, strengths, weaknesses, and long-term ambitions.</text:p>
      <text:p text:style-name="Normal"/>
      <text:p text:style-name="Normal">---</text:p>
      <text:p text:style-name="Normal"/>
      <text:p text:style-name="Normal">## Adaptive</text:p>
      <text:p text:style-name="Normal"/>
      <text:p text:style-name="Normal">The platform should continuously evolve.</text:p>
      <text:p text:style-name="Normal"/>
      <text:p text:style-name="Normal">Learning plans.</text:p>
      <text:p text:style-name="Normal"/>
      <text:p text:style-name="Normal">Roadmaps.</text:p>
      <text:p text:style-name="Normal"/>
      <text:p text:style-name="Normal">Projects.</text:p>
      <text:p text:style-name="Normal"/>
      <text:p text:style-name="Normal">Career recommendations.</text:p>
      <text:p text:style-name="Normal"/>
      <text:p text:style-name="Normal">Weekly goals.</text:p>
      <text:p text:style-name="Normal"/>
      <text:p text:style-name="Normal">Everything should change as the user grows.</text:p>
      <text:p text:style-name="Normal"/>
      <text:p text:style-name="Normal">---</text:p>
      <text:p text:style-name="Normal"/>
      <text:p text:style-name="Normal">## Trustworthy</text:p>
      <text:p text:style-name="Normal"/>
      <text:p text:style-name="Normal">Trust is more valuable than engagement.</text:p>
      <text:p text:style-name="Normal"/>
      <text:p text:style-name="Normal">The platform should never recommend something simply to increase usage.</text:p>
      <text:p text:style-name="Normal"/>
      <text:p text:style-name="Normal">Every recommendation should genuinely improve the user's career.</text:p>
      <text:p text:style-name="Normal"/>
      <text:p text:style-name="Normal">Long-term trust always comes before short-term metrics.</text:p>
      <text:p text:style-name="Normal"/>
      <text:p text:style-name="Normal">---</text:p>
      <text:p text:style-name="Normal"/>
      <text:p text:style-name="Normal">## Premium</text:p>
      <text:p text:style-name="Normal"/>
      <text:p text:style-name="Normal">Every interaction should communicate quality.</text:p>
      <text:p text:style-name="Normal"/>
      <text:p text:style-name="Normal">Typography.</text:p>
      <text:p text:style-name="Normal"/>
      <text:p text:style-name="Normal">Spacing.</text:p>
      <text:p text:style-name="Normal"/>
      <text:p text:style-name="Normal">Motion.</text:p>
      <text:p text:style-name="Normal"/>
      <text:p text:style-name="Normal">Animations.</text:p>
      <text:p text:style-name="Normal"/>
      <text:p text:style-name="Normal">AI responses.</text:p>
      <text:p text:style-name="Normal"/>
      <text:p text:style-name="Normal">Reports.</text:p>
      <text:p text:style-name="Normal"/>
      <text:p text:style-name="Normal">Dashboards.</text:p>
      <text:p text:style-name="Normal"/>
      <text:p text:style-name="Normal">Everything should feel carefully designed.</text:p>
      <text:p text:style-name="Normal"/>
      <text:p text:style-name="Normal">Users should feel they are using a world-class product.</text:p>
      <text:p text:style-name="Normal"/>
      <text:p text:style-name="Normal">---</text:p>
      <text:p text:style-name="Normal"/>
      <text:p text:style-name="Normal">## Human-Centered</text:p>
      <text:p text:style-name="Normal"/>
      <text:p text:style-name="Normal">Artificial Intelligence should amplify human potential.</text:p>
      <text:p text:style-name="Normal"/>
      <text:p text:style-name="Normal">It should never replace human ambition.</text:p>
      <text:p text:style-name="Normal"/>
      <text:p text:style-name="Normal">The platform exists to empower people—not overwhelm them.</text:p>
      <text:p text:style-name="Normal"/>
      <text:p text:style-name="Normal">AI should behave like an experienced mentor rather than an all-knowing machine.</text:p>
      <text:p text:style-name="Normal"/>
      <text:p text:style-name="Normal">---</text:p>
      <text:p text:style-name="Normal"/>
      <text:p text:style-name="Normal"># 1.10 Product Success Definition</text:p>
      <text:p text:style-name="Normal"/>
      <text:p text:style-name="Normal">Success is not measured by page views.</text:p>
      <text:p text:style-name="Normal"/>
      <text:p text:style-name="Normal">Success is not measured by time spent on the website.</text:p>
      <text:p text:style-name="Normal"/>
      <text:p text:style-name="Normal">Success is not measured by the number of completed lessons.</text:p>
      <text:p text:style-name="Normal"/>
      <text:p text:style-name="Normal">The true success of AI Career OS is measured by real-world outcomes.</text:p>
      <text:p text:style-name="Normal"/>
      <text:p text:style-name="Normal">Examples include:</text:p>
      <text:p text:style-name="Normal"/>
      <text:p text:style-name="Normal">• Users discovering careers that genuinely fit them.</text:p>
      <text:p text:style-name="Normal"/>
      <text:p text:style-name="Normal">• Users completing personalized learning journeys.</text:p>
      <text:p text:style-name="Normal"/>
      <text:p text:style-name="Normal">• Users building meaningful portfolios.</text:p>
      <text:p text:style-name="Normal"/>
      <text:p text:style-name="Normal">• Users developing confidence.</text:p>
      <text:p text:style-name="Normal"/>
      <text:p text:style-name="Normal">• Users successfully transitioning into AI careers.</text:p>
      <text:p text:style-name="Normal"/>
      <text:p text:style-name="Normal">• Users receiving interviews.</text:p>
      <text:p text:style-name="Normal"/>
      <text:p text:style-name="Normal">• Users receiving job offers.</text:p>
      <text:p text:style-name="Normal"/>
      <text:p text:style-name="Normal">• Users recommending AI Career OS to others.</text:p>
      <text:p text:style-name="Normal"/>
      <text:p text:style-name="Normal">Ultimately, the success of the platform is directly connected to the success of its users.</text:p>
      <text:p text:style-name="Normal"/>
      <text:p text:style-name="Normal">When users achieve their career goals, the platform has fulfilled its purpose.</text:p>
      <text:p text:style-name="Normal"># 1.11 Long-Term Product Vision</text:p>
      <text:p text:style-name="Normal"/>
      <text:p text:style-name="Normal">AI Career OS is not being built for today's AI market.</text:p>
      <text:p text:style-name="Normal"/>
      <text:p text:style-name="Normal">It is being built for the next decade.</text:p>
      <text:p text:style-name="Normal"/>
      <text:soft-page-break/>
      <text:p text:style-name="Normal">Artificial Intelligence is evolving faster than any previous technological revolution.</text:p>
      <text:p text:style-name="Normal"/>
      <text:p text:style-name="Normal">New roles appear every month.</text:p>
      <text:p text:style-name="Normal"/>
      <text:p text:style-name="Normal">Existing roles change continuously.</text:p>
      <text:p text:style-name="Normal"/>
      <text:p text:style-name="Normal">Learning resources become outdated.</text:p>
      <text:p text:style-name="Normal"/>
      <text:p text:style-name="Normal">Required skills evolve.</text:p>
      <text:p text:style-name="Normal"/>
      <text:p text:style-name="Normal">Traditional career planning cannot keep up with this speed.</text:p>
      <text:p text:style-name="Normal"/>
      <text:p text:style-name="Normal">AI Career OS is designed to solve this problem by becoming a continuously evolving career intelligence platform.</text:p>
      <text:p text:style-name="Normal"/>
      <text:p text:style-name="Normal">The platform should never become "finished."</text:p>
      <text:p text:style-name="Normal"/>
      <text:p text:style-name="Normal">Instead, it should continuously improve through:</text:p>
      <text:p text:style-name="Normal"/>
      <text:p text:style-name="Normal">• AI model improvements</text:p>
      <text:p text:style-name="Normal"/>
      <text:p text:style-name="Normal">• Updated career knowledge</text:p>
      <text:p text:style-name="Normal"/>
      <text:p text:style-name="Normal">• Industry trends</text:p>
      <text:p text:style-name="Normal"/>
      <text:p text:style-name="Normal">• Hiring market analysis</text:p>
      <text:p text:style-name="Normal"/>
      <text:p text:style-name="Normal">• User feedback</text:p>
      <text:p text:style-name="Normal"/>
      <text:p text:style-name="Normal">• Learning analytics</text:p>
      <text:p text:style-name="Normal"/>
      <text:p text:style-name="Normal">• Portfolio insights</text:p>
      <text:p text:style-name="Normal"/>
      <text:p text:style-name="Normal">• Emerging technologies</text:p>
      <text:p text:style-name="Normal"/>
      <text:p text:style-name="Normal">Every improvement should make the platform smarter than it was yesterday.</text:p>
      <text:p text:style-name="Normal"/>
      <text:p text:style-name="Normal">The long-term objective is simple:</text:p>
      <text:p text:style-name="Normal"/>
      <text:p text:style-name="Normal">Become the world's most trusted operating system for AI careers.</text:p>
      <text:p text:style-name="Normal"/>
      <text:p text:style-name="Normal">---</text:p>
      <text:p text:style-name="Normal"/>
      <text:p text:style-name="Normal"># 1.12 Future Ecosystem</text:p>
      <text:p text:style-name="Normal"/>
      <text:p text:style-name="Normal">AI Career OS should eventually become much more than a single product.</text:p>
      <text:p text:style-name="Normal"/>
      <text:p text:style-name="Normal">It should evolve into a complete ecosystem.</text:p>
      <text:p text:style-name="Normal"/>
      <text:p text:style-name="Normal">Possible ecosystem modules include:</text:p>
      <text:p text:style-name="Normal"/>
      <text:p text:style-name="Normal">## AI Career Discovery</text:p>
      <text:p text:style-name="Normal"/>
      <text:p text:style-name="Normal">Helping users discover careers that fit their background.</text:p>
      <text:p text:style-name="Normal"/>
      <text:p text:style-name="Normal">---</text:p>
      <text:p text:style-name="Normal"/>
      <text:p text:style-name="Normal">## Career DNA</text:p>
      <text:p text:style-name="Normal"/>
      <text:p text:style-name="Normal">Generating a unique career identity for every user.</text:p>
      <text:p text:style-name="Normal"/>
      <text:p text:style-name="Normal">---</text:p>
      <text:p text:style-name="Normal"/>
      <text:p text:style-name="Normal">## CV Analyzer</text:p>
      <text:p text:style-name="Normal"/>
      <text:p text:style-name="Normal">Understanding experience, strengths, transferable skills, and hidden opportunities.</text:p>
      <text:p text:style-name="Normal"/>
      <text:p text:style-name="Normal">---</text:p>
      <text:p text:style-name="Normal"/>
      <text:p text:style-name="Normal">## AI Career Dashboard</text:p>
      <text:p text:style-name="Normal"/>
      <text:p text:style-name="Normal">The personal command center for each user.</text:p>
      <text:p text:style-name="Normal"/>
      <text:p text:style-name="Normal">---</text:p>
      <text:p text:style-name="Normal"/>
      <text:p text:style-name="Normal">## Personalized Roadmaps</text:p>
      <text:p text:style-name="Normal"/>
      <text:p text:style-name="Normal">Dynamic learning plans that adapt over time.</text:p>
      <text:p text:style-name="Normal"/>
      <text:p text:style-name="Normal">---</text:p>
      <text:p text:style-name="Normal"/>
      <text:p text:style-name="Normal">## AI Coach</text:p>
      <text:p text:style-name="Normal"/>
      <text:p text:style-name="Normal">A persistent mentor that proactively guides users.</text:p>
      <text:p text:style-name="Normal"/>
      <text:p text:style-name="Normal">---</text:p>
      <text:p text:style-name="Normal"/>
      <text:p text:style-name="Normal">## Skill Intelligence</text:p>
      <text:p text:style-name="Normal"/>
      <text:p text:style-name="Normal">Tracking strengths, weaknesses, and future learning priorities.</text:p>
      <text:p text:style-name="Normal"/>
      <text:p text:style-name="Normal">---</text:p>
      <text:p text:style-name="Normal"/>
      <text:p text:style-name="Normal">## Portfolio Builder</text:p>
      <text:p text:style-name="Normal"/>
      <text:p text:style-name="Normal">Helping users create projects that demonstrate real-world skills.</text:p>
      <text:p text:style-name="Normal"/>
      <text:p text:style-name="Normal">---</text:p>
      <text:p text:style-name="Normal"/>
      <text:p text:style-name="Normal">## Interview Simulator</text:p>
      <text:p text:style-name="Normal"/>
      <text:p text:style-name="Normal">AI-powered mock interviews with personalized feedback.</text:p>
      <text:p text:style-name="Normal"/>
      <text:p text:style-name="Normal">---</text:p>
      <text:p text:style-name="Normal"/>
      <text:p text:style-name="Normal">## Resume Optimizer</text:p>
      <text:p text:style-name="Normal"/>
      <text:p text:style-name="Normal">Automatically improving resumes for specific AI positions.</text:p>
      <text:p text:style-name="Normal"/>
      <text:p text:style-name="Normal">---</text:p>
      <text:p text:style-name="Normal"/>
      <text:p text:style-name="Normal">## Cover Letter Generator</text:p>
      <text:p text:style-name="Normal"/>
      <text:p text:style-name="Normal">Generating tailored application documents.</text:p>
      <text:p text:style-name="Normal"/>
      <text:p text:style-name="Normal">---</text:p>
      <text:p text:style-name="Normal"/>
      <text:p text:style-name="Normal">## LinkedIn Optimizer</text:p>
      <text:p text:style-name="Normal"/>
      <text:p text:style-name="Normal">Helping users build stronger professional profiles.</text:p>
      <text:p text:style-name="Normal"/>
      <text:p text:style-name="Normal">---</text:p>
      <text:p text:style-name="Normal"/>
      <text:p text:style-name="Normal">## GitHub Analyzer</text:p>
      <text:p text:style-name="Normal"/>
      <text:p text:style-name="Normal">Reviewing repositories and recommending improvements.</text:p>
      <text:p text:style-name="Normal"/>
      <text:p text:style-name="Normal">---</text:p>
      <text:p text:style-name="Normal"/>
      <text:p text:style-name="Normal">## AI Learning Hub</text:p>
      <text:p text:style-name="Normal"/>
      <text:p text:style-name="Normal">Personalized learning resources selected specifically for each user.</text:p>
      <text:p text:style-name="Normal"/>
      <text:p text:style-name="Normal">---</text:p>
      <text:p text:style-name="Normal"/>
      <text:p text:style-name="Normal">## Job Matching</text:p>
      <text:p text:style-name="Normal"/>
      <text:p text:style-name="Normal">Matching users with suitable AI positions based on readiness.</text:p>
      <text:p text:style-name="Normal"/>
      <text:p text:style-name="Normal">---</text:p>
      <text:p text:style-name="Normal"/>
      <text:p text:style-name="Normal">## Career Analytics</text:p>
      <text:p text:style-name="Normal"/>
      <text:p text:style-name="Normal">Showing long-term growth, milestones, strengths, and future opportunities.</text:p>
      <text:p text:style-name="Normal"/>
      <text:p text:style-name="Normal">---</text:p>
      <text:p text:style-name="Normal"/>
      <text:p text:style-name="Normal">## Community</text:p>
      <text:p text:style-name="Normal"/>
      <text:p text:style-name="Normal">Connecting users with mentors, professionals, and peers.</text:p>
      <text:p text:style-name="Normal"/>
      <text:p text:style-name="Normal">---</text:p>
      <text:p text:style-name="Normal"/>
      <text:p text:style-name="Normal">## AI News</text:p>
      <text:p text:style-name="Normal"/>
      <text:p text:style-name="Normal">Delivering personalized AI industry news based on the user's career path.</text:p>
      <text:p text:style-name="Normal"/>
      <text:p text:style-name="Normal">---</text:p>
      <text:p text:style-name="Normal"/>
      <text:p text:style-name="Normal">The platform should be designed from day one so these modules can be integrated without requiring a complete redesign.</text:p>
      <text:p text:style-name="Normal"/>
      <text:p text:style-name="Normal">Scalability is a design principle, not an afterthought.</text:p>
      <text:p text:style-name="Normal"/>
      <text:p text:style-name="Normal">---</text:p>
      <text:p text:style-name="Normal"/>
      <text:p text:style-name="Normal"># 1.13 Strategic Product Goals</text:p>
      <text:p text:style-name="Normal"/>
      <text:soft-page-break/>
      <text:p text:style-name="Normal">Every decision should support at least one strategic goal.</text:p>
      <text:p text:style-name="Normal"/>
      <text:p text:style-name="Normal">## Goal 1 — Remove Career Uncertainty</text:p>
      <text:p text:style-name="Normal"/>
      <text:p text:style-name="Normal">Users should always know what to do next.</text:p>
      <text:p text:style-name="Normal"/>
      <text:p text:style-name="Normal">Confusion should never be part of the experience.</text:p>
      <text:p text:style-name="Normal"/>
      <text:p text:style-name="Normal">---</text:p>
      <text:p text:style-name="Normal"/>
      <text:p text:style-name="Normal">## Goal 2 — Personalize Everything</text:p>
      <text:p text:style-name="Normal"/>
      <text:p text:style-name="Normal">No generic learning plans.</text:p>
      <text:p text:style-name="Normal"/>
      <text:p text:style-name="Normal">No generic dashboards.</text:p>
      <text:p text:style-name="Normal"/>
      <text:p text:style-name="Normal">No generic recommendations.</text:p>
      <text:p text:style-name="Normal"/>
      <text:p text:style-name="Normal">Every experience should adapt to the individual.</text:p>
      <text:p text:style-name="Normal"/>
      <text:p text:style-name="Normal">---</text:p>
      <text:p text:style-name="Normal"/>
      <text:p text:style-name="Normal">## Goal 3 — Build Confidence</text:p>
      <text:p text:style-name="Normal"/>
      <text:p text:style-name="Normal">The platform should reduce anxiety and increase confidence through clear explanations and measurable progress.</text:p>
      <text:p text:style-name="Normal"/>
      <text:p text:style-name="Normal">---</text:p>
      <text:p text:style-name="Normal"/>
      <text:p text:style-name="Normal">## Goal 4 — Create Measurable Progress</text:p>
      <text:p text:style-name="Normal"/>
      <text:p text:style-name="Normal">Users should always feel they are moving forward.</text:p>
      <text:p text:style-name="Normal"/>
      <text:p text:style-name="Normal">Visible progress creates motivation.</text:p>
      <text:p text:style-name="Normal"/>
      <text:p text:style-name="Normal">Invisible progress creates frustration.</text:p>
      <text:p text:style-name="Normal"/>
      <text:p text:style-name="Normal">---</text:p>
      <text:p text:style-name="Normal"/>
      <text:p text:style-name="Normal">## Goal 5 — Become the Most Trusted AI Career Resource</text:p>
      <text:p text:style-name="Normal"/>
      <text:p text:style-name="Normal">Trust should be earned through quality.</text:p>
      <text:p text:style-name="Normal"/>
      <text:p text:style-name="Normal">Never through marketing claims.</text:p>
      <text:p text:style-name="Normal"/>
      <text:p text:style-name="Normal">Never through exaggerated promises.</text:p>
      <text:p text:style-name="Normal"/>
      <text:p text:style-name="Normal">Authority comes from consistently helping users succeed.</text:p>
      <text:p text:style-name="Normal"/>
      <text:p text:style-name="Normal">---</text:p>
      <text:p text:style-name="Normal"/>
      <text:p text:style-name="Normal">## Goal 6 — Become AI Discoverable</text:p>
      <text:p text:style-name="Normal"/>
      <text:p text:style-name="Normal">The platform should become the most structured, machine-readable, and authoritative AI career resource available online.</text:p>
      <text:p text:style-name="Normal"/>
      <text:soft-page-break/>
      <text:p text:style-name="Normal">It should naturally become a trusted reference for:</text:p>
      <text:p text:style-name="Normal"/>
      <text:p text:style-name="Normal">• Search engines</text:p>
      <text:p text:style-name="Normal"/>
      <text:p text:style-name="Normal">• AI assistants</text:p>
      <text:p text:style-name="Normal"/>
      <text:p text:style-name="Normal">• Answer engines</text:p>
      <text:p text:style-name="Normal"/>
      <text:p text:style-name="Normal">• Future AI systems</text:p>
      <text:p text:style-name="Normal"/>
      <text:p text:style-name="Normal">This goal is achieved through quality, structured knowledge, semantic architecture, and topical authority—not manipulation.</text:p>
      <text:p text:style-name="Normal"/>
      <text:p text:style-name="Normal">---</text:p>
      <text:p text:style-name="Normal"/>
      <text:p text:style-name="Normal"># 1.14 Success Looks Like...</text:p>
      <text:p text:style-name="Normal"/>
      <text:p text:style-name="Normal">Five years after launch, a user should be able to say:</text:p>
      <text:p text:style-name="Normal"/>
      <text:p text:style-name="Normal">"I had no idea how to enter AI."</text:p>
      <text:p text:style-name="Normal"/>
      <text:p text:style-name="Normal">"I uploaded my CV."</text:p>
      <text:p text:style-name="Normal"/>
      <text:p text:style-name="Normal">"The platform understood my background."</text:p>
      <text:p text:style-name="Normal"/>
      <text:p text:style-name="Normal">"It showed me the careers that truly matched me."</text:p>
      <text:p text:style-name="Normal"/>
      <text:p text:style-name="Normal">"It explained why."</text:p>
      <text:p text:style-name="Normal"/>
      <text:p text:style-name="Normal">"It built a personalized roadmap."</text:p>
      <text:p text:style-name="Normal"/>
      <text:p text:style-name="Normal">"It guided me every week."</text:p>
      <text:p text:style-name="Normal"/>
      <text:p text:style-name="Normal">"It helped me build projects."</text:p>
      <text:p text:style-name="Normal"/>
      <text:p text:style-name="Normal">"It prepared me for interviews."</text:p>
      <text:p text:style-name="Normal"/>
      <text:p text:style-name="Normal">"And eventually..."</text:p>
      <text:p text:style-name="Normal"/>
      <text:p text:style-name="Normal">"I got my AI job."</text:p>
      <text:p text:style-name="Normal"/>
      <text:p text:style-name="Normal">That is success.</text:p>
      <text:p text:style-name="Normal"/>
      <text:p text:style-name="Normal">Not because the platform taught everything.</text:p>
      <text:p text:style-name="Normal"/>
      <text:p text:style-name="Normal">But because it guided the right person toward the right destination.</text:p>
      <text:p text:style-name="Normal"/>
      <text:p text:style-name="Normal">---</text:p>
      <text:p text:style-name="Normal"/>
      <text:p text:style-name="Normal"># 1.15 Closing Statement</text:p>
      <text:p text:style-name="Normal"/>
      <text:p text:style-name="Normal">AI Career OS is not designed to compete with online courses.</text:p>
      <text:p text:style-name="Normal"/>
      <text:p text:style-name="Normal">It is not designed to replace universities.</text:p>
      <text:p text:style-name="Normal"/>
      <text:p text:style-name="Normal">It is not designed to replace AI assistants.</text:p>
      <text:p text:style-name="Normal"/>
      <text:p text:style-name="Normal">It exists to connect all of them into one intelligent experience.</text:p>
      <text:p text:style-name="Normal"/>
      <text:p text:style-name="Normal">The product represents a shift from static information toward adaptive guidance.</text:p>
      <text:p text:style-name="Normal"/>
      <text:p text:style-name="Normal">From disconnected tools toward a unified operating system.</text:p>
      <text:p text:style-name="Normal"/>
      <text:p text:style-name="Normal">From uncertainty toward confidence.</text:p>
      <text:p text:style-name="Normal"/>
      <text:p text:style-name="Normal">Every feature, every interaction, every recommendation, every animation, and every future decision should reinforce one simple belief:</text:p>
      <text:p text:style-name="Normal"/>
      <text:p text:style-name="Normal">**People do not need more information.**</text:p>
      <text:p text:style-name="Normal"/>
      <text:p text:style-name="Normal">**They need the right direction.**</text:p>
      <text:p text:style-name="Normal"/>
      <text:p text:style-name="Normal">AI Career OS exists to provide that direction.</text:p>
      <text:p text:style-name="Normal"/>
      <text:p text:style-name="Normal">---</text:p>
      <text:p text:style-name="Normal"/>
      <text:p text:style-name="Normal"># End of Volume 1 — Executive Summary</text:p>
      <text:p text:style-name="Normal"/>
      <text:p text:style-name="Normal">**Revision:** v1.0</text:p>
      <text:p text:style-name="Normal"/>
      <text:p text:style-name="Normal">**Status:** Foundation Approved (Living Document)</text:p>
      <text:p text:style-name="Normal"/>
      <text:p text:style-name="Normal">**Next Volume:** The Problem &amp; Market Opportunity</text:p>
      <text:p text:style-name="Normal"/>
      <text:p text:style-name="Normal"/>
      <text:p text:style-name="Normal">#<text:s/><text:span text:style-name="T32">📘</text:span><text:s/>Volume 2</text:p>
      <text:p text:style-name="Normal"/>
      <text:p text:style-name="Normal"># The Problem &amp; Market Opportunity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2.1 Introduction</text:p>
      <text:p text:style-name="Normal"/>
      <text:p text:style-name="Normal">Every successful company begins with a deep understanding of a problem.</text:p>
      <text:p text:style-name="Normal"/>
      <text:p text:style-name="Normal">The larger and more important the problem, the greater the opportunity to build a transformational product.</text:p>
      <text:p text:style-name="Normal"/>
      <text:p text:style-name="Normal">AI Career OS is not being built because people need another roadmap.</text:p>
      <text:p text:style-name="Normal"/>
      <text:p text:style-name="Normal">It exists because millions of people struggle with one fundamental challenge:</text:p>
      <text:p text:style-name="Normal"/>
      <text:p text:style-name="Normal">**"I know AI is the future, but I don't know where I fit."**</text:p>
      <text:p text:style-name="Normal"/>
      <text:p text:style-name="Normal">This is the problem we solve.</text:p>
      <text:p text:style-name="Normal"/>
      <text:p text:style-name="Normal">Not learning.</text:p>
      <text:p text:style-name="Normal"/>
      <text:p text:style-name="Normal">Not coding.</text:p>
      <text:p text:style-name="Normal"/>
      <text:soft-page-break/>
      <text:p text:style-name="Normal">Not AI itself.</text:p>
      <text:p text:style-name="Normal"/>
      <text:p text:style-name="Normal">**Career clarity.**</text:p>
      <text:p text:style-name="Normal"/>
      <text:p text:style-name="Normal">---</text:p>
      <text:p text:style-name="Normal"/>
      <text:p text:style-name="Normal"># 2.2 The AI Revolution</text:p>
      <text:p text:style-name="Normal"/>
      <text:p text:style-name="Normal">Artificial Intelligence is changing every industry.</text:p>
      <text:p text:style-name="Normal"/>
      <text:p text:style-name="Normal">Software.</text:p>
      <text:p text:style-name="Normal"/>
      <text:p text:style-name="Normal">Marketing.</text:p>
      <text:p text:style-name="Normal"/>
      <text:p text:style-name="Normal">Finance.</text:p>
      <text:p text:style-name="Normal"/>
      <text:p text:style-name="Normal">Healthcare.</text:p>
      <text:p text:style-name="Normal"/>
      <text:p text:style-name="Normal">Manufacturing.</text:p>
      <text:p text:style-name="Normal"/>
      <text:p text:style-name="Normal">Retail.</text:p>
      <text:p text:style-name="Normal"/>
      <text:p text:style-name="Normal">Education.</text:p>
      <text:p text:style-name="Normal"/>
      <text:p text:style-name="Normal">Law.</text:p>
      <text:p text:style-name="Normal"/>
      <text:p text:style-name="Normal">Engineering.</text:p>
      <text:p text:style-name="Normal"/>
      <text:soft-page-break/>
      <text:p text:style-name="Normal">Creative industries.</text:p>
      <text:p text:style-name="Normal"/>
      <text:p text:style-name="Normal">No profession will remain untouched.</text:p>
      <text:p text:style-name="Normal"/>
      <text:p text:style-name="Normal">This transformation is creating thousands of new career opportunities while simultaneously making existing career paths more complex.</text:p>
      <text:p text:style-name="Normal"/>
      <text:p text:style-name="Normal">For the first time in history, the biggest challenge is no longer access to knowledge.</text:p>
      <text:p text:style-name="Normal"/>
      <text:p text:style-name="Normal">The biggest challenge is choosing the right direction.</text:p>
      <text:p text:style-name="Normal"/>
      <text:p text:style-name="Normal">---</text:p>
      <text:p text:style-name="Normal"/>
      <text:p text:style-name="Normal"># 2.3 Information Has Become a Problem</text:p>
      <text:p text:style-name="Normal"/>
      <text:p text:style-name="Normal">Twenty years ago people struggled because information was scarce.</text:p>
      <text:p text:style-name="Normal"/>
      <text:p text:style-name="Normal">Today they struggle because information is infinite.</text:p>
      <text:p text:style-name="Normal"/>
      <text:p text:style-name="Normal">A beginner searching for:</text:p>
      <text:p text:style-name="Normal"/>
      <text:p text:style-name="Normal">&gt; "How do I start learning AI?"</text:p>
      <text:p text:style-name="Normal"/>
      <text:p text:style-name="Normal">is immediately overwhelmed by:</text:p>
      <text:p text:style-name="Normal"/>
      <text:p text:style-name="Normal">• YouTube videos</text:p>
      <text:p text:style-name="Normal"/>
      <text:p text:style-name="Normal">• Reddit discussions</text:p>
      <text:p text:style-name="Normal"/>
      <text:p text:style-name="Normal">• Medium articles</text:p>
      <text:p text:style-name="Normal"/>
      <text:p text:style-name="Normal">• Blogs</text:p>
      <text:p text:style-name="Normal"/>
      <text:p text:style-name="Normal">• Online courses</text:p>
      <text:p text:style-name="Normal"/>
      <text:p text:style-name="Normal">• ChatGPT</text:p>
      <text:p text:style-name="Normal"/>
      <text:p text:style-name="Normal">• Claude</text:p>
      <text:p text:style-name="Normal"/>
      <text:p text:style-name="Normal">• Gemini</text:p>
      <text:p text:style-name="Normal"/>
      <text:p text:style-name="Normal">• LinkedIn posts</text:p>
      <text:p text:style-name="Normal"/>
      <text:p text:style-name="Normal">• GitHub repositories</text:p>
      <text:p text:style-name="Normal"/>
      <text:p text:style-name="Normal">• Roadmaps</text:p>
      <text:p text:style-name="Normal"/>
      <text:p text:style-name="Normal">• Podcasts</text:p>
      <text:p text:style-name="Normal"/>
      <text:p text:style-name="Normal">• Newsletters</text:p>
      <text:p text:style-name="Normal"/>
      <text:p text:style-name="Normal">Every source gives different advice.</text:p>
      <text:p text:style-name="Normal"/>
      <text:p text:style-name="Normal">Every expert recommends different tools.</text:p>
      <text:p text:style-name="Normal"/>
      <text:p text:style-name="Normal">Every roadmap looks different.</text:p>
      <text:p text:style-name="Normal"/>
      <text:p text:style-name="Normal">Instead of creating confidence...</text:p>
      <text:p text:style-name="Normal"/>
      <text:p text:style-name="Normal">Information creates confusion.</text:p>
      <text:p text:style-name="Normal"/>
      <text:p text:style-name="Normal">---</text:p>
      <text:p text:style-name="Normal"/>
      <text:p text:style-name="Normal"># 2.4 Analysis Paralysis</text:p>
      <text:p text:style-name="Normal"/>
      <text:p text:style-name="Normal">Most beginners never fail because AI is difficult.</text:p>
      <text:p text:style-name="Normal"/>
      <text:p text:style-name="Normal">They fail because they never know where to begin.</text:p>
      <text:p text:style-name="Normal"/>
      <text:p text:style-name="Normal">Typical user behavior looks like this:</text:p>
      <text:p text:style-name="Normal"/>
      <text:p text:style-name="Normal">Day 1</text:p>
      <text:p text:style-name="Normal"/>
      <text:p text:style-name="Normal">Watch YouTube.</text:p>
      <text:p text:style-name="Normal"/>
      <text:p text:style-name="Normal">Day 5</text:p>
      <text:p text:style-name="Normal"/>
      <text:p text:style-name="Normal">Buy a course.</text:p>
      <text:p text:style-name="Normal"/>
      <text:p text:style-name="Normal">Day 12</text:p>
      <text:p text:style-name="Normal"/>
      <text:p text:style-name="Normal">Switch to another course.</text:p>
      <text:p text:style-name="Normal"/>
      <text:p text:style-name="Normal">Day 20</text:p>
      <text:p text:style-name="Normal"/>
      <text:p text:style-name="Normal">Read Reddit.</text:p>
      <text:p text:style-name="Normal"/>
      <text:p text:style-name="Normal">Day 27</text:p>
      <text:p text:style-name="Normal"/>
      <text:p text:style-name="Normal">Ask ChatGPT.</text:p>
      <text:p text:style-name="Normal"/>
      <text:p text:style-name="Normal">Day 35</text:p>
      <text:p text:style-name="Normal"/>
      <text:p text:style-name="Normal">Watch another tutorial.</text:p>
      <text:p text:style-name="Normal"/>
      <text:p text:style-name="Normal">Day 48</text:p>
      <text:p text:style-name="Normal"/>
      <text:p text:style-name="Normal">Start Python.</text:p>
      <text:p text:style-name="Normal"/>
      <text:p text:style-name="Normal">Day 60</text:p>
      <text:p text:style-name="Normal"/>
      <text:p text:style-name="Normal">Switch to Prompt Engineering.</text:p>
      <text:p text:style-name="Normal"/>
      <text:p text:style-name="Normal">Day 75</text:p>
      <text:p text:style-name="Normal"/>
      <text:p text:style-name="Normal">Try Machine Learning.</text:p>
      <text:p text:style-name="Normal"/>
      <text:p text:style-name="Normal">Day 90</text:p>
      <text:p text:style-name="Normal"/>
      <text:p text:style-name="Normal">Quit.</text:p>
      <text:p text:style-name="Normal"/>
      <text:p text:style-name="Normal">This pattern repeats millions of times.</text:p>
      <text:p text:style-name="Normal"/>
      <text:p text:style-name="Normal">The internet has optimized for content consumption.</text:p>
      <text:p text:style-name="Normal"/>
      <text:p text:style-name="Normal">It has not optimized for career progression.</text:p>
      <text:p text:style-name="Normal"/>
      <text:p text:style-name="Normal">---</text:p>
      <text:p text:style-name="Normal"/>
      <text:p text:style-name="Normal"># 2.5 Roadmaps Solve Only One Problem</text:p>
      <text:p text:style-name="Normal"/>
      <text:p text:style-name="Normal">Current roadmap platforms answer one question:</text:p>
      <text:p text:style-name="Normal"/>
      <text:p text:style-name="Normal">"What should I learn?"</text:p>
      <text:p text:style-name="Normal"/>
      <text:p text:style-name="Normal">They rarely answer:</text:p>
      <text:p text:style-name="Normal"/>
      <text:p text:style-name="Normal">Should you learn this at all?</text:p>
      <text:p text:style-name="Normal"/>
      <text:p text:style-name="Normal">Is this career suitable for you?</text:p>
      <text:p text:style-name="Normal"/>
      <text:p text:style-name="Normal">How long will it take?</text:p>
      <text:p text:style-name="Normal"/>
      <text:p text:style-name="Normal">What projects should you build?</text:p>
      <text:p text:style-name="Normal"/>
      <text:p text:style-name="Normal">What skills do you already have?</text:p>
      <text:p text:style-name="Normal"/>
      <text:p text:style-name="Normal">What skills are transferable?</text:p>
      <text:p text:style-name="Normal"/>
      <text:p text:style-name="Normal">What should you skip?</text:p>
      <text:p text:style-name="Normal"/>
      <text:p text:style-name="Normal">What is the fastest path based on YOUR experience?</text:p>
      <text:p text:style-name="Normal"/>
      <text:p text:style-name="Normal">AI Career OS answers all of these.</text:p>
      <text:p text:style-name="Normal"/>
      <text:p text:style-name="Normal"/>
      <text:p text:style-name="Normal"># 2.6 Existing Products Are Fragmented</text:p>
      <text:p text:style-name="Normal"/>
      <text:p text:style-name="Normal">Today's users combine many different tools.</text:p>
      <text:p text:style-name="Normal"/>
      <text:p text:style-name="Normal">For example:</text:p>
      <text:p text:style-name="Normal"/>
      <text:p text:style-name="Normal">ChatGPT</text:p>
      <text:p text:style-name="Normal"/>
      <text:p text:style-name="Normal">↓</text:p>
      <text:p text:style-name="Normal"/>
      <text:p text:style-name="Normal">Roadmap.sh</text:p>
      <text:p text:style-name="Normal"/>
      <text:p text:style-name="Normal">↓</text:p>
      <text:p text:style-name="Normal"/>
      <text:p text:style-name="Normal">Coursera</text:p>
      <text:p text:style-name="Normal"/>
      <text:p text:style-name="Normal">↓</text:p>
      <text:p text:style-name="Normal"/>
      <text:p text:style-name="Normal">YouTube</text:p>
      <text:p text:style-name="Normal"/>
      <text:p text:style-name="Normal">↓</text:p>
      <text:p text:style-name="Normal"/>
      <text:soft-page-break/>
      <text:p text:style-name="Normal">LinkedIn</text:p>
      <text:p text:style-name="Normal"/>
      <text:p text:style-name="Normal">↓</text:p>
      <text:p text:style-name="Normal"/>
      <text:p text:style-name="Normal">GitHub</text:p>
      <text:p text:style-name="Normal"/>
      <text:p text:style-name="Normal">↓</text:p>
      <text:p text:style-name="Normal"/>
      <text:p text:style-name="Normal">Notion</text:p>
      <text:p text:style-name="Normal"/>
      <text:p text:style-name="Normal">↓</text:p>
      <text:p text:style-name="Normal"/>
      <text:p text:style-name="Normal">Google Docs</text:p>
      <text:p text:style-name="Normal"/>
      <text:p text:style-name="Normal">↓</text:p>
      <text:p text:style-name="Normal"/>
      <text:p text:style-name="Normal">CV Builder</text:p>
      <text:p text:style-name="Normal"/>
      <text:p text:style-name="Normal">↓</text:p>
      <text:p text:style-name="Normal"/>
      <text:p text:style-name="Normal">Job Boards</text:p>
      <text:p text:style-name="Normal"/>
      <text:p text:style-name="Normal">↓</text:p>
      <text:p text:style-name="Normal"/>
      <text:p text:style-name="Normal">Excel</text:p>
      <text:p text:style-name="Normal"/>
      <text:p text:style-name="Normal">↓</text:p>
      <text:p text:style-name="Normal"/>
      <text:soft-page-break/>
      <text:p text:style-name="Normal">Bookmarks</text:p>
      <text:p text:style-name="Normal"/>
      <text:p text:style-name="Normal">↓</text:p>
      <text:p text:style-name="Normal"/>
      <text:p text:style-name="Normal">Notes</text:p>
      <text:p text:style-name="Normal"/>
      <text:p text:style-name="Normal">↓</text:p>
      <text:p text:style-name="Normal"/>
      <text:p text:style-name="Normal">Repeat</text:p>
      <text:p text:style-name="Normal"/>
      <text:p text:style-name="Normal">Each product solves one tiny problem.</text:p>
      <text:p text:style-name="Normal"/>
      <text:p text:style-name="Normal">None of them orchestrate the entire journey.</text:p>
      <text:p text:style-name="Normal"/>
      <text:p text:style-name="Normal">AI Career OS becomes the layer that connects them all.</text:p>
      <text:p text:style-name="Normal"/>
      <text:p text:style-name="Normal">---</text:p>
      <text:p text:style-name="Normal"/>
      <text:p text:style-name="Normal"># 2.7 The Opportunity</text:p>
      <text:p text:style-name="Normal"/>
      <text:p text:style-name="Normal">Artificial Intelligence is creating one of the largest educational and professional transitions in history.</text:p>
      <text:p text:style-name="Normal"/>
      <text:p text:style-name="Normal">Hundreds of millions of professionals will need guidance.</text:p>
      <text:p text:style-name="Normal"/>
      <text:p text:style-name="Normal">Students.</text:p>
      <text:p text:style-name="Normal"/>
      <text:p text:style-name="Normal">Career changers.</text:p>
      <text:p text:style-name="Normal"/>
      <text:p text:style-name="Normal">Developers.</text:p>
      <text:p text:style-name="Normal"/>
      <text:p text:style-name="Normal">Designers.</text:p>
      <text:p text:style-name="Normal"/>
      <text:p text:style-name="Normal">Managers.</text:p>
      <text:p text:style-name="Normal"/>
      <text:p text:style-name="Normal">Marketers.</text:p>
      <text:p text:style-name="Normal"/>
      <text:p text:style-name="Normal">Analysts.</text:p>
      <text:p text:style-name="Normal"/>
      <text:p text:style-name="Normal">Entrepreneurs.</text:p>
      <text:p text:style-name="Normal"/>
      <text:p text:style-name="Normal">The demand is no longer for information.</text:p>
      <text:p text:style-name="Normal"/>
      <text:p text:style-name="Normal">The demand is for trusted guidance.</text:p>
      <text:p text:style-name="Normal"/>
      <text:p text:style-name="Normal">This is where AI Career OS creates value.</text:p>
      <text:p text:style-name="Normal"/>
      <text:p text:style-name="Normal">---</text:p>
      <text:p text:style-name="Normal"/>
      <text:p text:style-name="Normal"># 2.8 Why Existing Solutions Fail</text:p>
      <text:p text:style-name="Normal"/>
      <text:p text:style-name="Normal">Current products generally fail because they focus on content instead of outcomes.</text:p>
      <text:p text:style-name="Normal"/>
      <text:p text:style-name="Normal">Examples:</text:p>
      <text:p text:style-name="Normal"/>
      <text:p text:style-name="Normal">Course Platforms</text:p>
      <text:p text:style-name="Normal"/>
      <text:p text:style-name="Normal">→ Sell education.</text:p>
      <text:p text:style-name="Normal"/>
      <text:p text:style-name="Normal">Roadmap Websites</text:p>
      <text:p text:style-name="Normal"/>
      <text:p text:style-name="Normal">→ Organize topics.</text:p>
      <text:p text:style-name="Normal"/>
      <text:p text:style-name="Normal">YouTube</text:p>
      <text:p text:style-name="Normal"/>
      <text:p text:style-name="Normal">→ Maximizes watch time.</text:p>
      <text:p text:style-name="Normal"/>
      <text:p text:style-name="Normal">Chatbots</text:p>
      <text:p text:style-name="Normal"/>
      <text:p text:style-name="Normal">→ Answer questions.</text:p>
      <text:p text:style-name="Normal"/>
      <text:p text:style-name="Normal">Job Boards</text:p>
      <text:p text:style-name="Normal"/>
      <text:p text:style-name="Normal">→ List vacancies.</text:p>
      <text:p text:style-name="Normal"/>
      <text:p text:style-name="Normal">None of these products own the complete journey.</text:p>
      <text:p text:style-name="Normal"/>
      <text:p text:style-name="Normal">They solve isolated problems.</text:p>
      <text:p text:style-name="Normal"/>
      <text:p text:style-name="Normal">The user remains responsible for connecting everything together.</text:p>
      <text:p text:style-name="Normal"/>
      <text:p text:style-name="Normal">AI Career OS removes that burden.</text:p>
      <text:p text:style-name="Normal"/>
      <text:p text:style-name="Normal">---</text:p>
      <text:p text:style-name="Normal"/>
      <text:p text:style-name="Normal"># 2.9 Our Opportunity</text:p>
      <text:p text:style-name="Normal"/>
      <text:p text:style-name="Normal">Instead of asking users:</text:p>
      <text:p text:style-name="Normal"/>
      <text:p text:style-name="Normal">"What do you want to learn?"</text:p>
      <text:p text:style-name="Normal"/>
      <text:p text:style-name="Normal">We ask:</text:p>
      <text:p text:style-name="Normal"/>
      <text:p text:style-name="Normal">"Who are you?"</text:p>
      <text:p text:style-name="Normal"/>
      <text:p text:style-name="Normal">Everything begins there.</text:p>
      <text:p text:style-name="Normal"/>
      <text:p text:style-name="Normal">Experience.</text:p>
      <text:p text:style-name="Normal"/>
      <text:p text:style-name="Normal">Personality.</text:p>
      <text:p text:style-name="Normal"/>
      <text:p text:style-name="Normal">Goals.</text:p>
      <text:p text:style-name="Normal"/>
      <text:p text:style-name="Normal">Strengths.</text:p>
      <text:p text:style-name="Normal"/>
      <text:p text:style-name="Normal">Weaknesses.</text:p>
      <text:p text:style-name="Normal"/>
      <text:p text:style-name="Normal">Learning style.</text:p>
      <text:p text:style-name="Normal"/>
      <text:p text:style-name="Normal">Career interests.</text:p>
      <text:p text:style-name="Normal"/>
      <text:p text:style-name="Normal">Time availability.</text:p>
      <text:p text:style-name="Normal"/>
      <text:p text:style-name="Normal">Background.</text:p>
      <text:p text:style-name="Normal"/>
      <text:p text:style-name="Normal">Only after understanding the person does the platform recommend a career.</text:p>
      <text:p text:style-name="Normal"/>
      <text:p text:style-name="Normal">This reverses the traditional education model.</text:p>
      <text:p text:style-name="Normal"/>
      <text:p text:style-name="Normal">---</text:p>
      <text:p text:style-name="Normal"/>
      <text:p text:style-name="Normal"># 2.10 Problem Statement</text:p>
      <text:p text:style-name="Normal"/>
      <text:p text:style-name="Normal">People do not struggle because Artificial Intelligence is difficult.</text:p>
      <text:p text:style-name="Normal"/>
      <text:p text:style-name="Normal">People struggle because they lack clarity.</text:p>
      <text:p text:style-name="Normal"/>
      <text:p text:style-name="Normal">The internet provides unlimited information.</text:p>
      <text:p text:style-name="Normal"/>
      <text:p text:style-name="Normal">But it does not provide personalized direction.</text:p>
      <text:p text:style-name="Normal"/>
      <text:p text:style-name="Normal">AI Career OS exists to transform scattered information into a structured, intelligent, adaptive career journey.</text:p>
      <text:p text:style-name="Normal"/>
      <text:p text:style-name="Normal">This is the problem the product is built to solve.</text:p>
      <text:p text:style-name="Normal"/>
      <text:p text:style-name="Normal">---</text:p>
      <text:p text:style-name="Normal"/>
      <text:p text:style-name="Normal"># End of Volume 2</text:p>
      <text:p text:style-name="Normal"/>
      <text:soft-page-break/>
      <text:p text:style-name="Normal">**Next Volume:** Vision</text:p>
      <text:p text:style-name="Normal"/>
      <text:p text:style-name="Normal">#<text:s/><text:span text:style-name="T33">📘</text:span><text:s/>Volume 3</text:p>
      <text:p text:style-name="Normal"/>
      <text:p text:style-name="Normal"># Vision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3.1 Our Vision</text:p>
      <text:p text:style-name="Normal"/>
      <text:p text:style-name="Normal">Artificial Intelligence will become one of the most important skills of the 21st century.</text:p>
      <text:p text:style-name="Normal"/>
      <text:p text:style-name="Normal">Within the next decade, nearly every profession will either use AI directly or collaborate with AI-powered systems.</text:p>
      <text:p text:style-name="Normal"/>
      <text:p text:style-name="Normal">As a result, choosing an AI career will become one of the most important decisions millions of people make.</text:p>
      <text:p text:style-name="Normal"/>
      <text:p text:style-name="Normal">Unfortunately, the process of entering AI today is fragmented, confusing, and overwhelming.</text:p>
      <text:p text:style-name="Normal"/>
      <text:p text:style-name="Normal">Our vision is to fundamentally change that experience.</text:p>
      <text:p text:style-name="Normal"/>
      <text:p text:style-name="Normal">We envision a future where every person, regardless of their background, can confidently discover, prepare for, and succeed in an AI career through one intelligent platform.</text:p>
      <text:p text:style-name="Normal"/>
      <text:soft-page-break/>
      <text:p text:style-name="Normal">AI Career OS exists to become that platform.</text:p>
      <text:p text:style-name="Normal"/>
      <text:p text:style-name="Normal">---</text:p>
      <text:p text:style-name="Normal"/>
      <text:p text:style-name="Normal"># 3.2 Beyond a Website</text:p>
      <text:p text:style-name="Normal"/>
      <text:p text:style-name="Normal">We are not building another educational website.</text:p>
      <text:p text:style-name="Normal"/>
      <text:p text:style-name="Normal">We are not building another learning platform.</text:p>
      <text:p text:style-name="Normal"/>
      <text:p text:style-name="Normal">We are not building another chatbot.</text:p>
      <text:p text:style-name="Normal"/>
      <text:p text:style-name="Normal">We are not building another roadmap directory.</text:p>
      <text:p text:style-name="Normal"/>
      <text:p text:style-name="Normal">We are building an intelligent operating system dedicated to one mission:</text:p>
      <text:p text:style-name="Normal"/>
      <text:p text:style-name="Normal">Helping people successfully build AI careers.</text:p>
      <text:p text:style-name="Normal"/>
      <text:p text:style-name="Normal">This distinction changes every design decision.</text:p>
      <text:p text:style-name="Normal"/>
      <text:p text:style-name="Normal">Traditional websites provide information.</text:p>
      <text:p text:style-name="Normal"/>
      <text:p text:style-name="Normal">AI Career OS provides direction.</text:p>
      <text:p text:style-name="Normal"/>
      <text:p text:style-name="Normal">Traditional products answer questions.</text:p>
      <text:p text:style-name="Normal"/>
      <text:p text:style-name="Normal">AI Career OS guides long-term decisions.</text:p>
      <text:p text:style-name="Normal"/>
      <text:soft-page-break/>
      <text:p text:style-name="Normal">Traditional platforms measure engagement.</text:p>
      <text:p text:style-name="Normal"/>
      <text:p text:style-name="Normal">AI Career OS measures career success.</text:p>
      <text:p text:style-name="Normal"/>
      <text:p text:style-name="Normal">---</text:p>
      <text:p text:style-name="Normal"/>
      <text:p text:style-name="Normal"># 3.3 A New Category</text:p>
      <text:p text:style-name="Normal"/>
      <text:p text:style-name="Normal">The market currently contains:</text:p>
      <text:p text:style-name="Normal"/>
      <text:p text:style-name="Normal">Learning Platforms</text:p>
      <text:p text:style-name="Normal"/>
      <text:p text:style-name="Normal">↓</text:p>
      <text:p text:style-name="Normal"/>
      <text:p text:style-name="Normal">Roadmap Websites</text:p>
      <text:p text:style-name="Normal"/>
      <text:p text:style-name="Normal">↓</text:p>
      <text:p text:style-name="Normal"/>
      <text:p text:style-name="Normal">AI Chatbots</text:p>
      <text:p text:style-name="Normal"/>
      <text:p text:style-name="Normal">↓</text:p>
      <text:p text:style-name="Normal"/>
      <text:p text:style-name="Normal">Career Coaches</text:p>
      <text:p text:style-name="Normal"/>
      <text:p text:style-name="Normal">↓</text:p>
      <text:p text:style-name="Normal"/>
      <text:p text:style-name="Normal">Job Boards</text:p>
      <text:p text:style-name="Normal"/>
      <text:soft-page-break/>
      <text:p text:style-name="Normal">↓</text:p>
      <text:p text:style-name="Normal"/>
      <text:p text:style-name="Normal">Resume Builders</text:p>
      <text:p text:style-name="Normal"/>
      <text:p text:style-name="Normal">↓</text:p>
      <text:p text:style-name="Normal"/>
      <text:p text:style-name="Normal">Portfolio Platforms</text:p>
      <text:p text:style-name="Normal"/>
      <text:p text:style-name="Normal">↓</text:p>
      <text:p text:style-name="Normal"/>
      <text:p text:style-name="Normal">Communities</text:p>
      <text:p text:style-name="Normal"/>
      <text:p text:style-name="Normal">↓</text:p>
      <text:p text:style-name="Normal"/>
      <text:p text:style-name="Normal">Blogs</text:p>
      <text:p text:style-name="Normal"/>
      <text:p text:style-name="Normal">Each category solves one piece of the puzzle.</text:p>
      <text:p text:style-name="Normal"/>
      <text:p text:style-name="Normal">None solves the entire journey.</text:p>
      <text:p text:style-name="Normal"/>
      <text:p text:style-name="Normal">AI Career OS creates an entirely new product category.</text:p>
      <text:p text:style-name="Normal"/>
      <text:p text:style-name="Normal">**AI Career Operating System**</text:p>
      <text:p text:style-name="Normal"/>
      <text:p text:style-name="Normal">Instead of replacing these products, it intelligently orchestrates them into one unified experience.</text:p>
      <text:p text:style-name="Normal"/>
      <text:p text:style-name="Normal">---</text:p>
      <text:p text:style-name="Normal"/>
      <text:p text:style-name="Normal"># 3.4 The Future of Career Development</text:p>
      <text:p text:style-name="Normal"/>
      <text:p text:style-name="Normal">Career development is changing.</text:p>
      <text:p text:style-name="Normal"/>
      <text:p text:style-name="Normal">Historically, people followed a relatively linear path.</text:p>
      <text:p text:style-name="Normal"/>
      <text:p text:style-name="Normal">Education</text:p>
      <text:p text:style-name="Normal"/>
      <text:p text:style-name="Normal">↓</text:p>
      <text:p text:style-name="Normal"/>
      <text:p text:style-name="Normal">Job</text:p>
      <text:p text:style-name="Normal"/>
      <text:p text:style-name="Normal">↓</text:p>
      <text:p text:style-name="Normal"/>
      <text:p text:style-name="Normal">Promotion</text:p>
      <text:p text:style-name="Normal"/>
      <text:p text:style-name="Normal">↓</text:p>
      <text:p text:style-name="Normal"/>
      <text:p text:style-name="Normal">Retirement</text:p>
      <text:p text:style-name="Normal"/>
      <text:p text:style-name="Normal">That model no longer exists.</text:p>
      <text:p text:style-name="Normal"/>
      <text:p text:style-name="Normal">Modern careers evolve continuously.</text:p>
      <text:p text:style-name="Normal"/>
      <text:p text:style-name="Normal">People change industries.</text:p>
      <text:p text:style-name="Normal"/>
      <text:p text:style-name="Normal">Technologies evolve.</text:p>
      <text:p text:style-name="Normal"/>
      <text:p text:style-name="Normal">New professions emerge.</text:p>
      <text:p text:style-name="Normal"/>
      <text:p text:style-name="Normal">Existing roles disappear.</text:p>
      <text:p text:style-name="Normal"/>
      <text:p text:style-name="Normal">Learning never stops.</text:p>
      <text:p text:style-name="Normal"/>
      <text:p text:style-name="Normal">Career planning is becoming a lifelong process.</text:p>
      <text:p text:style-name="Normal"/>
      <text:p text:style-name="Normal">AI Career OS is designed for lifelong career evolution rather than one-time career selection.</text:p>
      <text:p text:style-name="Normal"/>
      <text:p text:style-name="Normal">---</text:p>
      <text:p text:style-name="Normal"/>
      <text:p text:style-name="Normal"># 3.5 Every User Has a Different Journey</text:p>
      <text:p text:style-name="Normal"/>
      <text:p text:style-name="Normal">No two people should receive identical guidance.</text:p>
      <text:p text:style-name="Normal"/>
      <text:p text:style-name="Normal">A software engineer entering AI requires a completely different roadmap than:</text:p>
      <text:p text:style-name="Normal"/>
      <text:p text:style-name="Normal">• A marketer</text:p>
      <text:p text:style-name="Normal"/>
      <text:p text:style-name="Normal">• A financial analyst</text:p>
      <text:p text:style-name="Normal"/>
      <text:p text:style-name="Normal">• A teacher</text:p>
      <text:p text:style-name="Normal"/>
      <text:p text:style-name="Normal">• A designer</text:p>
      <text:p text:style-name="Normal"/>
      <text:soft-page-break/>
      <text:p text:style-name="Normal">• A student</text:p>
      <text:p text:style-name="Normal"/>
      <text:p text:style-name="Normal">• A mechanical engineer</text:p>
      <text:p text:style-name="Normal"/>
      <text:p text:style-name="Normal">• A project manager</text:p>
      <text:p text:style-name="Normal"/>
      <text:p text:style-name="Normal">• A healthcare professional</text:p>
      <text:p text:style-name="Normal"/>
      <text:p text:style-name="Normal">The platform should understand these differences automatically.</text:p>
      <text:p text:style-name="Normal"/>
      <text:p text:style-name="Normal">Every recommendation should reflect the individual's unique background.</text:p>
      <text:p text:style-name="Normal"/>
      <text:p text:style-name="Normal">Personalization is not a feature.</text:p>
      <text:p text:style-name="Normal"/>
      <text:p text:style-name="Normal">It is the foundation of the product.</text:p>
      <text:p text:style-name="Normal"/>
      <text:p text:style-name="Normal">---</text:p>
      <text:p text:style-name="Normal"/>
      <text:p text:style-name="Normal"># 3.6 Intelligence Before Information</text:p>
      <text:p text:style-name="Normal"/>
      <text:p text:style-name="Normal">Most digital products focus on storing information.</text:p>
      <text:p text:style-name="Normal"/>
      <text:p text:style-name="Normal">AI Career OS focuses on generating intelligence.</text:p>
      <text:p text:style-name="Normal"/>
      <text:p text:style-name="Normal">Information answers:</text:p>
      <text:p text:style-name="Normal"/>
      <text:p text:style-name="Normal">"What is Prompt Engineering?"</text:p>
      <text:p text:style-name="Normal"/>
      <text:soft-page-break/>
      <text:p text:style-name="Normal">Intelligence answers:</text:p>
      <text:p text:style-name="Normal"/>
      <text:p text:style-name="Normal">"Should YOU become a Prompt Engineer?"</text:p>
      <text:p text:style-name="Normal"/>
      <text:p text:style-name="Normal">Information explains Python.</text:p>
      <text:p text:style-name="Normal"/>
      <text:p text:style-name="Normal">Intelligence determines whether Python should be your first priority.</text:p>
      <text:p text:style-name="Normal"/>
      <text:p text:style-name="Normal">Information is static.</text:p>
      <text:p text:style-name="Normal"/>
      <text:p text:style-name="Normal">Intelligence is contextual.</text:p>
      <text:p text:style-name="Normal"/>
      <text:p text:style-name="Normal">This difference defines the platform.</text:p>
      <text:p text:style-name="Normal"/>
      <text:p text:style-name="Normal">---</text:p>
      <text:p text:style-name="Normal"/>
      <text:p text:style-name="Normal"># 3.7 Human-Centered Artificial Intelligence</text:p>
      <text:p text:style-name="Normal"/>
      <text:p text:style-name="Normal">Artificial Intelligence should never replace human ambition.</text:p>
      <text:p text:style-name="Normal"/>
      <text:p text:style-name="Normal">Instead, AI should amplify human potential.</text:p>
      <text:p text:style-name="Normal"/>
      <text:p text:style-name="Normal">Every recommendation should make users feel:</text:p>
      <text:p text:style-name="Normal"/>
      <text:p text:style-name="Normal">"I understand myself better."</text:p>
      <text:p text:style-name="Normal"/>
      <text:p text:style-name="Normal">"I know what to do next."</text:p>
      <text:p text:style-name="Normal"/>
      <text:soft-page-break/>
      <text:p text:style-name="Normal">"I feel confident."</text:p>
      <text:p text:style-name="Normal"/>
      <text:p text:style-name="Normal">"I am making progress."</text:p>
      <text:p text:style-name="Normal"/>
      <text:p text:style-name="Normal">The platform should never make users dependent on AI.</text:p>
      <text:p text:style-name="Normal"/>
      <text:p text:style-name="Normal">Its purpose is to make users more capable, more confident, and more independent over time.</text:p>
      <text:p text:style-name="Normal"/>
      <text:p text:style-name="Normal">---</text:p>
      <text:p text:style-name="Normal"/>
      <text:p text:style-name="Normal"># 3.8 Vision for the User Experience</text:p>
      <text:p text:style-name="Normal"/>
      <text:p text:style-name="Normal">Imagine opening AI Career OS for the first time.</text:p>
      <text:p text:style-name="Normal"/>
      <text:p text:style-name="Normal">Instead of seeing another landing page...</text:p>
      <text:p text:style-name="Normal"/>
      <text:p text:style-name="Normal">You enter an intelligent environment.</text:p>
      <text:p text:style-name="Normal"/>
      <text:p text:style-name="Normal">The interface feels alive.</text:p>
      <text:p text:style-name="Normal"/>
      <text:p text:style-name="Normal">The system welcomes you.</text:p>
      <text:p text:style-name="Normal"/>
      <text:p text:style-name="Normal">It asks about your goals.</text:p>
      <text:p text:style-name="Normal"/>
      <text:p text:style-name="Normal">Your experience.</text:p>
      <text:p text:style-name="Normal"/>
      <text:p text:style-name="Normal">Your interests.</text:p>
      <text:p text:style-name="Normal"/>
      <text:p text:style-name="Normal">Your aspirations.</text:p>
      <text:p text:style-name="Normal"/>
      <text:p text:style-name="Normal">Within minutes...</text:p>
      <text:p text:style-name="Normal"/>
      <text:p text:style-name="Normal">The platform begins constructing your personal AI career strategy.</text:p>
      <text:p text:style-name="Normal"/>
      <text:p text:style-name="Normal">Not a generic roadmap.</text:p>
      <text:p text:style-name="Normal"/>
      <text:p text:style-name="Normal">Your roadmap.</text:p>
      <text:p text:style-name="Normal"/>
      <text:p text:style-name="Normal">Not a generic dashboard.</text:p>
      <text:p text:style-name="Normal"/>
      <text:p text:style-name="Normal">Your dashboard.</text:p>
      <text:p text:style-name="Normal"/>
      <text:p text:style-name="Normal">Not generic recommendations.</text:p>
      <text:p text:style-name="Normal"/>
      <text:p text:style-name="Normal">Recommendations designed specifically for you.</text:p>
      <text:p text:style-name="Normal"/>
      <text:p text:style-name="Normal">This is the experience we want every user to remember.</text:p>
      <text:p text:style-name="Normal"/>
      <text:p text:style-name="Normal">---</text:p>
      <text:p text:style-name="Normal"/>
      <text:p text:style-name="Normal"># 3.9 Vision for the AI Experience</text:p>
      <text:p text:style-name="Normal"/>
      <text:p text:style-name="Normal">Artificial Intelligence should feel like an experienced mentor.</text:p>
      <text:p text:style-name="Normal"/>
      <text:p text:style-name="Normal">Never like an automated assistant.</text:p>
      <text:p text:style-name="Normal"/>
      <text:p text:style-name="Normal">The AI should:</text:p>
      <text:p text:style-name="Normal"/>
      <text:p text:style-name="Normal">Understand context.</text:p>
      <text:p text:style-name="Normal"/>
      <text:p text:style-name="Normal">Remember previous conversations.</text:p>
      <text:p text:style-name="Normal"/>
      <text:p text:style-name="Normal">Recognize progress.</text:p>
      <text:p text:style-name="Normal"/>
      <text:p text:style-name="Normal">Celebrate achievements.</text:p>
      <text:p text:style-name="Normal"/>
      <text:p text:style-name="Normal">Identify weaknesses.</text:p>
      <text:p text:style-name="Normal"/>
      <text:p text:style-name="Normal">Recommend next steps.</text:p>
      <text:p text:style-name="Normal"/>
      <text:p text:style-name="Normal">Challenge assumptions.</text:p>
      <text:p text:style-name="Normal"/>
      <text:p text:style-name="Normal">Encourage consistency.</text:p>
      <text:p text:style-name="Normal"/>
      <text:p text:style-name="Normal">Adapt to changing goals.</text:p>
      <text:p text:style-name="Normal"/>
      <text:p text:style-name="Normal">The AI should become a trusted long-term companion throughout the user's career journey.</text:p>
      <text:p text:style-name="Normal"/>
      <text:p text:style-name="Normal">---</text:p>
      <text:p text:style-name="Normal"/>
      <text:p text:style-name="Normal"># 3.10 Vision for the Future</text:p>
      <text:p text:style-name="Normal"/>
      <text:soft-page-break/>
      <text:p text:style-name="Normal">Our long-term vision extends beyond helping users get their first AI job.</text:p>
      <text:p text:style-name="Normal"/>
      <text:p text:style-name="Normal">AI Career OS should remain valuable throughout an entire professional career.</text:p>
      <text:p text:style-name="Normal"/>
      <text:p text:style-name="Normal">As users grow...</text:p>
      <text:p text:style-name="Normal"/>
      <text:p text:style-name="Normal">The platform grows.</text:p>
      <text:p text:style-name="Normal"/>
      <text:p text:style-name="Normal">As industries evolve...</text:p>
      <text:p text:style-name="Normal"/>
      <text:p text:style-name="Normal">The platform evolves.</text:p>
      <text:p text:style-name="Normal"/>
      <text:p text:style-name="Normal">As Artificial Intelligence changes...</text:p>
      <text:p text:style-name="Normal"/>
      <text:p text:style-name="Normal">The platform adapts.</text:p>
      <text:p text:style-name="Normal"/>
      <text:p text:style-name="Normal">The relationship between the user and the platform should last years—not days.</text:p>
      <text:p text:style-name="Normal"/>
      <text:p text:style-name="Normal">The ultimate vision is simple:</text:p>
      <text:p text:style-name="Normal"/>
      <text:p text:style-name="Normal">Whenever someone thinks about building, improving, or transforming an AI career, the first product they think of should be AI Career OS.</text:p>
      <text:p text:style-name="Normal"/>
      <text:p text:style-name="Normal">---</text:p>
      <text:p text:style-name="Normal"/>
      <text:p text:style-name="Normal"># Vision Statement</text:p>
      <text:p text:style-name="Normal"/>
      <text:soft-page-break/>
      <text:p text:style-name="Normal">**We envision a world where every person has access to an intelligent AI career companion that understands who they are, guides where they should go, and helps them confidently build a meaningful future in Artificial Intelligence.**</text:p>
      <text:p text:style-name="Normal"/>
      <text:p text:style-name="Normal">This vision should inspire every future feature, every design decision, every AI interaction, and every line of code.</text:p>
      <text:p text:style-name="Normal"/>
      <text:p text:style-name="Normal">---</text:p>
      <text:p text:style-name="Normal"/>
      <text:p text:style-name="Normal"># End of Volume 3</text:p>
      <text:p text:style-name="Normal"/>
      <text:p text:style-name="Normal">**Next Volume:** Mission</text:p>
      <text:p text:style-name="Normal"/>
      <text:p text:style-name="Normal">#<text:s/><text:span text:style-name="T34">📘</text:span><text:s/>Volume 4</text:p>
      <text:p text:style-name="Normal"/>
      <text:p text:style-name="Normal"># Mission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4.1 Our Mission</text:p>
      <text:p text:style-name="Normal"/>
      <text:p text:style-name="Normal">The mission of AI Career OS is simple:</text:p>
      <text:p text:style-name="Normal"/>
      <text:p text:style-name="Normal">**Help every person confidently discover, prepare for, and succeed in an Artificial Intelligence career through personalized AI guidance.**</text:p>
      <text:p text:style-name="Normal"/>
      <text:p text:style-name="Normal">Everything inside the platform should support this mission.</text:p>
      <text:p text:style-name="Normal"/>
      <text:p text:style-name="Normal">Every recommendation.</text:p>
      <text:p text:style-name="Normal"/>
      <text:p text:style-name="Normal">Every roadmap.</text:p>
      <text:p text:style-name="Normal"/>
      <text:p text:style-name="Normal">Every AI conversation.</text:p>
      <text:p text:style-name="Normal"/>
      <text:p text:style-name="Normal">Every dashboard.</text:p>
      <text:p text:style-name="Normal"/>
      <text:p text:style-name="Normal">Every animation.</text:p>
      <text:p text:style-name="Normal"/>
      <text:p text:style-name="Normal">Every future feature.</text:p>
      <text:p text:style-name="Normal"/>
      <text:p text:style-name="Normal">The mission should never become diluted by adding features that do not contribute to career success.</text:p>
      <text:p text:style-name="Normal"/>
      <text:p text:style-name="Normal">---</text:p>
      <text:p text:style-name="Normal"/>
      <text:p text:style-name="Normal"># 4.2 Why Our Mission Matters</text:p>
      <text:p text:style-name="Normal"/>
      <text:p text:style-name="Normal">Artificial Intelligence is creating opportunities faster than people can understand them.</text:p>
      <text:p text:style-name="Normal"/>
      <text:p text:style-name="Normal">Most people do not lack intelligence.</text:p>
      <text:p text:style-name="Normal"/>
      <text:p text:style-name="Normal">They lack direction.</text:p>
      <text:p text:style-name="Normal"/>
      <text:p text:style-name="Normal">The internet already contains enough information.</text:p>
      <text:p text:style-name="Normal"/>
      <text:soft-page-break/>
      <text:p text:style-name="Normal">People do not need another course.</text:p>
      <text:p text:style-name="Normal"/>
      <text:p text:style-name="Normal">Another article.</text:p>
      <text:p text:style-name="Normal"/>
      <text:p text:style-name="Normal">Another YouTube video.</text:p>
      <text:p text:style-name="Normal"/>
      <text:p text:style-name="Normal">Another roadmap.</text:p>
      <text:p text:style-name="Normal"/>
      <text:p text:style-name="Normal">They need confidence.</text:p>
      <text:p text:style-name="Normal"/>
      <text:p text:style-name="Normal">They need clarity.</text:p>
      <text:p text:style-name="Normal"/>
      <text:p text:style-name="Normal">They need a trusted guide.</text:p>
      <text:p text:style-name="Normal"/>
      <text:p text:style-name="Normal">Our mission is to become that guide.</text:p>
      <text:p text:style-name="Normal"/>
      <text:p text:style-name="Normal">---</text:p>
      <text:p text:style-name="Normal"/>
      <text:p text:style-name="Normal"># 4.3 The Transformation</text:p>
      <text:p text:style-name="Normal"/>
      <text:p text:style-name="Normal">Every great product transforms people from one state into another.</text:p>
      <text:p text:style-name="Normal"/>
      <text:p text:style-name="Normal">AI Career OS transforms users from:</text:p>
      <text:p text:style-name="Normal"/>
      <text:p text:style-name="Normal">Confused</text:p>
      <text:p text:style-name="Normal"/>
      <text:p text:style-name="Normal">↓</text:p>
      <text:p text:style-name="Normal"/>
      <text:soft-page-break/>
      <text:p text:style-name="Normal">Curious</text:p>
      <text:p text:style-name="Normal"/>
      <text:p text:style-name="Normal">↓</text:p>
      <text:p text:style-name="Normal"/>
      <text:p text:style-name="Normal">Focused</text:p>
      <text:p text:style-name="Normal"/>
      <text:p text:style-name="Normal">↓</text:p>
      <text:p text:style-name="Normal"/>
      <text:p text:style-name="Normal">Learning</text:p>
      <text:p text:style-name="Normal"/>
      <text:p text:style-name="Normal">↓</text:p>
      <text:p text:style-name="Normal"/>
      <text:p text:style-name="Normal">Building</text:p>
      <text:p text:style-name="Normal"/>
      <text:p text:style-name="Normal">↓</text:p>
      <text:p text:style-name="Normal"/>
      <text:p text:style-name="Normal">Growing</text:p>
      <text:p text:style-name="Normal"/>
      <text:p text:style-name="Normal">↓</text:p>
      <text:p text:style-name="Normal"/>
      <text:p text:style-name="Normal">Job Ready</text:p>
      <text:p text:style-name="Normal"/>
      <text:p text:style-name="Normal">↓</text:p>
      <text:p text:style-name="Normal"/>
      <text:p text:style-name="Normal">Professionally Successful</text:p>
      <text:p text:style-name="Normal"/>
      <text:p text:style-name="Normal">The product exists to enable this transformation.</text:p>
      <text:p text:style-name="Normal"/>
      <text:soft-page-break/>
      <text:p text:style-name="Normal">Not simply to provide educational content.</text:p>
      <text:p text:style-name="Normal"/>
      <text:p text:style-name="Normal">---</text:p>
      <text:p text:style-name="Normal"/>
      <text:p text:style-name="Normal"># 4.4 Our Responsibility</text:p>
      <text:p text:style-name="Normal"/>
      <text:p text:style-name="Normal">Because users will trust AI Career OS with important career decisions, we have a responsibility.</text:p>
      <text:p text:style-name="Normal"/>
      <text:p text:style-name="Normal">We must:</text:p>
      <text:p text:style-name="Normal"/>
      <text:p text:style-name="Normal">Provide accurate information.</text:p>
      <text:p text:style-name="Normal"/>
      <text:p text:style-name="Normal">Avoid hype.</text:p>
      <text:p text:style-name="Normal"/>
      <text:p text:style-name="Normal">Avoid unrealistic promises.</text:p>
      <text:p text:style-name="Normal"/>
      <text:p text:style-name="Normal">Be transparent.</text:p>
      <text:p text:style-name="Normal"/>
      <text:p text:style-name="Normal">Explain recommendations.</text:p>
      <text:p text:style-name="Normal"/>
      <text:p text:style-name="Normal">Support critical thinking.</text:p>
      <text:p text:style-name="Normal"/>
      <text:p text:style-name="Normal">Help users make informed decisions.</text:p>
      <text:p text:style-name="Normal"/>
      <text:p text:style-name="Normal">Trust should always be more important than engagement metrics.</text:p>
      <text:p text:style-name="Normal"/>
      <text:p text:style-name="Normal">---</text:p>
      <text:p text:style-name="Normal"/>
      <text:p text:style-name="Normal"># 4.5 Decision Framework</text:p>
      <text:p text:style-name="Normal"/>
      <text:p text:style-name="Normal">Whenever a new feature is proposed, the product team should ask five questions:</text:p>
      <text:p text:style-name="Normal"/>
      <text:p text:style-name="Normal">Does this reduce uncertainty?</text:p>
      <text:p text:style-name="Normal"/>
      <text:p text:style-name="Normal">Does this improve personalization?</text:p>
      <text:p text:style-name="Normal"/>
      <text:p text:style-name="Normal">Does this help users build real skills?</text:p>
      <text:p text:style-name="Normal"/>
      <text:p text:style-name="Normal">Does this increase career success?</text:p>
      <text:p text:style-name="Normal"/>
      <text:p text:style-name="Normal">Does this strengthen long-term trust?</text:p>
      <text:p text:style-name="Normal"/>
      <text:p text:style-name="Normal">If the answer to most questions is "No", the feature should not be built.</text:p>
      <text:p text:style-name="Normal"/>
      <text:p text:style-name="Normal">---</text:p>
      <text:p text:style-name="Normal"/>
      <text:p text:style-name="Normal"># 4.6 Mission Success</text:p>
      <text:p text:style-name="Normal"/>
      <text:p text:style-name="Normal">Our mission is complete only when users can confidently say:</text:p>
      <text:p text:style-name="Normal"/>
      <text:p text:style-name="Normal">"I know exactly which AI career fits me."</text:p>
      <text:p text:style-name="Normal"/>
      <text:p text:style-name="Normal">"I know why."</text:p>
      <text:p text:style-name="Normal"/>
      <text:p text:style-name="Normal">"I know what to learn."</text:p>
      <text:p text:style-name="Normal"/>
      <text:p text:style-name="Normal">"I know what to build."</text:p>
      <text:p text:style-name="Normal"/>
      <text:p text:style-name="Normal">"I know how I'm progressing."</text:p>
      <text:p text:style-name="Normal"/>
      <text:p text:style-name="Normal">"I know what my next step is."</text:p>
      <text:p text:style-name="Normal"/>
      <text:p text:style-name="Normal">"I achieved my goal."</text:p>
      <text:p text:style-name="Normal"/>
      <text:p text:style-name="Normal">---</text:p>
      <text:p text:style-name="Normal"/>
      <text:p text:style-name="Normal"># Mission Statement</text:p>
      <text:p text:style-name="Normal"/>
      <text:p text:style-name="Normal">**Our mission is to eliminate uncertainty from AI career development by giving every individual a personalized, intelligent, and continuously evolving career operating system.**</text:p>
      <text:p text:style-name="Normal"/>
      <text:p text:style-name="Normal">---</text:p>
      <text:p text:style-name="Normal"/>
      <text:p text:style-name="Normal"># End of Volume 4</text:p>
      <text:p text:style-name="Normal"/>
      <text:p text:style-name="Normal">**Next Volume:** Product Philosophy</text:p>
      <text:p text:style-name="Normal"/>
      <text:p text:style-name="Normal">#<text:s/><text:span text:style-name="T35">📘</text:span><text:s/>Volume 5</text:p>
      <text:p text:style-name="Normal"/>
      <text:p text:style-name="Normal"># Product Philosophy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5.1 Why Product Philosophy Matters</text:p>
      <text:p text:style-name="Normal"/>
      <text:p text:style-name="Normal">Technology changes.</text:p>
      <text:p text:style-name="Normal"/>
      <text:p text:style-name="Normal">Programming languages change.</text:p>
      <text:p text:style-name="Normal"/>
      <text:p text:style-name="Normal">Frameworks change.</text:p>
      <text:p text:style-name="Normal"/>
      <text:p text:style-name="Normal">Artificial Intelligence changes.</text:p>
      <text:p text:style-name="Normal"/>
      <text:p text:style-name="Normal">Product philosophy should not.</text:p>
      <text:p text:style-name="Normal"/>
      <text:p text:style-name="Normal">This philosophy acts as the permanent foundation behind every future product decision.</text:p>
      <text:p text:style-name="Normal"/>
      <text:p text:style-name="Normal">Whenever uncertainty exists, these principles should guide the team.</text:p>
      <text:p text:style-name="Normal"/>
      <text:p text:style-name="Normal">---</text:p>
      <text:p text:style-name="Normal"/>
      <text:p text:style-name="Normal"># 5.2 Philosophy #1 — Guidance Over Information</text:p>
      <text:p text:style-name="Normal"/>
      <text:p text:style-name="Normal">The internet already provides unlimited information.</text:p>
      <text:p text:style-name="Normal"/>
      <text:p text:style-name="Normal">Our responsibility is not to provide more information.</text:p>
      <text:p text:style-name="Normal"/>
      <text:soft-page-break/>
      <text:p text:style-name="Normal">Our responsibility is to guide users toward better decisions.</text:p>
      <text:p text:style-name="Normal"/>
      <text:p text:style-name="Normal">Information without direction creates confusion.</text:p>
      <text:p text:style-name="Normal"/>
      <text:p text:style-name="Normal">Guidance creates confidence.</text:p>
      <text:p text:style-name="Normal"/>
      <text:p text:style-name="Normal">---</text:p>
      <text:p text:style-name="Normal"/>
      <text:p text:style-name="Normal"># 5.3 Philosophy #2 — Personalization Over Templates</text:p>
      <text:p text:style-name="Normal"/>
      <text:p text:style-name="Normal">Generic advice creates generic outcomes.</text:p>
      <text:p text:style-name="Normal"/>
      <text:p text:style-name="Normal">Every recommendation should adapt to:</text:p>
      <text:p text:style-name="Normal"/>
      <text:p text:style-name="Normal">Background</text:p>
      <text:p text:style-name="Normal"/>
      <text:p text:style-name="Normal">Experience</text:p>
      <text:p text:style-name="Normal"/>
      <text:p text:style-name="Normal">Goals</text:p>
      <text:p text:style-name="Normal"/>
      <text:p text:style-name="Normal">Learning style</text:p>
      <text:p text:style-name="Normal"/>
      <text:p text:style-name="Normal">Career interests</text:p>
      <text:p text:style-name="Normal"/>
      <text:p text:style-name="Normal">Progress</text:p>
      <text:p text:style-name="Normal"/>
      <text:p text:style-name="Normal">Strengths</text:p>
      <text:p text:style-name="Normal"/>
      <text:soft-page-break/>
      <text:p text:style-name="Normal">Weaknesses</text:p>
      <text:p text:style-name="Normal"/>
      <text:p text:style-name="Normal">Time availability</text:p>
      <text:p text:style-name="Normal"/>
      <text:p text:style-name="Normal">Every user deserves a unique experience.</text:p>
      <text:p text:style-name="Normal"/>
      <text:p text:style-name="Normal">---</text:p>
      <text:p text:style-name="Normal"/>
      <text:p text:style-name="Normal"># 5.4 Philosophy #3 — Journey Over Pages</text:p>
      <text:p text:style-name="Normal"/>
      <text:p text:style-name="Normal">Users should never feel they are browsing disconnected pages.</text:p>
      <text:p text:style-name="Normal"/>
      <text:p text:style-name="Normal">Instead, they should feel they are progressing through one continuous journey.</text:p>
      <text:p text:style-name="Normal"/>
      <text:p text:style-name="Normal">Every page should naturally lead to the next.</text:p>
      <text:p text:style-name="Normal"/>
      <text:p text:style-name="Normal">The experience should resemble an operating system rather than a website.</text:p>
      <text:p text:style-name="Normal"/>
      <text:p text:style-name="Normal">---</text:p>
      <text:p text:style-name="Normal"/>
      <text:p text:style-name="Normal"># 5.5 Philosophy #4 — Progress Over Completion</text:p>
      <text:p text:style-name="Normal"/>
      <text:p text:style-name="Normal">Learning never truly ends.</text:p>
      <text:p text:style-name="Normal"/>
      <text:p text:style-name="Normal">Instead of asking:</text:p>
      <text:p text:style-name="Normal"/>
      <text:p text:style-name="Normal">"Have you finished?"</text:p>
      <text:p text:style-name="Normal"/>
      <text:soft-page-break/>
      <text:p text:style-name="Normal">The platform should ask:</text:p>
      <text:p text:style-name="Normal"/>
      <text:p text:style-name="Normal">"What is your next milestone?"</text:p>
      <text:p text:style-name="Normal"/>
      <text:p text:style-name="Normal">Progress creates motivation.</text:p>
      <text:p text:style-name="Normal"/>
      <text:p text:style-name="Normal">Completion creates stagnation.</text:p>
      <text:p text:style-name="Normal"/>
      <text:p text:style-name="Normal">---</text:p>
      <text:p text:style-name="Normal"/>
      <text:p text:style-name="Normal"># 5.6 Philosophy #5 — Quality Over Quantity</text:p>
      <text:p text:style-name="Normal"/>
      <text:p text:style-name="Normal">More features do not create better products.</text:p>
      <text:p text:style-name="Normal"/>
      <text:p text:style-name="Normal">Better experiences create better products.</text:p>
      <text:p text:style-name="Normal"/>
      <text:p text:style-name="Normal">Every feature should solve a meaningful problem.</text:p>
      <text:p text:style-name="Normal"/>
      <text:p text:style-name="Normal">Complexity should never be added simply because it is technically possible.</text:p>
      <text:p text:style-name="Normal"/>
      <text:p text:style-name="Normal">---</text:p>
      <text:p text:style-name="Normal"/>
      <text:p text:style-name="Normal"># 5.7 Philosophy #6 — Trust Over Growth</text:p>
      <text:p text:style-name="Normal"/>
      <text:p text:style-name="Normal">Growth without trust is temporary.</text:p>
      <text:p text:style-name="Normal"/>
      <text:p text:style-name="Normal">Trust creates sustainable growth.</text:p>
      <text:p text:style-name="Normal"/>
      <text:soft-page-break/>
      <text:p text:style-name="Normal">The platform should never recommend unnecessary courses.</text:p>
      <text:p text:style-name="Normal"/>
      <text:p text:style-name="Normal">Never encourage endless engagement.</text:p>
      <text:p text:style-name="Normal"/>
      <text:p text:style-name="Normal">Never optimize for addiction.</text:p>
      <text:p text:style-name="Normal"/>
      <text:p text:style-name="Normal">Instead, optimize for real user success.</text:p>
      <text:p text:style-name="Normal"/>
      <text:p text:style-name="Normal">When users succeed, growth naturally follows.</text:p>
      <text:p text:style-name="Normal"/>
      <text:p text:style-name="Normal">---</text:p>
      <text:p text:style-name="Normal"/>
      <text:p text:style-name="Normal"># 5.8 Philosophy #7 — AI Should Feel Human</text:p>
      <text:p text:style-name="Normal"/>
      <text:p text:style-name="Normal">Artificial Intelligence should not behave like a search engine.</text:p>
      <text:p text:style-name="Normal"/>
      <text:p text:style-name="Normal">It should behave like an experienced mentor.</text:p>
      <text:p text:style-name="Normal"/>
      <text:p text:style-name="Normal">It should:</text:p>
      <text:p text:style-name="Normal"/>
      <text:p text:style-name="Normal">Listen.</text:p>
      <text:p text:style-name="Normal"/>
      <text:p text:style-name="Normal">Understand.</text:p>
      <text:p text:style-name="Normal"/>
      <text:p text:style-name="Normal">Explain.</text:p>
      <text:p text:style-name="Normal"/>
      <text:p text:style-name="Normal">Encourage.</text:p>
      <text:p text:style-name="Normal"/>
      <text:soft-page-break/>
      <text:p text:style-name="Normal">Challenge.</text:p>
      <text:p text:style-name="Normal"/>
      <text:p text:style-name="Normal">Support.</text:p>
      <text:p text:style-name="Normal"/>
      <text:p text:style-name="Normal">Remember.</text:p>
      <text:p text:style-name="Normal"/>
      <text:p text:style-name="Normal">Adapt.</text:p>
      <text:p text:style-name="Normal"/>
      <text:p text:style-name="Normal">The relationship should feel collaborative rather than transactional.</text:p>
      <text:p text:style-name="Normal"/>
      <text:p text:style-name="Normal">---</text:p>
      <text:p text:style-name="Normal"/>
      <text:p text:style-name="Normal"># 5.9 Philosophy #8 — Simplicity Is Intelligence</text:p>
      <text:p text:style-name="Normal"/>
      <text:p text:style-name="Normal">The platform may contain thousands of data points internally.</text:p>
      <text:p text:style-name="Normal"/>
      <text:p text:style-name="Normal">Users should experience simplicity.</text:p>
      <text:p text:style-name="Normal"/>
      <text:p text:style-name="Normal">Complexity belongs behind the scenes.</text:p>
      <text:p text:style-name="Normal"/>
      <text:p text:style-name="Normal">Clarity belongs in the interface.</text:p>
      <text:p text:style-name="Normal"/>
      <text:p text:style-name="Normal">The highest level of intelligence is making difficult decisions feel simple.</text:p>
      <text:p text:style-name="Normal"/>
      <text:p text:style-name="Normal">---</text:p>
      <text:p text:style-name="Normal"/>
      <text:p text:style-name="Normal"># 5.10 Philosophy #9 — Continuous Evolution</text:p>
      <text:p text:style-name="Normal"/>
      <text:soft-page-break/>
      <text:p text:style-name="Normal">AI Career OS should never become a finished product.</text:p>
      <text:p text:style-name="Normal"/>
      <text:p text:style-name="Normal">Every improvement should make recommendations smarter.</text:p>
      <text:p text:style-name="Normal"/>
      <text:p text:style-name="Normal">Experiences smoother.</text:p>
      <text:p text:style-name="Normal"/>
      <text:p text:style-name="Normal">Roadmaps better.</text:p>
      <text:p text:style-name="Normal"/>
      <text:p text:style-name="Normal">AI more helpful.</text:p>
      <text:p text:style-name="Normal"/>
      <text:p text:style-name="Normal">Knowledge more accurate.</text:p>
      <text:p text:style-name="Normal"/>
      <text:p text:style-name="Normal">The product should evolve continuously alongside both technology and its users.</text:p>
      <text:p text:style-name="Normal"/>
      <text:p text:style-name="Normal">---</text:p>
      <text:p text:style-name="Normal"/>
      <text:p text:style-name="Normal"># 5.11 Philosophy #10 — Career Success Is Our KPI</text:p>
      <text:p text:style-name="Normal"/>
      <text:p text:style-name="Normal">Most products measure:</text:p>
      <text:p text:style-name="Normal"/>
      <text:p text:style-name="Normal">Clicks.</text:p>
      <text:p text:style-name="Normal"/>
      <text:p text:style-name="Normal">Sessions.</text:p>
      <text:p text:style-name="Normal"/>
      <text:p text:style-name="Normal">Views.</text:p>
      <text:p text:style-name="Normal"/>
      <text:p text:style-name="Normal">Engagement.</text:p>
      <text:p text:style-name="Normal"/>
      <text:soft-page-break/>
      <text:p text:style-name="Normal">AI Career OS measures something different.</text:p>
      <text:p text:style-name="Normal"/>
      <text:p text:style-name="Normal">Career success.</text:p>
      <text:p text:style-name="Normal"/>
      <text:p text:style-name="Normal">Interview readiness.</text:p>
      <text:p text:style-name="Normal"/>
      <text:p text:style-name="Normal">Portfolio quality.</text:p>
      <text:p text:style-name="Normal"/>
      <text:p text:style-name="Normal">Skill growth.</text:p>
      <text:p text:style-name="Normal"/>
      <text:p text:style-name="Normal">Job readiness.</text:p>
      <text:p text:style-name="Normal"/>
      <text:p text:style-name="Normal">Employment outcomes.</text:p>
      <text:p text:style-name="Normal"/>
      <text:p text:style-name="Normal">If users succeed professionally, the platform succeeds.</text:p>
      <text:p text:style-name="Normal"/>
      <text:p text:style-name="Normal">---</text:p>
      <text:p text:style-name="Normal"/>
      <text:p text:style-name="Normal"># Product Philosophy Statement</text:p>
      <text:p text:style-name="Normal"/>
      <text:p text:style-name="Normal">**AI Career OS exists to replace uncertainty with intelligent guidance, transforming complex career decisions into clear, personalized journeys that lead to meaningful professional success.**</text:p>
      <text:p text:style-name="Normal"/>
      <text:p text:style-name="Normal">---</text:p>
      <text:p text:style-name="Normal"/>
      <text:p text:style-name="Normal"># End of Volume 5</text:p>
      <text:p text:style-name="Normal"/>
      <text:p text:style-name="Normal">**Next Volume:** AI Native First Manifesto</text:p>
      <text:p text:style-name="Normal"/>
      <text:p text:style-name="Normal">#<text:s/><text:span text:style-name="T36">📘</text:span><text:s/>Volume 6</text:p>
      <text:p text:style-name="Normal"/>
      <text:p text:style-name="Normal"># AI Native First Manifesto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6.1 Why This Manifesto Exists</text:p>
      <text:p text:style-name="Normal"/>
      <text:p text:style-name="Normal">Most software companies today claim to be **AI-powered**.</text:p>
      <text:p text:style-name="Normal"/>
      <text:p text:style-name="Normal">Very few are actually **AI-native**.</text:p>
      <text:p text:style-name="Normal"/>
      <text:p text:style-name="Normal">Adding a chatbot to an existing product does not make it AI-native.</text:p>
      <text:p text:style-name="Normal"/>
      <text:p text:style-name="Normal">Embedding an LLM into a search box does not make it AI-native.</text:p>
      <text:p text:style-name="Normal"/>
      <text:p text:style-name="Normal">Generating text with AI does not make a product intelligent.</text:p>
      <text:p text:style-name="Normal"/>
      <text:p text:style-name="Normal">AI Career OS is built on a fundamentally different philosophy.</text:p>
      <text:p text:style-name="Normal"/>
      <text:p text:style-name="Normal">Artificial Intelligence is not a feature.</text:p>
      <text:p text:style-name="Normal"/>
      <text:p text:style-name="Normal">Artificial Intelligence is the operating system.</text:p>
      <text:p text:style-name="Normal"/>
      <text:p text:style-name="Normal">Every decision inside the product begins with AI.</text:p>
      <text:p text:style-name="Normal"/>
      <text:p text:style-name="Normal">Every workflow is designed around AI.</text:p>
      <text:p text:style-name="Normal"/>
      <text:p text:style-name="Normal">Every recommendation is generated through AI reasoning.</text:p>
      <text:p text:style-name="Normal"/>
      <text:p text:style-name="Normal">Every interaction becomes smarter over time.</text:p>
      <text:p text:style-name="Normal"/>
      <text:p text:style-name="Normal">AI is not an enhancement.</text:p>
      <text:p text:style-name="Normal"/>
      <text:p text:style-name="Normal">It is the foundation.</text:p>
      <text:p text:style-name="Normal"/>
      <text:p text:style-name="Normal">---</text:p>
      <text:p text:style-name="Normal"/>
      <text:p text:style-name="Normal"># 6.2 AI-Native vs AI-Powered</text:p>
      <text:p text:style-name="Normal"/>
      <text:p text:style-name="Normal">Most products follow this model:</text:p>
      <text:p text:style-name="Normal"/>
      <text:p text:style-name="Normal">Application</text:p>
      <text:p text:style-name="Normal"/>
      <text:p text:style-name="Normal">↓</text:p>
      <text:p text:style-name="Normal"/>
      <text:p text:style-name="Normal">Database</text:p>
      <text:p text:style-name="Normal"/>
      <text:p text:style-name="Normal">↓</text:p>
      <text:p text:style-name="Normal"/>
      <text:p text:style-name="Normal">User Interface</text:p>
      <text:p text:style-name="Normal"/>
      <text:p text:style-name="Normal">↓</text:p>
      <text:p text:style-name="Normal"/>
      <text:p text:style-name="Normal">AI Feature</text:p>
      <text:p text:style-name="Normal"/>
      <text:p text:style-name="Normal">Artificial Intelligence is simply attached to an existing product.</text:p>
      <text:p text:style-name="Normal"/>
      <text:p text:style-name="Normal">We reject this approach.</text:p>
      <text:p text:style-name="Normal"/>
      <text:p text:style-name="Normal">AI Career OS follows a different architecture:</text:p>
      <text:p text:style-name="Normal"/>
      <text:p text:style-name="Normal">User</text:p>
      <text:p text:style-name="Normal"/>
      <text:p text:style-name="Normal">↓</text:p>
      <text:p text:style-name="Normal"/>
      <text:p text:style-name="Normal">Context</text:p>
      <text:p text:style-name="Normal"/>
      <text:p text:style-name="Normal">↓</text:p>
      <text:p text:style-name="Normal"/>
      <text:p text:style-name="Normal">Memory</text:p>
      <text:p text:style-name="Normal"/>
      <text:p text:style-name="Normal">↓</text:p>
      <text:p text:style-name="Normal"/>
      <text:p text:style-name="Normal">Reasoning</text:p>
      <text:p text:style-name="Normal"/>
      <text:p text:style-name="Normal">↓</text:p>
      <text:p text:style-name="Normal"/>
      <text:p text:style-name="Normal">Artificial Intelligence</text:p>
      <text:p text:style-name="Normal"/>
      <text:p text:style-name="Normal">↓</text:p>
      <text:p text:style-name="Normal"/>
      <text:p text:style-name="Normal">Decision Engine</text:p>
      <text:p text:style-name="Normal"/>
      <text:p text:style-name="Normal">↓</text:p>
      <text:p text:style-name="Normal"/>
      <text:p text:style-name="Normal">Personalization</text:p>
      <text:p text:style-name="Normal"/>
      <text:p text:style-name="Normal">↓</text:p>
      <text:p text:style-name="Normal"/>
      <text:p text:style-name="Normal">User Experience</text:p>
      <text:p text:style-name="Normal"/>
      <text:p text:style-name="Normal">Artificial Intelligence is the first layer—not the last.</text:p>
      <text:p text:style-name="Normal"/>
      <text:p text:style-name="Normal">---</text:p>
      <text:p text:style-name="Normal"/>
      <text:p text:style-name="Normal"># 6.3 Our Definition of AI Native</text:p>
      <text:p text:style-name="Normal"/>
      <text:p text:style-name="Normal">A product is AI-native only if removing Artificial Intelligence makes the product lose its core purpose.</text:p>
      <text:p text:style-name="Normal"/>
      <text:p text:style-name="Normal">Ask one question:</text:p>
      <text:p text:style-name="Normal"/>
      <text:p text:style-name="Normal">"If AI disappeared tomorrow, would this product still make sense?"</text:p>
      <text:p text:style-name="Normal"/>
      <text:p text:style-name="Normal">For AI Career OS, the answer is:</text:p>
      <text:p text:style-name="Normal"/>
      <text:p text:style-name="Normal">No.</text:p>
      <text:p text:style-name="Normal"/>
      <text:soft-page-break/>
      <text:p text:style-name="Normal">Without AI:</text:p>
      <text:p text:style-name="Normal"/>
      <text:p text:style-name="Normal">No personalized career recommendations.</text:p>
      <text:p text:style-name="Normal"/>
      <text:p text:style-name="Normal">No Career DNA.</text:p>
      <text:p text:style-name="Normal"/>
      <text:p text:style-name="Normal">No adaptive roadmap.</text:p>
      <text:p text:style-name="Normal"/>
      <text:p text:style-name="Normal">No AI Coach.</text:p>
      <text:p text:style-name="Normal"/>
      <text:p text:style-name="Normal">No dynamic dashboard.</text:p>
      <text:p text:style-name="Normal"/>
      <text:p text:style-name="Normal">No intelligent reasoning.</text:p>
      <text:p text:style-name="Normal"/>
      <text:p text:style-name="Normal">No personalized learning journey.</text:p>
      <text:p text:style-name="Normal"/>
      <text:p text:style-name="Normal">No contextual memory.</text:p>
      <text:p text:style-name="Normal"/>
      <text:p text:style-name="Normal">The product would lose its identity.</text:p>
      <text:p text:style-name="Normal"/>
      <text:p text:style-name="Normal">That is what makes it AI-native.</text:p>
      <text:p text:style-name="Normal"/>
      <text:p text:style-name="Normal">---</text:p>
      <text:p text:style-name="Normal"/>
      <text:p text:style-name="Normal"># 6.4 AI Is the Product</text:p>
      <text:p text:style-name="Normal"/>
      <text:p text:style-name="Normal">Many companies market AI as a feature.</text:p>
      <text:p text:style-name="Normal"/>
      <text:soft-page-break/>
      <text:p text:style-name="Normal">We believe AI is the product.</text:p>
      <text:p text:style-name="Normal"/>
      <text:p text:style-name="Normal">Users should never think:</text:p>
      <text:p text:style-name="Normal"/>
      <text:p text:style-name="Normal">"I'm using an AI feature."</text:p>
      <text:p text:style-name="Normal"/>
      <text:p text:style-name="Normal">Instead they should feel:</text:p>
      <text:p text:style-name="Normal"/>
      <text:p text:style-name="Normal">"This product understands me."</text:p>
      <text:p text:style-name="Normal"/>
      <text:p text:style-name="Normal">Artificial Intelligence should disappear into the experience.</text:p>
      <text:p text:style-name="Normal"/>
      <text:p text:style-name="Normal">It should feel natural.</text:p>
      <text:p text:style-name="Normal"/>
      <text:p text:style-name="Normal">Invisible.</text:p>
      <text:p text:style-name="Normal"/>
      <text:p text:style-name="Normal">Helpful.</text:p>
      <text:p text:style-name="Normal"/>
      <text:p text:style-name="Normal">Predictive.</text:p>
      <text:p text:style-name="Normal"/>
      <text:p text:style-name="Normal">Personal.</text:p>
      <text:p text:style-name="Normal"/>
      <text:p text:style-name="Normal">---</text:p>
      <text:p text:style-name="Normal"/>
      <text:p text:style-name="Normal"># 6.5 AI Should Think Before It Speaks</text:p>
      <text:p text:style-name="Normal"/>
      <text:p text:style-name="Normal">Most AI products answer immediately.</text:p>
      <text:p text:style-name="Normal"/>
      <text:soft-page-break/>
      <text:p text:style-name="Normal">We want AI Career OS to reason first.</text:p>
      <text:p text:style-name="Normal"/>
      <text:p text:style-name="Normal">Every recommendation should be based on:</text:p>
      <text:p text:style-name="Normal"/>
      <text:p text:style-name="Normal">User background</text:p>
      <text:p text:style-name="Normal"/>
      <text:p text:style-name="Normal">Experience</text:p>
      <text:p text:style-name="Normal"/>
      <text:p text:style-name="Normal">Learning history</text:p>
      <text:p text:style-name="Normal"/>
      <text:p text:style-name="Normal">Career goals</text:p>
      <text:p text:style-name="Normal"/>
      <text:p text:style-name="Normal">Market trends</text:p>
      <text:p text:style-name="Normal"/>
      <text:p text:style-name="Normal">Skill graph</text:p>
      <text:p text:style-name="Normal"/>
      <text:p text:style-name="Normal">Portfolio</text:p>
      <text:p text:style-name="Normal"/>
      <text:p text:style-name="Normal">Previous conversations</text:p>
      <text:p text:style-name="Normal"/>
      <text:p text:style-name="Normal">Behavior patterns</text:p>
      <text:p text:style-name="Normal"/>
      <text:p text:style-name="Normal">Current progress</text:p>
      <text:p text:style-name="Normal"/>
      <text:p text:style-name="Normal">The platform should explain why it recommends something.</text:p>
      <text:p text:style-name="Normal"/>
      <text:p text:style-name="Normal">Reasoning creates trust.</text:p>
      <text:p text:style-name="Normal"/>
      <text:soft-page-break/>
      <text:p text:style-name="Normal">Blind recommendations do not.</text:p>
      <text:p text:style-name="Normal"/>
      <text:p text:style-name="Normal">---</text:p>
      <text:p text:style-name="Normal"/>
      <text:p text:style-name="Normal"># 6.6 AI Should Remember</text:p>
      <text:p text:style-name="Normal"/>
      <text:p text:style-name="Normal">Every conversation should build memory.</text:p>
      <text:p text:style-name="Normal"/>
      <text:p text:style-name="Normal">The platform should remember:</text:p>
      <text:p text:style-name="Normal"/>
      <text:p text:style-name="Normal">Career goals.</text:p>
      <text:p text:style-name="Normal"/>
      <text:p text:style-name="Normal">Preferred learning style.</text:p>
      <text:p text:style-name="Normal"/>
      <text:p text:style-name="Normal">Projects completed.</text:p>
      <text:p text:style-name="Normal"/>
      <text:p text:style-name="Normal">Skills mastered.</text:p>
      <text:p text:style-name="Normal"/>
      <text:p text:style-name="Normal">Challenges.</text:p>
      <text:p text:style-name="Normal"/>
      <text:p text:style-name="Normal">Weaknesses.</text:p>
      <text:p text:style-name="Normal"/>
      <text:p text:style-name="Normal">Interests.</text:p>
      <text:p text:style-name="Normal"/>
      <text:p text:style-name="Normal">Time availability.</text:p>
      <text:p text:style-name="Normal"/>
      <text:p text:style-name="Normal">Favorite technologies.</text:p>
      <text:p text:style-name="Normal"/>
      <text:soft-page-break/>
      <text:p text:style-name="Normal">Career aspirations.</text:p>
      <text:p text:style-name="Normal"/>
      <text:p text:style-name="Normal">Future conversations should never start from zero.</text:p>
      <text:p text:style-name="Normal"/>
      <text:p text:style-name="Normal">The AI should feel like someone who already knows the user.</text:p>
      <text:p text:style-name="Normal"/>
      <text:p text:style-name="Normal">---</text:p>
      <text:p text:style-name="Normal"/>
      <text:p text:style-name="Normal"># 6.7 AI Should Adapt</text:p>
      <text:p text:style-name="Normal"/>
      <text:p text:style-name="Normal">Recommendations should continuously evolve.</text:p>
      <text:p text:style-name="Normal"/>
      <text:p text:style-name="Normal">Examples:</text:p>
      <text:p text:style-name="Normal"/>
      <text:p text:style-name="Normal">A user completes Python.</text:p>
      <text:p text:style-name="Normal"/>
      <text:p text:style-name="Normal">↓</text:p>
      <text:p text:style-name="Normal"/>
      <text:p text:style-name="Normal">Roadmap changes.</text:p>
      <text:p text:style-name="Normal"/>
      <text:p text:style-name="Normal">A user finishes Portfolio Project #3.</text:p>
      <text:p text:style-name="Normal"/>
      <text:p text:style-name="Normal">↓</text:p>
      <text:p text:style-name="Normal"/>
      <text:p text:style-name="Normal">Interview preparation appears.</text:p>
      <text:p text:style-name="Normal"/>
      <text:p text:style-name="Normal">A new AI technology becomes industry standard.</text:p>
      <text:p text:style-name="Normal"/>
      <text:soft-page-break/>
      <text:p text:style-name="Normal">↓</text:p>
      <text:p text:style-name="Normal"/>
      <text:p text:style-name="Normal">Learning priorities update.</text:p>
      <text:p text:style-name="Normal"/>
      <text:p text:style-name="Normal">The product should never remain static.</text:p>
      <text:p text:style-name="Normal"/>
      <text:p text:style-name="Normal">The intelligence should continuously improve.</text:p>
      <text:p text:style-name="Normal"/>
      <text:p text:style-name="Normal">---</text:p>
      <text:p text:style-name="Normal"/>
      <text:p text:style-name="Normal"># 6.8 AI Should Challenge Users</text:p>
      <text:p text:style-name="Normal"/>
      <text:p text:style-name="Normal">The purpose of AI is not simply to agree.</text:p>
      <text:p text:style-name="Normal"/>
      <text:p text:style-name="Normal">Sometimes the platform should say:</text:p>
      <text:p text:style-name="Normal"/>
      <text:p text:style-name="Normal">"This career may not be the best fit."</text:p>
      <text:p text:style-name="Normal"/>
      <text:p text:style-name="Normal">"You may succeed faster in another role."</text:p>
      <text:p text:style-name="Normal"/>
      <text:p text:style-name="Normal">"Based on your strengths, I recommend changing direction."</text:p>
      <text:p text:style-name="Normal"/>
      <text:p text:style-name="Normal">"You're spending too much time learning and not enough time building."</text:p>
      <text:p text:style-name="Normal"/>
      <text:p text:style-name="Normal">Honest guidance builds credibility.</text:p>
      <text:p text:style-name="Normal"/>
      <text:p text:style-name="Normal">People trust mentors who challenge them—not those who always agree.</text:p>
      <text:p text:style-name="Normal"/>
      <text:soft-page-break/>
      <text:p text:style-name="Normal">---</text:p>
      <text:p text:style-name="Normal"/>
      <text:p text:style-name="Normal"># 6.9 AI Should Explain Everything</text:p>
      <text:p text:style-name="Normal"/>
      <text:p text:style-name="Normal">Recommendations without explanations reduce trust.</text:p>
      <text:p text:style-name="Normal"/>
      <text:p text:style-name="Normal">Every recommendation should answer three questions.</text:p>
      <text:p text:style-name="Normal"/>
      <text:p text:style-name="Normal">Why?</text:p>
      <text:p text:style-name="Normal"/>
      <text:p text:style-name="Normal">Why now?</text:p>
      <text:p text:style-name="Normal"/>
      <text:p text:style-name="Normal">What happens next?</text:p>
      <text:p text:style-name="Normal"/>
      <text:p text:style-name="Normal">Example:</text:p>
      <text:p text:style-name="Normal"/>
      <text:p text:style-name="Normal">"We recommend learning APIs before LangChain because your roadmap shows that API integration is a prerequisite for building production AI agents."</text:p>
      <text:p text:style-name="Normal"/>
      <text:p text:style-name="Normal">The recommendation becomes educational rather than instructional.</text:p>
      <text:p text:style-name="Normal"/>
      <text:p text:style-name="Normal">---</text:p>
      <text:p text:style-name="Normal"/>
      <text:p text:style-name="Normal"># 6.10 AI Should Be Proactive</text:p>
      <text:p text:style-name="Normal"/>
      <text:p text:style-name="Normal">Users should not always ask questions.</text:p>
      <text:p text:style-name="Normal"/>
      <text:p text:style-name="Normal">Sometimes the platform should initiate conversations.</text:p>
      <text:p text:style-name="Normal"/>
      <text:p text:style-name="Normal">Examples:</text:p>
      <text:p text:style-name="Normal"/>
      <text:p text:style-name="Normal">"Congratulations. You completed 70% of your roadmap."</text:p>
      <text:p text:style-name="Normal"/>
      <text:p text:style-name="Normal">"I noticed your Python progress has slowed this week."</text:p>
      <text:p text:style-name="Normal"/>
      <text:p text:style-name="Normal">"You are now ready for your first portfolio project."</text:p>
      <text:p text:style-name="Normal"/>
      <text:p text:style-name="Normal">"Two new AI tools have become relevant to your career path."</text:p>
      <text:p text:style-name="Normal"/>
      <text:p text:style-name="Normal">"You are approximately one month away from interview readiness."</text:p>
      <text:p text:style-name="Normal"/>
      <text:p text:style-name="Normal">The AI should become an active mentor rather than a passive assistant.</text:p>
      <text:p text:style-name="Normal"/>
      <text:p text:style-name="Normal">---</text:p>
      <text:p text:style-name="Normal"/>
      <text:p text:style-name="Normal"># 6.11 AI Should Build Confidence</text:p>
      <text:p text:style-name="Normal"/>
      <text:p text:style-name="Normal">Many learning platforms unintentionally increase anxiety.</text:p>
      <text:p text:style-name="Normal"/>
      <text:p text:style-name="Normal">Users compare themselves to experts.</text:p>
      <text:p text:style-name="Normal"/>
      <text:p text:style-name="Normal">They feel behind.</text:p>
      <text:p text:style-name="Normal"/>
      <text:p text:style-name="Normal">They feel overwhelmed.</text:p>
      <text:p text:style-name="Normal"/>
      <text:p text:style-name="Normal">AI Career OS should reduce anxiety.</text:p>
      <text:p text:style-name="Normal"/>
      <text:p text:style-name="Normal">The platform should celebrate progress.</text:p>
      <text:p text:style-name="Normal"/>
      <text:p text:style-name="Normal">Explain mistakes.</text:p>
      <text:p text:style-name="Normal"/>
      <text:p text:style-name="Normal">Encourage consistency.</text:p>
      <text:p text:style-name="Normal"/>
      <text:p text:style-name="Normal">Recognize achievements.</text:p>
      <text:p text:style-name="Normal"/>
      <text:p text:style-name="Normal">Recommend realistic next steps.</text:p>
      <text:p text:style-name="Normal"/>
      <text:p text:style-name="Normal">Confidence is a measurable product outcome.</text:p>
      <text:p text:style-name="Normal"/>
      <text:p text:style-name="Normal">---</text:p>
      <text:p text:style-name="Normal"/>
      <text:p text:style-name="Normal"># 6.12 AI Should Never Manipulate</text:p>
      <text:p text:style-name="Normal"/>
      <text:p text:style-name="Normal">Artificial Intelligence should never optimize for addiction.</text:p>
      <text:p text:style-name="Normal"/>
      <text:p text:style-name="Normal">Never recommend unnecessary work.</text:p>
      <text:p text:style-name="Normal"/>
      <text:p text:style-name="Normal">Never create artificial urgency.</text:p>
      <text:p text:style-name="Normal"/>
      <text:p text:style-name="Normal">Never exaggerate user weaknesses.</text:p>
      <text:p text:style-name="Normal"/>
      <text:p text:style-name="Normal">Never recommend products for commercial reasons.</text:p>
      <text:p text:style-name="Normal"/>
      <text:p text:style-name="Normal">Trust is always more valuable than engagement.</text:p>
      <text:p text:style-name="Normal"/>
      <text:p text:style-name="Normal">Every recommendation must genuinely improve the user's career.</text:p>
      <text:p text:style-name="Normal"/>
      <text:p text:style-name="Normal">---</text:p>
      <text:p text:style-name="Normal"/>
      <text:p text:style-name="Normal"># 6.13 AI Should Become a Career Partner</text:p>
      <text:p text:style-name="Normal"/>
      <text:p text:style-name="Normal">The ultimate goal is not creating the smartest AI.</text:p>
      <text:p text:style-name="Normal"/>
      <text:p text:style-name="Normal">The goal is creating the most trusted AI career partner.</text:p>
      <text:p text:style-name="Normal"/>
      <text:p text:style-name="Normal">Years after joining the platform, users should feel:</text:p>
      <text:p text:style-name="Normal"/>
      <text:p text:style-name="Normal">"This AI understands my career better than anyone else."</text:p>
      <text:p text:style-name="Normal"/>
      <text:p text:style-name="Normal">Not because it knows everything.</text:p>
      <text:p text:style-name="Normal"/>
      <text:p text:style-name="Normal">Because it has learned their journey.</text:p>
      <text:p text:style-name="Normal"/>
      <text:p text:style-name="Normal">---</text:p>
      <text:p text:style-name="Normal"/>
      <text:p text:style-name="Normal"># 6.14 AI Native Principles</text:p>
      <text:p text:style-name="Normal"/>
      <text:p text:style-name="Normal">Every AI feature should satisfy these principles.</text:p>
      <text:p text:style-name="Normal"/>
      <text:p text:style-name="Normal">✓ Understand before recommending.</text:p>
      <text:p text:style-name="Normal"/>
      <text:p text:style-name="Normal">✓ Remember before asking again.</text:p>
      <text:p text:style-name="Normal"/>
      <text:p text:style-name="Normal">✓ Explain before instructing.</text:p>
      <text:p text:style-name="Normal"/>
      <text:p text:style-name="Normal">✓ Personalize before generalizing.</text:p>
      <text:p text:style-name="Normal"/>
      <text:p text:style-name="Normal">✓ Encourage before criticizing.</text:p>
      <text:p text:style-name="Normal"/>
      <text:p text:style-name="Normal">✓ Adapt before repeating.</text:p>
      <text:p text:style-name="Normal"/>
      <text:p text:style-name="Normal">✓ Guide before searching.</text:p>
      <text:p text:style-name="Normal"/>
      <text:p text:style-name="Normal">✓ Think before answering.</text:p>
      <text:p text:style-name="Normal"/>
      <text:p text:style-name="Normal">✓ Build confidence before measuring performance.</text:p>
      <text:p text:style-name="Normal"/>
      <text:p text:style-name="Normal">✓ Earn trust before seeking engagement.</text:p>
      <text:p text:style-name="Normal"/>
      <text:p text:style-name="Normal">---</text:p>
      <text:p text:style-name="Normal"/>
      <text:p text:style-name="Normal"># AI Native First Statement</text:p>
      <text:p text:style-name="Normal"/>
      <text:p text:style-name="Normal">**Artificial Intelligence is not a feature inside AI Career OS.**</text:p>
      <text:p text:style-name="Normal"/>
      <text:p text:style-name="Normal">**Artificial Intelligence is the intelligence that powers every decision, every recommendation, every roadmap, every interaction, and every career journey.**</text:p>
      <text:p text:style-name="Normal"/>
      <text:p text:style-name="Normal">Everything else exists to make that intelligence useful.</text:p>
      <text:p text:style-name="Normal"/>
      <text:soft-page-break/>
      <text:p text:style-name="Normal">---</text:p>
      <text:p text:style-name="Normal"/>
      <text:p text:style-name="Normal"># End of Volume 6</text:p>
      <text:p text:style-name="Normal"/>
      <text:p text:style-name="Normal">**Next Volume:** Product Principles</text:p>
      <text:p text:style-name="Normal"/>
      <text:p text:style-name="Normal">#<text:s/><text:span text:style-name="T37">📘</text:span><text:s/>Volume 7</text:p>
      <text:p text:style-name="Normal"/>
      <text:p text:style-name="Normal"># Product Principles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7.1 Why Product Principles Matter</text:p>
      <text:p text:style-name="Normal"/>
      <text:p text:style-name="Normal">Vision describes where we are going.</text:p>
      <text:p text:style-name="Normal"/>
      <text:p text:style-name="Normal">Mission explains why we exist.</text:p>
      <text:p text:style-name="Normal"/>
      <text:p text:style-name="Normal">Philosophy defines how we think.</text:p>
      <text:p text:style-name="Normal"/>
      <text:p text:style-name="Normal">Product Principles define how we build.</text:p>
      <text:p text:style-name="Normal"/>
      <text:p text:style-name="Normal">Every feature, interface, AI interaction, roadmap, report, dashboard, animation, and future decision should be evaluated against these principles.</text:p>
      <text:p text:style-name="Normal"/>
      <text:p text:style-name="Normal">These principles are permanent.</text:p>
      <text:p text:style-name="Normal"/>
      <text:p text:style-name="Normal">Technology will change.</text:p>
      <text:p text:style-name="Normal"/>
      <text:p text:style-name="Normal">Artificial Intelligence will evolve.</text:p>
      <text:p text:style-name="Normal"/>
      <text:p text:style-name="Normal">Design trends will come and go.</text:p>
      <text:p text:style-name="Normal"/>
      <text:p text:style-name="Normal">Our principles should remain consistent.</text:p>
      <text:p text:style-name="Normal"/>
      <text:p text:style-name="Normal">---</text:p>
      <text:p text:style-name="Normal"/>
      <text:p text:style-name="Normal"># 7.2 Principle #1 — The User Comes Before the Product</text:p>
      <text:p text:style-name="Normal"/>
      <text:p text:style-name="Normal">Many companies optimize products for business metrics.</text:p>
      <text:p text:style-name="Normal"/>
      <text:p text:style-name="Normal">We optimize the product for user success.</text:p>
      <text:p text:style-name="Normal"/>
      <text:p text:style-name="Normal">If users become successful, the business naturally becomes successful.</text:p>
      <text:p text:style-name="Normal"/>
      <text:p text:style-name="Normal">Never ask:</text:p>
      <text:p text:style-name="Normal"/>
      <text:p text:style-name="Normal">"How do we increase engagement?"</text:p>
      <text:p text:style-name="Normal"/>
      <text:p text:style-name="Normal">Ask:</text:p>
      <text:p text:style-name="Normal"/>
      <text:p text:style-name="Normal">"How do we improve the user's career?"</text:p>
      <text:p text:style-name="Normal"/>
      <text:p text:style-name="Normal">The answer to the second question naturally improves the first.</text:p>
      <text:p text:style-name="Normal"/>
      <text:p text:style-name="Normal">---</text:p>
      <text:p text:style-name="Normal"/>
      <text:p text:style-name="Normal"># 7.3 Principle #2 — Career Success Is the Product</text:p>
      <text:p text:style-name="Normal"/>
      <text:p text:style-name="Normal">Users are not buying information.</text:p>
      <text:p text:style-name="Normal"/>
      <text:p text:style-name="Normal">They are not buying courses.</text:p>
      <text:p text:style-name="Normal"/>
      <text:p text:style-name="Normal">They are not buying AI.</text:p>
      <text:p text:style-name="Normal"/>
      <text:p text:style-name="Normal">They are buying a better future.</text:p>
      <text:p text:style-name="Normal"/>
      <text:p text:style-name="Normal">Everything should move users closer to real career outcomes.</text:p>
      <text:p text:style-name="Normal"/>
      <text:p text:style-name="Normal">Examples:</text:p>
      <text:p text:style-name="Normal"/>
      <text:p text:style-name="Normal">Getting interviews.</text:p>
      <text:p text:style-name="Normal"/>
      <text:p text:style-name="Normal">Building confidence.</text:p>
      <text:p text:style-name="Normal"/>
      <text:p text:style-name="Normal">Learning relevant skills.</text:p>
      <text:p text:style-name="Normal"/>
      <text:p text:style-name="Normal">Creating portfolios.</text:p>
      <text:p text:style-name="Normal"/>
      <text:p text:style-name="Normal">Receiving job offers.</text:p>
      <text:p text:style-name="Normal"/>
      <text:p text:style-name="Normal">Those are our true deliverables.</text:p>
      <text:p text:style-name="Normal"/>
      <text:p text:style-name="Normal">---</text:p>
      <text:p text:style-name="Normal"/>
      <text:p text:style-name="Normal"># 7.4 Principle #3 — Understand Before Recommending</text:p>
      <text:p text:style-name="Normal"/>
      <text:p text:style-name="Normal">The platform should never make assumptions.</text:p>
      <text:p text:style-name="Normal"/>
      <text:p text:style-name="Normal">Before making recommendations, AI should understand:</text:p>
      <text:p text:style-name="Normal"/>
      <text:p text:style-name="Normal">Current experience.</text:p>
      <text:p text:style-name="Normal"/>
      <text:p text:style-name="Normal">Goals.</text:p>
      <text:p text:style-name="Normal"/>
      <text:p text:style-name="Normal">Motivation.</text:p>
      <text:p text:style-name="Normal"/>
      <text:p text:style-name="Normal">Learning style.</text:p>
      <text:p text:style-name="Normal"/>
      <text:p text:style-name="Normal">Time availability.</text:p>
      <text:p text:style-name="Normal"/>
      <text:p text:style-name="Normal">Technical background.</text:p>
      <text:p text:style-name="Normal"/>
      <text:p text:style-name="Normal">Existing strengths.</text:p>
      <text:p text:style-name="Normal"/>
      <text:p text:style-name="Normal">Transferable skills.</text:p>
      <text:p text:style-name="Normal"/>
      <text:p text:style-name="Normal">Every recommendation should begin with understanding.</text:p>
      <text:p text:style-name="Normal"/>
      <text:p text:style-name="Normal">---</text:p>
      <text:p text:style-name="Normal"/>
      <text:p text:style-name="Normal"># 7.5 Principle #4 — Every User Is Unique</text:p>
      <text:p text:style-name="Normal"/>
      <text:p text:style-name="Normal">No two users should receive identical experiences.</text:p>
      <text:p text:style-name="Normal"/>
      <text:p text:style-name="Normal">Personalization should influence:</text:p>
      <text:p text:style-name="Normal"/>
      <text:p text:style-name="Normal">Career recommendations.</text:p>
      <text:p text:style-name="Normal"/>
      <text:p text:style-name="Normal">Roadmaps.</text:p>
      <text:p text:style-name="Normal"/>
      <text:p text:style-name="Normal">Projects.</text:p>
      <text:p text:style-name="Normal"/>
      <text:p text:style-name="Normal">Learning resources.</text:p>
      <text:p text:style-name="Normal"/>
      <text:p text:style-name="Normal">Weekly goals.</text:p>
      <text:p text:style-name="Normal"/>
      <text:p text:style-name="Normal">Dashboard layout.</text:p>
      <text:p text:style-name="Normal"/>
      <text:p text:style-name="Normal">AI conversations.</text:p>
      <text:p text:style-name="Normal"/>
      <text:p text:style-name="Normal">Notifications.</text:p>
      <text:p text:style-name="Normal"/>
      <text:p text:style-name="Normal">The more the platform knows, the more valuable it becomes.</text:p>
      <text:p text:style-name="Normal"/>
      <text:p text:style-name="Normal">---</text:p>
      <text:p text:style-name="Normal"/>
      <text:p text:style-name="Normal"># 7.6 Principle #5 — Explain Every Recommendation</text:p>
      <text:p text:style-name="Normal"/>
      <text:p text:style-name="Normal">Never tell users:</text:p>
      <text:p text:style-name="Normal"/>
      <text:p text:style-name="Normal">"Learn Python."</text:p>
      <text:p text:style-name="Normal"/>
      <text:p text:style-name="Normal">Instead explain:</text:p>
      <text:p text:style-name="Normal"/>
      <text:p text:style-name="Normal">Why Python?</text:p>
      <text:p text:style-name="Normal"/>
      <text:p text:style-name="Normal">Why now?</text:p>
      <text:p text:style-name="Normal"/>
      <text:p text:style-name="Normal">How will it help?</text:p>
      <text:p text:style-name="Normal"/>
      <text:p text:style-name="Normal">What comes after Python?</text:p>
      <text:p text:style-name="Normal"/>
      <text:p text:style-name="Normal">Transparent reasoning increases trust.</text:p>
      <text:p text:style-name="Normal"/>
      <text:p text:style-name="Normal">The goal is not simply to recommend.</text:p>
      <text:p text:style-name="Normal"/>
      <text:p text:style-name="Normal">The goal is to educate.</text:p>
      <text:p text:style-name="Normal"/>
      <text:p text:style-name="Normal">---</text:p>
      <text:p text:style-name="Normal"/>
      <text:p text:style-name="Normal"># 7.7 Principle #6 — Build Confidence, Not Dependency</text:p>
      <text:p text:style-name="Normal"/>
      <text:p text:style-name="Normal">Users should become more independent over time.</text:p>
      <text:p text:style-name="Normal"/>
      <text:p text:style-name="Normal">Artificial Intelligence should increase human capability.</text:p>
      <text:p text:style-name="Normal"/>
      <text:p text:style-name="Normal">Not replace human thinking.</text:p>
      <text:p text:style-name="Normal"/>
      <text:p text:style-name="Normal">The platform should teach users how to make good decisions—not make every decision for them forever.</text:p>
      <text:p text:style-name="Normal"/>
      <text:p text:style-name="Normal">The ultimate success is a user who eventually needs less guidance because they have gained confidence.</text:p>
      <text:p text:style-name="Normal"/>
      <text:p text:style-name="Normal">---</text:p>
      <text:p text:style-name="Normal"/>
      <text:p text:style-name="Normal"># 7.8 Principle #7 — Progress Must Always Be Visible</text:p>
      <text:p text:style-name="Normal"/>
      <text:p text:style-name="Normal">People lose motivation when progress becomes invisible.</text:p>
      <text:p text:style-name="Normal"/>
      <text:p text:style-name="Normal">Every meaningful achievement should be reflected visually.</text:p>
      <text:p text:style-name="Normal"/>
      <text:p text:style-name="Normal">Examples:</text:p>
      <text:p text:style-name="Normal"/>
      <text:p text:style-name="Normal">Skill Growth</text:p>
      <text:p text:style-name="Normal"/>
      <text:p text:style-name="Normal">Roadmap Progress</text:p>
      <text:p text:style-name="Normal"/>
      <text:p text:style-name="Normal">Portfolio Completion</text:p>
      <text:p text:style-name="Normal"/>
      <text:p text:style-name="Normal">Career Readiness</text:p>
      <text:p text:style-name="Normal"/>
      <text:p text:style-name="Normal">Learning Streak</text:p>
      <text:p text:style-name="Normal"/>
      <text:soft-page-break/>
      <text:p text:style-name="Normal">Milestones</text:p>
      <text:p text:style-name="Normal"/>
      <text:p text:style-name="Normal">Interview Readiness</text:p>
      <text:p text:style-name="Normal"/>
      <text:p text:style-name="Normal">Progress creates momentum.</text:p>
      <text:p text:style-name="Normal"/>
      <text:p text:style-name="Normal">Momentum creates consistency.</text:p>
      <text:p text:style-name="Normal"/>
      <text:p text:style-name="Normal">Consistency creates success.</text:p>
      <text:p text:style-name="Normal"/>
      <text:p text:style-name="Normal">---</text:p>
      <text:p text:style-name="Normal"/>
      <text:p text:style-name="Normal"># 7.9 Principle #8 — Eliminate Decision Fatigue</text:p>
      <text:p text:style-name="Normal"/>
      <text:p text:style-name="Normal">The AI industry changes rapidly.</text:p>
      <text:p text:style-name="Normal"/>
      <text:p text:style-name="Normal">Users are already overwhelmed.</text:p>
      <text:p text:style-name="Normal"/>
      <text:p text:style-name="Normal">The platform should reduce unnecessary decisions.</text:p>
      <text:p text:style-name="Normal"/>
      <text:p text:style-name="Normal">Instead of presenting twenty options, recommend three.</text:p>
      <text:p text:style-name="Normal"/>
      <text:p text:style-name="Normal">Instead of showing hundreds of courses, recommend one.</text:p>
      <text:p text:style-name="Normal"/>
      <text:p text:style-name="Normal">Instead of asking users to compare careers, explain which career best matches them.</text:p>
      <text:p text:style-name="Normal"/>
      <text:p text:style-name="Normal">Good products reduce cognitive load.</text:p>
      <text:p text:style-name="Normal"/>
      <text:soft-page-break/>
      <text:p text:style-name="Normal">---</text:p>
      <text:p text:style-name="Normal"/>
      <text:p text:style-name="Normal"># 7.10 Principle #9 — Every Screen Must Have a Purpose</text:p>
      <text:p text:style-name="Normal"/>
      <text:p text:style-name="Normal">No page should exist because it looks impressive.</text:p>
      <text:p text:style-name="Normal"/>
      <text:p text:style-name="Normal">Every page should move the user closer to a goal.</text:p>
      <text:p text:style-name="Normal"/>
      <text:p text:style-name="Normal">If removing a page has no negative impact on the user's journey...</text:p>
      <text:p text:style-name="Normal"/>
      <text:p text:style-name="Normal">The page probably should not exist.</text:p>
      <text:p text:style-name="Normal"/>
      <text:p text:style-name="Normal">Purpose is more important than aesthetics.</text:p>
      <text:p text:style-name="Normal"/>
      <text:p text:style-name="Normal">---</text:p>
      <text:p text:style-name="Normal"/>
      <text:p text:style-name="Normal"># 7.11 Principle #10 — Learning by Building</text:p>
      <text:p text:style-name="Normal"/>
      <text:p text:style-name="Normal">Watching videos creates familiarity.</text:p>
      <text:p text:style-name="Normal"/>
      <text:p text:style-name="Normal">Building projects creates competence.</text:p>
      <text:p text:style-name="Normal"/>
      <text:p text:style-name="Normal">The platform should encourage practical experience as early as possible.</text:p>
      <text:p text:style-name="Normal"/>
      <text:p text:style-name="Normal">Every learning stage should include:</text:p>
      <text:p text:style-name="Normal"/>
      <text:p text:style-name="Normal">Projects.</text:p>
      <text:p text:style-name="Normal"/>
      <text:soft-page-break/>
      <text:p text:style-name="Normal">Exercises.</text:p>
      <text:p text:style-name="Normal"/>
      <text:p text:style-name="Normal">Real-world applications.</text:p>
      <text:p text:style-name="Normal"/>
      <text:p text:style-name="Normal">Portfolio opportunities.</text:p>
      <text:p text:style-name="Normal"/>
      <text:p text:style-name="Normal">Knowledge becomes valuable only when applied.</text:p>
      <text:p text:style-name="Normal"/>
      <text:p text:style-name="Normal">---</text:p>
      <text:p text:style-name="Normal"/>
      <text:p text:style-name="Normal"># 7.12 Principle #11 — AI Should Think Like a Mentor</text:p>
      <text:p text:style-name="Normal"/>
      <text:p text:style-name="Normal">The AI should not behave like a search engine.</text:p>
      <text:p text:style-name="Normal"/>
      <text:p text:style-name="Normal">A mentor asks questions.</text:p>
      <text:p text:style-name="Normal"/>
      <text:p text:style-name="Normal">Listens carefully.</text:p>
      <text:p text:style-name="Normal"/>
      <text:p text:style-name="Normal">Understands context.</text:p>
      <text:p text:style-name="Normal"/>
      <text:p text:style-name="Normal">Challenges assumptions.</text:p>
      <text:p text:style-name="Normal"/>
      <text:p text:style-name="Normal">Provides encouragement.</text:p>
      <text:p text:style-name="Normal"/>
      <text:p text:style-name="Normal">Recognizes progress.</text:p>
      <text:p text:style-name="Normal"/>
      <text:p text:style-name="Normal">Offers perspective.</text:p>
      <text:p text:style-name="Normal"/>
      <text:soft-page-break/>
      <text:p text:style-name="Normal">This should define every AI interaction.</text:p>
      <text:p text:style-name="Normal"/>
      <text:p text:style-name="Normal">---</text:p>
      <text:p text:style-name="Normal"/>
      <text:p text:style-name="Normal"># 7.13 Principle #12 — Trust Is Earned Daily</text:p>
      <text:p text:style-name="Normal"/>
      <text:p text:style-name="Normal">Trust is not built through branding.</text:p>
      <text:p text:style-name="Normal"/>
      <text:p text:style-name="Normal">Trust is built through consistently making good recommendations.</text:p>
      <text:p text:style-name="Normal"/>
      <text:p text:style-name="Normal">Every interaction either increases or decreases trust.</text:p>
      <text:p text:style-name="Normal"/>
      <text:p text:style-name="Normal">There is no neutral interaction.</text:p>
      <text:p text:style-name="Normal"/>
      <text:p text:style-name="Normal">The platform should protect trust above all else.</text:p>
      <text:p text:style-name="Normal"/>
      <text:p text:style-name="Normal">---</text:p>
      <text:p text:style-name="Normal"/>
      <text:p text:style-name="Normal"># 7.14 Principle #13 — Simplicity Is a Competitive Advantage</text:p>
      <text:p text:style-name="Normal"/>
      <text:p text:style-name="Normal">Complex interfaces create confusion.</text:p>
      <text:p text:style-name="Normal"/>
      <text:p text:style-name="Normal">Simple interfaces create confidence.</text:p>
      <text:p text:style-name="Normal"/>
      <text:p text:style-name="Normal">Behind every simple experience may exist enormous complexity.</text:p>
      <text:p text:style-name="Normal"/>
      <text:p text:style-name="Normal">That complexity belongs inside the system—not inside the user's mind.</text:p>
      <text:p text:style-name="Normal"/>
      <text:soft-page-break/>
      <text:p text:style-name="Normal">The user should never experience unnecessary friction.</text:p>
      <text:p text:style-name="Normal"/>
      <text:p text:style-name="Normal">---</text:p>
      <text:p text:style-name="Normal"/>
      <text:p text:style-name="Normal"># 7.15 Principle #14 — Design for the Next Decade</text:p>
      <text:p text:style-name="Normal"/>
      <text:p text:style-name="Normal">Do not build for today's AI landscape.</text:p>
      <text:p text:style-name="Normal"/>
      <text:p text:style-name="Normal">Build for tomorrow's.</text:p>
      <text:p text:style-name="Normal"/>
      <text:p text:style-name="Normal">Assume:</text:p>
      <text:p text:style-name="Normal"/>
      <text:p text:style-name="Normal">New careers.</text:p>
      <text:p text:style-name="Normal"/>
      <text:p text:style-name="Normal">New models.</text:p>
      <text:p text:style-name="Normal"/>
      <text:p text:style-name="Normal">New tools.</text:p>
      <text:p text:style-name="Normal"/>
      <text:p text:style-name="Normal">New workflows.</text:p>
      <text:p text:style-name="Normal"/>
      <text:p text:style-name="Normal">New industries.</text:p>
      <text:p text:style-name="Normal"/>
      <text:p text:style-name="Normal">The platform architecture should evolve without requiring complete redesigns.</text:p>
      <text:p text:style-name="Normal"/>
      <text:p text:style-name="Normal">Scalability begins with good principles.</text:p>
      <text:p text:style-name="Normal"/>
      <text:p text:style-name="Normal">---</text:p>
      <text:p text:style-name="Normal"/>
      <text:soft-page-break/>
      <text:p text:style-name="Normal"># 7.16 Principle #15 — Build an Ecosystem, Not Features</text:p>
      <text:p text:style-name="Normal"/>
      <text:p text:style-name="Normal">Features solve isolated problems.</text:p>
      <text:p text:style-name="Normal"/>
      <text:p text:style-name="Normal">Ecosystems solve complete journeys.</text:p>
      <text:p text:style-name="Normal"/>
      <text:p text:style-name="Normal">Every new capability should strengthen the ecosystem.</text:p>
      <text:p text:style-name="Normal"/>
      <text:p text:style-name="Normal">Not simply increase the feature count.</text:p>
      <text:p text:style-name="Normal"/>
      <text:p text:style-name="Normal">The value of AI Career OS grows through the relationships between its components.</text:p>
      <text:p text:style-name="Normal"/>
      <text:p text:style-name="Normal">Career DNA.</text:p>
      <text:p text:style-name="Normal"/>
      <text:p text:style-name="Normal">CV Analyzer.</text:p>
      <text:p text:style-name="Normal"/>
      <text:p text:style-name="Normal">Dashboard.</text:p>
      <text:p text:style-name="Normal"/>
      <text:p text:style-name="Normal">AI Coach.</text:p>
      <text:p text:style-name="Normal"/>
      <text:p text:style-name="Normal">Knowledge Graph.</text:p>
      <text:p text:style-name="Normal"/>
      <text:p text:style-name="Normal">Roadmaps.</text:p>
      <text:p text:style-name="Normal"/>
      <text:p text:style-name="Normal">Projects.</text:p>
      <text:p text:style-name="Normal"/>
      <text:p text:style-name="Normal">Everything should work together.</text:p>
      <text:p text:style-name="Normal"/>
      <text:soft-page-break/>
      <text:p text:style-name="Normal">---</text:p>
      <text:p text:style-name="Normal"/>
      <text:p text:style-name="Normal"># Product Principles Summary</text:p>
      <text:p text:style-name="Normal"/>
      <text:p text:style-name="Normal">Every future decision should reinforce these fifteen principles.</text:p>
      <text:p text:style-name="Normal"/>
      <text:p text:style-name="Normal">When uncertainty exists, choose the option that:</text:p>
      <text:p text:style-name="Normal"/>
      <text:p text:style-name="Normal">• Improves user success.</text:p>
      <text:p text:style-name="Normal"/>
      <text:p text:style-name="Normal">• Builds trust.</text:p>
      <text:p text:style-name="Normal"/>
      <text:p text:style-name="Normal">• Reduces confusion.</text:p>
      <text:p text:style-name="Normal"/>
      <text:p text:style-name="Normal">• Increases personalization.</text:p>
      <text:p text:style-name="Normal"/>
      <text:p text:style-name="Normal">• Encourages progress.</text:p>
      <text:p text:style-name="Normal"/>
      <text:p text:style-name="Normal">• Explains reasoning.</text:p>
      <text:p text:style-name="Normal"/>
      <text:p text:style-name="Normal">• Creates confidence.</text:p>
      <text:p text:style-name="Normal"/>
      <text:p text:style-name="Normal">• Strengthens the ecosystem.</text:p>
      <text:p text:style-name="Normal"/>
      <text:p text:style-name="Normal">If a decision violates these principles, it should be reconsidered.</text:p>
      <text:p text:style-name="Normal"/>
      <text:p text:style-name="Normal">---</text:p>
      <text:p text:style-name="Normal"/>
      <text:soft-page-break/>
      <text:p text:style-name="Normal"># Product Principles Statement</text:p>
      <text:p text:style-name="Normal"/>
      <text:p text:style-name="Normal">**AI Career OS is built on the belief that the best products do not simply provide information—they provide direction, confidence, and meaningful progress through deeply personalized experiences.**</text:p>
      <text:p text:style-name="Normal"/>
      <text:p text:style-name="Normal">---</text:p>
      <text:p text:style-name="Normal"/>
      <text:p text:style-name="Normal"># End of Volume 7</text:p>
      <text:p text:style-name="Normal"/>
      <text:p text:style-name="Normal">**Next Volume:** User Psychology</text:p>
      <text:p text:style-name="Normal"/>
      <text:p text:style-name="Normal">#<text:s/><text:span text:style-name="T38">📘</text:span><text:s/>Volume 8</text:p>
      <text:p text:style-name="Normal"/>
      <text:p text:style-name="Normal"># User Psychology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8.1 Why User Psychology Matters</text:p>
      <text:p text:style-name="Normal"/>
      <text:p text:style-name="Normal">Most products are built around features.</text:p>
      <text:p text:style-name="Normal"/>
      <text:p text:style-name="Normal">Great products are built around people.</text:p>
      <text:p text:style-name="Normal"/>
      <text:p text:style-name="Normal">Exceptional products are built around psychology.</text:p>
      <text:p text:style-name="Normal"/>
      <text:soft-page-break/>
      <text:p text:style-name="Normal">AI Career OS is not solving a technical problem.</text:p>
      <text:p text:style-name="Normal"/>
      <text:p text:style-name="Normal">It is solving an emotional problem.</text:p>
      <text:p text:style-name="Normal"/>
      <text:p text:style-name="Normal">People do not hesitate because AI is difficult.</text:p>
      <text:p text:style-name="Normal"/>
      <text:p text:style-name="Normal">They hesitate because they are uncertain.</text:p>
      <text:p text:style-name="Normal"/>
      <text:p text:style-name="Normal">Fear.</text:p>
      <text:p text:style-name="Normal"/>
      <text:p text:style-name="Normal">Confusion.</text:p>
      <text:p text:style-name="Normal"/>
      <text:p text:style-name="Normal">Self-doubt.</text:p>
      <text:p text:style-name="Normal"/>
      <text:p text:style-name="Normal">Information overload.</text:p>
      <text:p text:style-name="Normal"/>
      <text:p text:style-name="Normal">Comparison.</text:p>
      <text:p text:style-name="Normal"/>
      <text:p text:style-name="Normal">These emotions stop more careers than technology ever will.</text:p>
      <text:p text:style-name="Normal"/>
      <text:p text:style-name="Normal">Understanding these emotions is essential.</text:p>
      <text:p text:style-name="Normal"/>
      <text:p text:style-name="Normal">Before we teach users...</text:p>
      <text:p text:style-name="Normal"/>
      <text:p text:style-name="Normal">We must understand them.</text:p>
      <text:p text:style-name="Normal"/>
      <text:p text:style-name="Normal">---</text:p>
      <text:p text:style-name="Normal"/>
      <text:soft-page-break/>
      <text:p text:style-name="Normal"># 8.2 The Emotional State Before Entering AI</text:p>
      <text:p text:style-name="Normal"/>
      <text:p text:style-name="Normal">Before discovering AI Career OS, many users experience the same thoughts.</text:p>
      <text:p text:style-name="Normal"/>
      <text:p text:style-name="Normal">"I think AI is the future."</text:p>
      <text:p text:style-name="Normal"/>
      <text:p text:style-name="Normal">"I don't know where to start."</text:p>
      <text:p text:style-name="Normal"/>
      <text:p text:style-name="Normal">"I don't know if I'm smart enough."</text:p>
      <text:p text:style-name="Normal"/>
      <text:p text:style-name="Normal">"I don't know which career fits me."</text:p>
      <text:p text:style-name="Normal"/>
      <text:p text:style-name="Normal">"I'm probably already too late."</text:p>
      <text:p text:style-name="Normal"/>
      <text:p text:style-name="Normal">"I don't want to waste a year learning the wrong things."</text:p>
      <text:p text:style-name="Normal"/>
      <text:p text:style-name="Normal">"I see everyone talking about AI."</text:p>
      <text:p text:style-name="Normal"/>
      <text:p text:style-name="Normal">"I don't want to miss this opportunity."</text:p>
      <text:p text:style-name="Normal"/>
      <text:p text:style-name="Normal">The product should acknowledge these emotions.</text:p>
      <text:p text:style-name="Normal"/>
      <text:p text:style-name="Normal">Never ignore them.</text:p>
      <text:p text:style-name="Normal"/>
      <text:p text:style-name="Normal">---</text:p>
      <text:p text:style-name="Normal"/>
      <text:p text:style-name="Normal"># 8.3 The Fear of Choosing the Wrong Path</text:p>
      <text:p text:style-name="Normal"/>
      <text:soft-page-break/>
      <text:p text:style-name="Normal">One of the strongest emotional barriers is not learning.</text:p>
      <text:p text:style-name="Normal"/>
      <text:p text:style-name="Normal">It is choosing.</text:p>
      <text:p text:style-name="Normal"/>
      <text:p text:style-name="Normal">Imagine a user asking:</text:p>
      <text:p text:style-name="Normal"/>
      <text:p text:style-name="Normal">Should I become:</text:p>
      <text:p text:style-name="Normal"/>
      <text:p text:style-name="Normal">Prompt Engineer?</text:p>
      <text:p text:style-name="Normal"/>
      <text:p text:style-name="Normal">Machine Learning Engineer?</text:p>
      <text:p text:style-name="Normal"/>
      <text:p text:style-name="Normal">AI Engineer?</text:p>
      <text:p text:style-name="Normal"/>
      <text:p text:style-name="Normal">Data Scientist?</text:p>
      <text:p text:style-name="Normal"/>
      <text:p text:style-name="Normal">MLOps Engineer?</text:p>
      <text:p text:style-name="Normal"/>
      <text:p text:style-name="Normal">AI Product Manager?</text:p>
      <text:p text:style-name="Normal"/>
      <text:p text:style-name="Normal">Automation Engineer?</text:p>
      <text:p text:style-name="Normal"/>
      <text:p text:style-name="Normal">LLM Engineer?</text:p>
      <text:p text:style-name="Normal"/>
      <text:p text:style-name="Normal">Computer Vision Engineer?</text:p>
      <text:p text:style-name="Normal"/>
      <text:p text:style-name="Normal">AI Consultant?</text:p>
      <text:p text:style-name="Normal"/>
      <text:soft-page-break/>
      <text:p text:style-name="Normal">The user doesn't know.</text:p>
      <text:p text:style-name="Normal"/>
      <text:p text:style-name="Normal">Every decision feels expensive.</text:p>
      <text:p text:style-name="Normal"/>
      <text:p text:style-name="Normal">Every wrong decision feels like months of wasted time.</text:p>
      <text:p text:style-name="Normal"/>
      <text:p text:style-name="Normal">AI Career OS exists to remove this burden.</text:p>
      <text:p text:style-name="Normal"/>
      <text:p text:style-name="Normal">The platform should make users feel:</text:p>
      <text:p text:style-name="Normal"/>
      <text:p text:style-name="Normal">"You don't have to figure this out alone."</text:p>
      <text:p text:style-name="Normal"/>
      <text:p text:style-name="Normal">---</text:p>
      <text:p text:style-name="Normal"/>
      <text:p text:style-name="Normal"># 8.4 Information Overload</text:p>
      <text:p text:style-name="Normal"/>
      <text:p text:style-name="Normal">The AI industry produces more content every day than most people can consume.</text:p>
      <text:p text:style-name="Normal"/>
      <text:p text:style-name="Normal">Users experience:</text:p>
      <text:p text:style-name="Normal"/>
      <text:p text:style-name="Normal">YouTube tutorials.</text:p>
      <text:p text:style-name="Normal"/>
      <text:p text:style-name="Normal">Blog posts.</text:p>
      <text:p text:style-name="Normal"/>
      <text:p text:style-name="Normal">Podcasts.</text:p>
      <text:p text:style-name="Normal"/>
      <text:p text:style-name="Normal">Newsletters.</text:p>
      <text:p text:style-name="Normal"/>
      <text:soft-page-break/>
      <text:p text:style-name="Normal">Courses.</text:p>
      <text:p text:style-name="Normal"/>
      <text:p text:style-name="Normal">Roadmaps.</text:p>
      <text:p text:style-name="Normal"/>
      <text:p text:style-name="Normal">GitHub repositories.</text:p>
      <text:p text:style-name="Normal"/>
      <text:p text:style-name="Normal">LinkedIn advice.</text:p>
      <text:p text:style-name="Normal"/>
      <text:p text:style-name="Normal">ChatGPT.</text:p>
      <text:p text:style-name="Normal"/>
      <text:p text:style-name="Normal">Claude.</text:p>
      <text:p text:style-name="Normal"/>
      <text:p text:style-name="Normal">Gemini.</text:p>
      <text:p text:style-name="Normal"/>
      <text:p text:style-name="Normal">Reddit.</text:p>
      <text:p text:style-name="Normal"/>
      <text:p text:style-name="Normal">Forums.</text:p>
      <text:p text:style-name="Normal"/>
      <text:p text:style-name="Normal">Every source competes for attention.</text:p>
      <text:p text:style-name="Normal"/>
      <text:p text:style-name="Normal">Very few provide clarity.</text:p>
      <text:p text:style-name="Normal"/>
      <text:p text:style-name="Normal">The platform should simplify complexity.</text:p>
      <text:p text:style-name="Normal"/>
      <text:p text:style-name="Normal">Not increase it.</text:p>
      <text:p text:style-name="Normal"/>
      <text:p text:style-name="Normal">---</text:p>
      <text:p text:style-name="Normal"/>
      <text:soft-page-break/>
      <text:p text:style-name="Normal"># 8.5 Comparison Anxiety</text:p>
      <text:p text:style-name="Normal"/>
      <text:p text:style-name="Normal">Users constantly compare themselves with others.</text:p>
      <text:p text:style-name="Normal"/>
      <text:p text:style-name="Normal">"I started too late."</text:p>
      <text:p text:style-name="Normal"/>
      <text:p text:style-name="Normal">"They already know Python."</text:p>
      <text:p text:style-name="Normal"/>
      <text:p text:style-name="Normal">"They already have projects."</text:p>
      <text:p text:style-name="Normal"/>
      <text:p text:style-name="Normal">"They already work in AI."</text:p>
      <text:p text:style-name="Normal"/>
      <text:p text:style-name="Normal">"They are younger."</text:p>
      <text:p text:style-name="Normal"/>
      <text:p text:style-name="Normal">"They have a Computer Science degree."</text:p>
      <text:p text:style-name="Normal"/>
      <text:p text:style-name="Normal">Comparison destroys motivation.</text:p>
      <text:p text:style-name="Normal"/>
      <text:p text:style-name="Normal">AI Career OS should redirect attention away from others...</text:p>
      <text:p text:style-name="Normal"/>
      <text:p text:style-name="Normal">...and toward personal progress.</text:p>
      <text:p text:style-name="Normal"/>
      <text:p text:style-name="Normal">The only comparison that matters is:</text:p>
      <text:p text:style-name="Normal"/>
      <text:p text:style-name="Normal">Yesterday's version of yourself.</text:p>
      <text:p text:style-name="Normal"/>
      <text:p text:style-name="Normal">---</text:p>
      <text:p text:style-name="Normal"/>
      <text:soft-page-break/>
      <text:p text:style-name="Normal"># 8.6 Fear of Failure</text:p>
      <text:p text:style-name="Normal"/>
      <text:p text:style-name="Normal">Many users delay learning because they fear failure.</text:p>
      <text:p text:style-name="Normal"/>
      <text:p text:style-name="Normal">They believe:</text:p>
      <text:p text:style-name="Normal"/>
      <text:p text:style-name="Normal">"If I can't become an AI Engineer, why start?"</text:p>
      <text:p text:style-name="Normal"/>
      <text:p text:style-name="Normal">The platform should normalize learning.</text:p>
      <text:p text:style-name="Normal"/>
      <text:p text:style-name="Normal">Mistakes.</text:p>
      <text:p text:style-name="Normal"/>
      <text:p text:style-name="Normal">Slow progress.</text:p>
      <text:p text:style-name="Normal"/>
      <text:p text:style-name="Normal">Changing careers.</text:p>
      <text:p text:style-name="Normal"/>
      <text:p text:style-name="Normal">Changing direction.</text:p>
      <text:p text:style-name="Normal"/>
      <text:p text:style-name="Normal">Every successful professional has experienced uncertainty.</text:p>
      <text:p text:style-name="Normal"/>
      <text:p text:style-name="Normal">The product should communicate this consistently.</text:p>
      <text:p text:style-name="Normal"/>
      <text:p text:style-name="Normal">---</text:p>
      <text:p text:style-name="Normal"/>
      <text:p text:style-name="Normal"># 8.7 Decision Fatigue</text:p>
      <text:p text:style-name="Normal"/>
      <text:p text:style-name="Normal">AI changes every week.</text:p>
      <text:p text:style-name="Normal"/>
      <text:soft-page-break/>
      <text:p text:style-name="Normal">New models.</text:p>
      <text:p text:style-name="Normal"/>
      <text:p text:style-name="Normal">New frameworks.</text:p>
      <text:p text:style-name="Normal"/>
      <text:p text:style-name="Normal">New tools.</text:p>
      <text:p text:style-name="Normal"/>
      <text:p text:style-name="Normal">New libraries.</text:p>
      <text:p text:style-name="Normal"/>
      <text:p text:style-name="Normal">New careers.</text:p>
      <text:p text:style-name="Normal"/>
      <text:p text:style-name="Normal">New opinions.</text:p>
      <text:p text:style-name="Normal"/>
      <text:p text:style-name="Normal">Users become mentally exhausted.</text:p>
      <text:p text:style-name="Normal"/>
      <text:p text:style-name="Normal">The platform should remove unnecessary decisions.</text:p>
      <text:p text:style-name="Normal"/>
      <text:p text:style-name="Normal">Instead of asking:</text:p>
      <text:p text:style-name="Normal"/>
      <text:p text:style-name="Normal">"What do you want to learn today?"</text:p>
      <text:p text:style-name="Normal"/>
      <text:p text:style-name="Normal">The platform should say:</text:p>
      <text:p text:style-name="Normal"/>
      <text:p text:style-name="Normal">"Based on your progress, today we recommend this."</text:p>
      <text:p text:style-name="Normal"/>
      <text:p text:style-name="Normal">Reducing cognitive load is one of our competitive advantages.</text:p>
      <text:p text:style-name="Normal"/>
      <text:p text:style-name="Normal">---</text:p>
      <text:p text:style-name="Normal"/>
      <text:soft-page-break/>
      <text:p text:style-name="Normal"># 8.8 Motivation Is Temporary</text:p>
      <text:p text:style-name="Normal"/>
      <text:p text:style-name="Normal">Motivation naturally fluctuates.</text:p>
      <text:p text:style-name="Normal"/>
      <text:p text:style-name="Normal">Discipline is difficult.</text:p>
      <text:p text:style-name="Normal"/>
      <text:p text:style-name="Normal">Consistency is harder.</text:p>
      <text:p text:style-name="Normal"/>
      <text:p text:style-name="Normal">Therefore, the platform should never depend on motivation alone.</text:p>
      <text:p text:style-name="Normal"/>
      <text:p text:style-name="Normal">Instead, it should build systems.</text:p>
      <text:p text:style-name="Normal"/>
      <text:p text:style-name="Normal">Daily progress.</text:p>
      <text:p text:style-name="Normal"/>
      <text:p text:style-name="Normal">Weekly goals.</text:p>
      <text:p text:style-name="Normal"/>
      <text:p text:style-name="Normal">Milestones.</text:p>
      <text:p text:style-name="Normal"/>
      <text:p text:style-name="Normal">Achievements.</text:p>
      <text:p text:style-name="Normal"/>
      <text:p text:style-name="Normal">Learning streaks.</text:p>
      <text:p text:style-name="Normal"/>
      <text:p text:style-name="Normal">Visual progress.</text:p>
      <text:p text:style-name="Normal"/>
      <text:p text:style-name="Normal">Encouragement.</text:p>
      <text:p text:style-name="Normal"/>
      <text:p text:style-name="Normal">Momentum.</text:p>
      <text:p text:style-name="Normal"/>
      <text:soft-page-break/>
      <text:p text:style-name="Normal">The product should help users continue even when motivation disappears.</text:p>
      <text:p text:style-name="Normal"/>
      <text:p text:style-name="Normal">---</text:p>
      <text:p text:style-name="Normal"/>
      <text:p text:style-name="Normal"># 8.9 Confidence Grows Through Evidence</text:p>
      <text:p text:style-name="Normal"/>
      <text:p text:style-name="Normal">Confidence should never be generated by motivational quotes.</text:p>
      <text:p text:style-name="Normal"/>
      <text:p text:style-name="Normal">It should be generated by evidence.</text:p>
      <text:p text:style-name="Normal"/>
      <text:p text:style-name="Normal">Examples:</text:p>
      <text:p text:style-name="Normal"/>
      <text:p text:style-name="Normal">"You completed your first AI project."</text:p>
      <text:p text:style-name="Normal"/>
      <text:p text:style-name="Normal">"You improved your Python score by 23%."</text:p>
      <text:p text:style-name="Normal"/>
      <text:p text:style-name="Normal">"You are now 68% job ready."</text:p>
      <text:p text:style-name="Normal"/>
      <text:p text:style-name="Normal">"You successfully solved five API challenges."</text:p>
      <text:p text:style-name="Normal"/>
      <text:p text:style-name="Normal">Evidence creates confidence.</text:p>
      <text:p text:style-name="Normal"/>
      <text:p text:style-name="Normal">Confidence creates action.</text:p>
      <text:p text:style-name="Normal"/>
      <text:p text:style-name="Normal">Action creates results.</text:p>
      <text:p text:style-name="Normal"/>
      <text:p text:style-name="Normal">---</text:p>
      <text:p text:style-name="Normal"/>
      <text:soft-page-break/>
      <text:p text:style-name="Normal"># 8.10 Users Want Certainty</text:p>
      <text:p text:style-name="Normal"/>
      <text:p text:style-name="Normal">People don't simply ask questions.</text:p>
      <text:p text:style-name="Normal"/>
      <text:p text:style-name="Normal">They seek certainty.</text:p>
      <text:p text:style-name="Normal"/>
      <text:p text:style-name="Normal">Questions like:</text:p>
      <text:p text:style-name="Normal"/>
      <text:p text:style-name="Normal">Am I learning the right thing?</text:p>
      <text:p text:style-name="Normal"/>
      <text:p text:style-name="Normal">Am I wasting time?</text:p>
      <text:p text:style-name="Normal"/>
      <text:p text:style-name="Normal">Am I making progress?</text:p>
      <text:p text:style-name="Normal"/>
      <text:p text:style-name="Normal">Will this help me get hired?</text:p>
      <text:p text:style-name="Normal"/>
      <text:p text:style-name="Normal">AI Career OS should reduce uncertainty through intelligent explanations.</text:p>
      <text:p text:style-name="Normal"/>
      <text:p text:style-name="Normal">The platform should rarely say:</text:p>
      <text:p text:style-name="Normal"/>
      <text:p text:style-name="Normal">"It depends."</text:p>
      <text:p text:style-name="Normal"/>
      <text:p text:style-name="Normal">Instead, it should explain:</text:p>
      <text:p text:style-name="Normal"/>
      <text:p text:style-name="Normal">"Based on your profile, this is the best next step."</text:p>
      <text:p text:style-name="Normal"/>
      <text:p text:style-name="Normal">---</text:p>
      <text:p text:style-name="Normal"/>
      <text:soft-page-break/>
      <text:p text:style-name="Normal"># 8.11 Identity Is More Powerful Than Motivation</text:p>
      <text:p text:style-name="Normal"/>
      <text:p text:style-name="Normal">People sustain habits when those habits become part of their identity.</text:p>
      <text:p text:style-name="Normal"/>
      <text:p text:style-name="Normal">Instead of making users feel like:</text:p>
      <text:p text:style-name="Normal"/>
      <text:p text:style-name="Normal">Someone learning AI...</text:p>
      <text:p text:style-name="Normal"/>
      <text:p text:style-name="Normal">The platform should gradually help them become:</text:p>
      <text:p text:style-name="Normal"/>
      <text:p text:style-name="Normal">An AI professional.</text:p>
      <text:p text:style-name="Normal"/>
      <text:p text:style-name="Normal">This shift is subtle but powerful.</text:p>
      <text:p text:style-name="Normal"/>
      <text:p text:style-name="Normal">Every interaction should reinforce identity.</text:p>
      <text:p text:style-name="Normal"/>
      <text:p text:style-name="Normal">Examples:</text:p>
      <text:p text:style-name="Normal"/>
      <text:p text:style-name="Normal">"You're becoming an AI Automation Engineer."</text:p>
      <text:p text:style-name="Normal"/>
      <text:p text:style-name="Normal">"You've completed another milestone."</text:p>
      <text:p text:style-name="Normal"/>
      <text:p text:style-name="Normal">"You're building professional-level skills."</text:p>
      <text:p text:style-name="Normal"/>
      <text:p text:style-name="Normal">Identity drives long-term consistency.</text:p>
      <text:p text:style-name="Normal"/>
      <text:p text:style-name="Normal">---</text:p>
      <text:p text:style-name="Normal"/>
      <text:soft-page-break/>
      <text:p text:style-name="Normal"># 8.12 Small Wins Matter</text:p>
      <text:p text:style-name="Normal"/>
      <text:p text:style-name="Normal">Large goals feel overwhelming.</text:p>
      <text:p text:style-name="Normal"/>
      <text:p text:style-name="Normal">Small wins feel achievable.</text:p>
      <text:p text:style-name="Normal"/>
      <text:p text:style-name="Normal">The platform should celebrate:</text:p>
      <text:p text:style-name="Normal"/>
      <text:p text:style-name="Normal">Completing a lesson.</text:p>
      <text:p text:style-name="Normal"/>
      <text:p text:style-name="Normal">Finishing a project.</text:p>
      <text:p text:style-name="Normal"/>
      <text:p text:style-name="Normal">Improving a skill.</text:p>
      <text:p text:style-name="Normal"/>
      <text:p text:style-name="Normal">Building consistency.</text:p>
      <text:p text:style-name="Normal"/>
      <text:p text:style-name="Normal">Passing an assessment.</text:p>
      <text:p text:style-name="Normal"/>
      <text:p text:style-name="Normal">Helping another community member.</text:p>
      <text:p text:style-name="Normal"/>
      <text:p text:style-name="Normal">Every small success reinforces long-term behavior.</text:p>
      <text:p text:style-name="Normal"/>
      <text:p text:style-name="Normal">---</text:p>
      <text:p text:style-name="Normal"/>
      <text:p text:style-name="Normal"># 8.13 Hope Is a Product Feature</text:p>
      <text:p text:style-name="Normal"/>
      <text:p text:style-name="Normal">Many users arrive discouraged.</text:p>
      <text:p text:style-name="Normal"/>
      <text:soft-page-break/>
      <text:p text:style-name="Normal">Some believe they are too old.</text:p>
      <text:p text:style-name="Normal"/>
      <text:p text:style-name="Normal">Others believe they lack technical ability.</text:p>
      <text:p text:style-name="Normal"/>
      <text:p text:style-name="Normal">Others think AI is only for programmers.</text:p>
      <text:p text:style-name="Normal"/>
      <text:p text:style-name="Normal">The platform should create hope without creating false expectations.</text:p>
      <text:p text:style-name="Normal"/>
      <text:p text:style-name="Normal">Hope should be grounded in evidence.</text:p>
      <text:p text:style-name="Normal"/>
      <text:p text:style-name="Normal">Examples.</text:p>
      <text:p text:style-name="Normal"/>
      <text:p text:style-name="Normal">Success stories.</text:p>
      <text:p text:style-name="Normal"/>
      <text:p text:style-name="Normal">Personalized plans.</text:p>
      <text:p text:style-name="Normal"/>
      <text:p text:style-name="Normal">Visible progress.</text:p>
      <text:p text:style-name="Normal"/>
      <text:p text:style-name="Normal">Realistic timelines.</text:p>
      <text:p text:style-name="Normal"/>
      <text:p text:style-name="Normal">Hope is not marketing.</text:p>
      <text:p text:style-name="Normal"/>
      <text:p text:style-name="Normal">Hope is a product outcome.</text:p>
      <text:p text:style-name="Normal"/>
      <text:p text:style-name="Normal">---</text:p>
      <text:p text:style-name="Normal"/>
      <text:p text:style-name="Normal"># 8.14 Psychological Goals</text:p>
      <text:p text:style-name="Normal"/>
      <text:soft-page-break/>
      <text:p text:style-name="Normal">When users leave any session, they should feel at least one of the following:</text:p>
      <text:p text:style-name="Normal"/>
      <text:p text:style-name="Normal">"I know what to do next."</text:p>
      <text:p text:style-name="Normal"/>
      <text:p text:style-name="Normal">"I'm making progress."</text:p>
      <text:p text:style-name="Normal"/>
      <text:p text:style-name="Normal">"I understand AI better."</text:p>
      <text:p text:style-name="Normal"/>
      <text:p text:style-name="Normal">"I feel more confident."</text:p>
      <text:p text:style-name="Normal"/>
      <text:p text:style-name="Normal">"I believe this goal is achievable."</text:p>
      <text:p text:style-name="Normal"/>
      <text:p text:style-name="Normal">"I've moved closer to my future."</text:p>
      <text:p text:style-name="Normal"/>
      <text:p text:style-name="Normal">If users consistently experience these emotions, they will continue their journey.</text:p>
      <text:p text:style-name="Normal"/>
      <text:p text:style-name="Normal">---</text:p>
      <text:p text:style-name="Normal"/>
      <text:p text:style-name="Normal"># User Psychology Statement</text:p>
      <text:p text:style-name="Normal"/>
      <text:p text:style-name="Normal">**People rarely fail because they lack intelligence.**</text:p>
      <text:p text:style-name="Normal"/>
      <text:p text:style-name="Normal">**They fail because uncertainty becomes stronger than momentum.**</text:p>
      <text:p text:style-name="Normal"/>
      <text:p text:style-name="Normal">AI Career OS exists to replace uncertainty with confidence, complexity with clarity, and hesitation with purposeful action.</text:p>
      <text:p text:style-name="Normal"/>
      <text:p text:style-name="Normal">---</text:p>
      <text:p text:style-name="Normal"/>
      <text:p text:style-name="Normal"># End of Volume 8</text:p>
      <text:p text:style-name="Normal"/>
      <text:p text:style-name="Normal">**Next Volume:** User Personas</text:p>
      <text:p text:style-name="Normal"/>
      <text:p text:style-name="Normal">#<text:s/><text:span text:style-name="T39">📘</text:span><text:s/>Volume 9</text:p>
      <text:p text:style-name="Normal"/>
      <text:p text:style-name="Normal"># User Personas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9.1 Why Personas Matter</text:p>
      <text:p text:style-name="Normal"/>
      <text:p text:style-name="Normal">AI Career OS is not built for "everyone."</text:p>
      <text:p text:style-name="Normal"/>
      <text:p text:style-name="Normal">It is built for specific people with specific goals, fears, motivations, and backgrounds.</text:p>
      <text:p text:style-name="Normal"/>
      <text:p text:style-name="Normal">The platform should recognize that every user enters the AI journey from a different starting point.</text:p>
      <text:p text:style-name="Normal"/>
      <text:p text:style-name="Normal">Understanding these differences allows Artificial Intelligence to personalize every recommendation.</text:p>
      <text:p text:style-name="Normal"/>
      <text:p text:style-name="Normal">The objective is not simply to identify who users are.</text:p>
      <text:p text:style-name="Normal"/>
      <text:p text:style-name="Normal">The objective is to understand how they think.</text:p>
      <text:p text:style-name="Normal"/>
      <text:p text:style-name="Normal">---</text:p>
      <text:p text:style-name="Normal"/>
      <text:p text:style-name="Normal"># Persona 01 — The Career Changer</text:p>
      <text:p text:style-name="Normal"/>
      <text:p text:style-name="Normal">## Overview</text:p>
      <text:p text:style-name="Normal"/>
      <text:p text:style-name="Normal">This user already has professional experience but wants to transition into Artificial Intelligence.</text:p>
      <text:p text:style-name="Normal"/>
      <text:p text:style-name="Normal">Examples include:</text:p>
      <text:p text:style-name="Normal"/>
      <text:p text:style-name="Normal">• Marketing Specialists</text:p>
      <text:p text:style-name="Normal"/>
      <text:p text:style-name="Normal">• Accountants</text:p>
      <text:p text:style-name="Normal"/>
      <text:p text:style-name="Normal">• HR Professionals</text:p>
      <text:p text:style-name="Normal"/>
      <text:p text:style-name="Normal">• Sales Managers</text:p>
      <text:p text:style-name="Normal"/>
      <text:p text:style-name="Normal">• Project Managers</text:p>
      <text:p text:style-name="Normal"/>
      <text:p text:style-name="Normal">• Operations Specialists</text:p>
      <text:p text:style-name="Normal"/>
      <text:p text:style-name="Normal">• Business Analysts</text:p>
      <text:p text:style-name="Normal"/>
      <text:p text:style-name="Normal">---</text:p>
      <text:p text:style-name="Normal"/>
      <text:soft-page-break/>
      <text:p text:style-name="Normal">## Primary Goal</text:p>
      <text:p text:style-name="Normal"/>
      <text:p text:style-name="Normal">"I want to move into AI without starting my career from zero."</text:p>
      <text:p text:style-name="Normal"/>
      <text:p text:style-name="Normal">---</text:p>
      <text:p text:style-name="Normal"/>
      <text:p text:style-name="Normal">## Biggest Fears</text:p>
      <text:p text:style-name="Normal"/>
      <text:p text:style-name="Normal">• Choosing the wrong career.</text:p>
      <text:p text:style-name="Normal"/>
      <text:p text:style-name="Normal">• Losing income.</text:p>
      <text:p text:style-name="Normal"/>
      <text:p text:style-name="Normal">• Spending years learning unnecessary skills.</text:p>
      <text:p text:style-name="Normal"/>
      <text:p text:style-name="Normal">• Competing against Computer Science graduates.</text:p>
      <text:p text:style-name="Normal"/>
      <text:p text:style-name="Normal">---</text:p>
      <text:p text:style-name="Normal"/>
      <text:p text:style-name="Normal">## What They Need</text:p>
      <text:p text:style-name="Normal"/>
      <text:p text:style-name="Normal">A clear transition strategy.</text:p>
      <text:p text:style-name="Normal"/>
      <text:p text:style-name="Normal">Transferable skill analysis.</text:p>
      <text:p text:style-name="Normal"/>
      <text:p text:style-name="Normal">A realistic timeline.</text:p>
      <text:p text:style-name="Normal"/>
      <text:p text:style-name="Normal">Confidence.</text:p>
      <text:p text:style-name="Normal"/>
      <text:soft-page-break/>
      <text:p text:style-name="Normal">---</text:p>
      <text:p text:style-name="Normal"/>
      <text:p text:style-name="Normal">## How AI Career OS Helps</text:p>
      <text:p text:style-name="Normal"/>
      <text:p text:style-name="Normal">Career DNA</text:p>
      <text:p text:style-name="Normal"/>
      <text:p text:style-name="Normal">↓</text:p>
      <text:p text:style-name="Normal"/>
      <text:p text:style-name="Normal">Transferable Skill Analysis</text:p>
      <text:p text:style-name="Normal"/>
      <text:p text:style-name="Normal">↓</text:p>
      <text:p text:style-name="Normal"/>
      <text:p text:style-name="Normal">Career Match</text:p>
      <text:p text:style-name="Normal"/>
      <text:p text:style-name="Normal">↓</text:p>
      <text:p text:style-name="Normal"/>
      <text:p text:style-name="Normal">Personalized Roadmap</text:p>
      <text:p text:style-name="Normal"/>
      <text:p text:style-name="Normal">↓</text:p>
      <text:p text:style-name="Normal"/>
      <text:p text:style-name="Normal">Portfolio Plan</text:p>
      <text:p text:style-name="Normal"/>
      <text:p text:style-name="Normal">↓</text:p>
      <text:p text:style-name="Normal"/>
      <text:p text:style-name="Normal">Interview Preparation</text:p>
      <text:p text:style-name="Normal"/>
      <text:p text:style-name="Normal">---</text:p>
      <text:p text:style-name="Normal"/>
      <text:soft-page-break/>
      <text:p text:style-name="Normal"># Persona 02 — The Student</text:p>
      <text:p text:style-name="Normal"/>
      <text:p text:style-name="Normal">## Overview</text:p>
      <text:p text:style-name="Normal"/>
      <text:p text:style-name="Normal">Usually between 18–28 years old.</text:p>
      <text:p text:style-name="Normal"/>
      <text:p text:style-name="Normal">Has limited professional experience.</text:p>
      <text:p text:style-name="Normal"/>
      <text:p text:style-name="Normal">High learning capacity.</text:p>
      <text:p text:style-name="Normal"/>
      <text:p text:style-name="Normal">Needs direction.</text:p>
      <text:p text:style-name="Normal"/>
      <text:p text:style-name="Normal">---</text:p>
      <text:p text:style-name="Normal"/>
      <text:p text:style-name="Normal">## Primary Goal</text:p>
      <text:p text:style-name="Normal"/>
      <text:p text:style-name="Normal">"I want to build my career correctly from the beginning."</text:p>
      <text:p text:style-name="Normal"/>
      <text:p text:style-name="Normal">---</text:p>
      <text:p text:style-name="Normal"/>
      <text:p text:style-name="Normal">## Biggest Fears</text:p>
      <text:p text:style-name="Normal"/>
      <text:p text:style-name="Normal">Learning outdated technologies.</text:p>
      <text:p text:style-name="Normal"/>
      <text:p text:style-name="Normal">Choosing the wrong specialization.</text:p>
      <text:p text:style-name="Normal"/>
      <text:p text:style-name="Normal">Graduating without employable skills.</text:p>
      <text:p text:style-name="Normal"/>
      <text:soft-page-break/>
      <text:p text:style-name="Normal">---</text:p>
      <text:p text:style-name="Normal"/>
      <text:p text:style-name="Normal">## Needs</text:p>
      <text:p text:style-name="Normal"/>
      <text:p text:style-name="Normal">Career exploration.</text:p>
      <text:p text:style-name="Normal"/>
      <text:p text:style-name="Normal">Learning roadmap.</text:p>
      <text:p text:style-name="Normal"/>
      <text:p text:style-name="Normal">Portfolio guidance.</text:p>
      <text:p text:style-name="Normal"/>
      <text:p text:style-name="Normal">Interview preparation.</text:p>
      <text:p text:style-name="Normal"/>
      <text:p text:style-name="Normal">Industry awareness.</text:p>
      <text:p text:style-name="Normal"/>
      <text:p text:style-name="Normal">---</text:p>
      <text:p text:style-name="Normal"/>
      <text:p text:style-name="Normal">## Success Definition</text:p>
      <text:p text:style-name="Normal"/>
      <text:p text:style-name="Normal">Landing the first AI internship or junior position.</text:p>
      <text:p text:style-name="Normal"/>
      <text:p text:style-name="Normal">---</text:p>
      <text:p text:style-name="Normal"/>
      <text:p text:style-name="Normal"># Persona 03 — The Software Engineer</text:p>
      <text:p text:style-name="Normal"/>
      <text:p text:style-name="Normal">## Overview</text:p>
      <text:p text:style-name="Normal"/>
      <text:p text:style-name="Normal">Already knows programming.</text:p>
      <text:p text:style-name="Normal"/>
      <text:soft-page-break/>
      <text:p text:style-name="Normal">Wants to transition into AI.</text:p>
      <text:p text:style-name="Normal"/>
      <text:p text:style-name="Normal">---</text:p>
      <text:p text:style-name="Normal"/>
      <text:p text:style-name="Normal">## Strengths</text:p>
      <text:p text:style-name="Normal"/>
      <text:p text:style-name="Normal">Programming.</text:p>
      <text:p text:style-name="Normal"/>
      <text:p text:style-name="Normal">Problem solving.</text:p>
      <text:p text:style-name="Normal"/>
      <text:p text:style-name="Normal">Git.</text:p>
      <text:p text:style-name="Normal"/>
      <text:p text:style-name="Normal">Software architecture.</text:p>
      <text:p text:style-name="Normal"/>
      <text:p text:style-name="Normal">Development workflow.</text:p>
      <text:p text:style-name="Normal"/>
      <text:p text:style-name="Normal">---</text:p>
      <text:p text:style-name="Normal"/>
      <text:p text:style-name="Normal">## Weaknesses</text:p>
      <text:p text:style-name="Normal"/>
      <text:p text:style-name="Normal">Often lacks AI fundamentals.</text:p>
      <text:p text:style-name="Normal"/>
      <text:p text:style-name="Normal">Machine Learning.</text:p>
      <text:p text:style-name="Normal"/>
      <text:p text:style-name="Normal">LLMs.</text:p>
      <text:p text:style-name="Normal"/>
      <text:p text:style-name="Normal">Prompt Engineering.</text:p>
      <text:p text:style-name="Normal"/>
      <text:soft-page-break/>
      <text:p text:style-name="Normal">AI Architecture.</text:p>
      <text:p text:style-name="Normal"/>
      <text:p text:style-name="Normal">---</text:p>
      <text:p text:style-name="Normal"/>
      <text:p text:style-name="Normal">## Platform Strategy</text:p>
      <text:p text:style-name="Normal"/>
      <text:p text:style-name="Normal">Skip beginner programming.</text:p>
      <text:p text:style-name="Normal"/>
      <text:p text:style-name="Normal">Accelerate AI specialization.</text:p>
      <text:p text:style-name="Normal"/>
      <text:p text:style-name="Normal">Recommend advanced projects.</text:p>
      <text:p text:style-name="Normal"/>
      <text:p text:style-name="Normal">Focus on production AI.</text:p>
      <text:p text:style-name="Normal"/>
      <text:p text:style-name="Normal">---</text:p>
      <text:p text:style-name="Normal"/>
      <text:p text:style-name="Normal"># Persona 04 — The Non-Technical Professional</text:p>
      <text:p text:style-name="Normal"/>
      <text:p text:style-name="Normal">## Overview</text:p>
      <text:p text:style-name="Normal"/>
      <text:p text:style-name="Normal">No programming experience.</text:p>
      <text:p text:style-name="Normal"/>
      <text:p text:style-name="Normal">Interested in AI because of career opportunities.</text:p>
      <text:p text:style-name="Normal"/>
      <text:p text:style-name="Normal">Examples:</text:p>
      <text:p text:style-name="Normal"/>
      <text:p text:style-name="Normal">Teachers.</text:p>
      <text:p text:style-name="Normal"/>
      <text:soft-page-break/>
      <text:p text:style-name="Normal">Lawyers.</text:p>
      <text:p text:style-name="Normal"/>
      <text:p text:style-name="Normal">Recruiters.</text:p>
      <text:p text:style-name="Normal"/>
      <text:p text:style-name="Normal">Administrators.</text:p>
      <text:p text:style-name="Normal"/>
      <text:p text:style-name="Normal">Healthcare workers.</text:p>
      <text:p text:style-name="Normal"/>
      <text:p text:style-name="Normal">Designers.</text:p>
      <text:p text:style-name="Normal"/>
      <text:p text:style-name="Normal">---</text:p>
      <text:p text:style-name="Normal"/>
      <text:p text:style-name="Normal">## Biggest Fear</text:p>
      <text:p text:style-name="Normal"/>
      <text:p text:style-name="Normal">"I'm not technical enough."</text:p>
      <text:p text:style-name="Normal"/>
      <text:p text:style-name="Normal">---</text:p>
      <text:p text:style-name="Normal"/>
      <text:p text:style-name="Normal">## Product Response</text:p>
      <text:p text:style-name="Normal"/>
      <text:p text:style-name="Normal">Reduce anxiety.</text:p>
      <text:p text:style-name="Normal"/>
      <text:p text:style-name="Normal">Explain concepts simply.</text:p>
      <text:p text:style-name="Normal"/>
      <text:p text:style-name="Normal">Recommend beginner-friendly careers.</text:p>
      <text:p text:style-name="Normal"/>
      <text:p text:style-name="Normal">Build confidence gradually.</text:p>
      <text:p text:style-name="Normal"/>
      <text:soft-page-break/>
      <text:p text:style-name="Normal">Never overwhelm.</text:p>
      <text:p text:style-name="Normal"/>
      <text:p text:style-name="Normal">---</text:p>
      <text:p text:style-name="Normal"/>
      <text:p text:style-name="Normal"># Persona 05 — The Entrepreneur</text:p>
      <text:p text:style-name="Normal"/>
      <text:p text:style-name="Normal">## Overview</text:p>
      <text:p text:style-name="Normal"/>
      <text:p text:style-name="Normal">Business owner.</text:p>
      <text:p text:style-name="Normal"/>
      <text:p text:style-name="Normal">Startup founder.</text:p>
      <text:p text:style-name="Normal"/>
      <text:p text:style-name="Normal">Consultant.</text:p>
      <text:p text:style-name="Normal"/>
      <text:p text:style-name="Normal">Agency owner.</text:p>
      <text:p text:style-name="Normal"/>
      <text:p text:style-name="Normal">---</text:p>
      <text:p text:style-name="Normal"/>
      <text:p text:style-name="Normal">## Goal</text:p>
      <text:p text:style-name="Normal"/>
      <text:p text:style-name="Normal">Use AI to create competitive advantage.</text:p>
      <text:p text:style-name="Normal"/>
      <text:p text:style-name="Normal">Build AI-powered businesses.</text:p>
      <text:p text:style-name="Normal"/>
      <text:p text:style-name="Normal">Understand automation.</text:p>
      <text:p text:style-name="Normal"/>
      <text:p text:style-name="Normal">Reduce costs.</text:p>
      <text:p text:style-name="Normal"/>
      <text:soft-page-break/>
      <text:p text:style-name="Normal">Increase productivity.</text:p>
      <text:p text:style-name="Normal"/>
      <text:p text:style-name="Normal">---</text:p>
      <text:p text:style-name="Normal"/>
      <text:p text:style-name="Normal">## Product Focus</text:p>
      <text:p text:style-name="Normal"/>
      <text:p text:style-name="Normal">AI Strategy.</text:p>
      <text:p text:style-name="Normal"/>
      <text:p text:style-name="Normal">Automation.</text:p>
      <text:p text:style-name="Normal"/>
      <text:p text:style-name="Normal">Agents.</text:p>
      <text:p text:style-name="Normal"/>
      <text:p text:style-name="Normal">Business AI.</text:p>
      <text:p text:style-name="Normal"/>
      <text:p text:style-name="Normal">Workflow Design.</text:p>
      <text:p text:style-name="Normal"/>
      <text:p text:style-name="Normal">AI Products.</text:p>
      <text:p text:style-name="Normal"/>
      <text:p text:style-name="Normal">---</text:p>
      <text:p text:style-name="Normal"/>
      <text:p text:style-name="Normal"># Persona 06 — The Manager</text:p>
      <text:p text:style-name="Normal"/>
      <text:p text:style-name="Normal">## Overview</text:p>
      <text:p text:style-name="Normal"/>
      <text:p text:style-name="Normal">Department Manager.</text:p>
      <text:p text:style-name="Normal"/>
      <text:p text:style-name="Normal">Team Lead.</text:p>
      <text:p text:style-name="Normal"/>
      <text:soft-page-break/>
      <text:p text:style-name="Normal">Operations Manager.</text:p>
      <text:p text:style-name="Normal"/>
      <text:p text:style-name="Normal">Executive.</text:p>
      <text:p text:style-name="Normal"/>
      <text:p text:style-name="Normal">---</text:p>
      <text:p text:style-name="Normal"/>
      <text:p text:style-name="Normal">## Goal</text:p>
      <text:p text:style-name="Normal"/>
      <text:p text:style-name="Normal">Lead AI transformation.</text:p>
      <text:p text:style-name="Normal"/>
      <text:p text:style-name="Normal">Understand AI opportunities.</text:p>
      <text:p text:style-name="Normal"/>
      <text:p text:style-name="Normal">Communicate with technical teams.</text:p>
      <text:p text:style-name="Normal"/>
      <text:p text:style-name="Normal">Make better strategic decisions.</text:p>
      <text:p text:style-name="Normal"/>
      <text:p text:style-name="Normal">---</text:p>
      <text:p text:style-name="Normal"/>
      <text:p text:style-name="Normal">## Product Focus</text:p>
      <text:p text:style-name="Normal"/>
      <text:p text:style-name="Normal">AI Leadership.</text:p>
      <text:p text:style-name="Normal"/>
      <text:p text:style-name="Normal">AI Strategy.</text:p>
      <text:p text:style-name="Normal"/>
      <text:p text:style-name="Normal">Business Applications.</text:p>
      <text:p text:style-name="Normal"/>
      <text:p text:style-name="Normal">Decision Making.</text:p>
      <text:p text:style-name="Normal"/>
      <text:soft-page-break/>
      <text:p text:style-name="Normal">Governance.</text:p>
      <text:p text:style-name="Normal"/>
      <text:p text:style-name="Normal">AI Adoption.</text:p>
      <text:p text:style-name="Normal"/>
      <text:p text:style-name="Normal">---</text:p>
      <text:p text:style-name="Normal"/>
      <text:p text:style-name="Normal"># Persona 07 — The Freelancer</text:p>
      <text:p text:style-name="Normal"/>
      <text:p text:style-name="Normal">## Overview</text:p>
      <text:p text:style-name="Normal"/>
      <text:p text:style-name="Normal">Works independently.</text:p>
      <text:p text:style-name="Normal"/>
      <text:p text:style-name="Normal">Needs marketable AI skills quickly.</text:p>
      <text:p text:style-name="Normal"/>
      <text:p text:style-name="Normal">---</text:p>
      <text:p text:style-name="Normal"/>
      <text:p text:style-name="Normal">## Goal</text:p>
      <text:p text:style-name="Normal"/>
      <text:p text:style-name="Normal">Sell AI services.</text:p>
      <text:p text:style-name="Normal"/>
      <text:p text:style-name="Normal">Increase income.</text:p>
      <text:p text:style-name="Normal"/>
      <text:p text:style-name="Normal">Differentiate from competitors.</text:p>
      <text:p text:style-name="Normal"/>
      <text:p text:style-name="Normal">---</text:p>
      <text:p text:style-name="Normal"/>
      <text:p text:style-name="Normal">## Product Focus</text:p>
      <text:p text:style-name="Normal"/>
      <text:soft-page-break/>
      <text:p text:style-name="Normal">Prompt Engineering.</text:p>
      <text:p text:style-name="Normal"/>
      <text:p text:style-name="Normal">Automation.</text:p>
      <text:p text:style-name="Normal"/>
      <text:p text:style-name="Normal">AI Content.</text:p>
      <text:p text:style-name="Normal"/>
      <text:p text:style-name="Normal">AI Consulting.</text:p>
      <text:p text:style-name="Normal"/>
      <text:p text:style-name="Normal">Portfolio.</text:p>
      <text:p text:style-name="Normal"/>
      <text:p text:style-name="Normal">Client Projects.</text:p>
      <text:p text:style-name="Normal"/>
      <text:p text:style-name="Normal">---</text:p>
      <text:p text:style-name="Normal"/>
      <text:p text:style-name="Normal"># Persona 08 — The Data Professional</text:p>
      <text:p text:style-name="Normal"/>
      <text:p text:style-name="Normal">## Overview</text:p>
      <text:p text:style-name="Normal"/>
      <text:p text:style-name="Normal">Already works with:</text:p>
      <text:p text:style-name="Normal"/>
      <text:p text:style-name="Normal">Excel.</text:p>
      <text:p text:style-name="Normal"/>
      <text:p text:style-name="Normal">SQL.</text:p>
      <text:p text:style-name="Normal"/>
      <text:p text:style-name="Normal">Power BI.</text:p>
      <text:p text:style-name="Normal"/>
      <text:p text:style-name="Normal">Analytics.</text:p>
      <text:p text:style-name="Normal"/>
      <text:soft-page-break/>
      <text:p text:style-name="Normal">Business Intelligence.</text:p>
      <text:p text:style-name="Normal"/>
      <text:p text:style-name="Normal">---</text:p>
      <text:p text:style-name="Normal"/>
      <text:p text:style-name="Normal">## Goal</text:p>
      <text:p text:style-name="Normal"/>
      <text:p text:style-name="Normal">Move toward:</text:p>
      <text:p text:style-name="Normal"/>
      <text:p text:style-name="Normal">Machine Learning.</text:p>
      <text:p text:style-name="Normal"/>
      <text:p text:style-name="Normal">AI Analytics.</text:p>
      <text:p text:style-name="Normal"/>
      <text:p text:style-name="Normal">Predictive Modeling.</text:p>
      <text:p text:style-name="Normal"/>
      <text:p text:style-name="Normal">LLMs.</text:p>
      <text:p text:style-name="Normal"/>
      <text:p text:style-name="Normal">---</text:p>
      <text:p text:style-name="Normal"/>
      <text:p text:style-name="Normal">## Product Strategy</text:p>
      <text:p text:style-name="Normal"/>
      <text:p text:style-name="Normal">Leverage existing strengths.</text:p>
      <text:p text:style-name="Normal"/>
      <text:p text:style-name="Normal">Bridge knowledge gaps.</text:p>
      <text:p text:style-name="Normal"/>
      <text:p text:style-name="Normal">Accelerate transition.</text:p>
      <text:p text:style-name="Normal"/>
      <text:p text:style-name="Normal">---</text:p>
      <text:p text:style-name="Normal"/>
      <text:soft-page-break/>
      <text:p text:style-name="Normal"># Persona 09 — The AI Enthusiast</text:p>
      <text:p text:style-name="Normal"/>
      <text:p text:style-name="Normal">## Overview</text:p>
      <text:p text:style-name="Normal"/>
      <text:p text:style-name="Normal">Consumes AI news daily.</text:p>
      <text:p text:style-name="Normal"/>
      <text:p text:style-name="Normal">Experiments constantly.</text:p>
      <text:p text:style-name="Normal"/>
      <text:p text:style-name="Normal">Builds side projects.</text:p>
      <text:p text:style-name="Normal"/>
      <text:p text:style-name="Normal">Loves emerging technologies.</text:p>
      <text:p text:style-name="Normal"/>
      <text:p text:style-name="Normal">---</text:p>
      <text:p text:style-name="Normal"/>
      <text:p text:style-name="Normal">## Biggest Problem</text:p>
      <text:p text:style-name="Normal"/>
      <text:p text:style-name="Normal">No structured direction.</text:p>
      <text:p text:style-name="Normal"/>
      <text:p text:style-name="Normal">Too many experiments.</text:p>
      <text:p text:style-name="Normal"/>
      <text:p text:style-name="Normal">Too little consistency.</text:p>
      <text:p text:style-name="Normal"/>
      <text:p text:style-name="Normal">---</text:p>
      <text:p text:style-name="Normal"/>
      <text:p text:style-name="Normal">## Product Strategy</text:p>
      <text:p text:style-name="Normal"/>
      <text:p text:style-name="Normal">Create focus.</text:p>
      <text:p text:style-name="Normal"/>
      <text:soft-page-break/>
      <text:p text:style-name="Normal">Prioritize projects.</text:p>
      <text:p text:style-name="Normal"/>
      <text:p text:style-name="Normal">Build portfolio.</text:p>
      <text:p text:style-name="Normal"/>
      <text:p text:style-name="Normal">Measure progress.</text:p>
      <text:p text:style-name="Normal"/>
      <text:p text:style-name="Normal">Reduce distraction.</text:p>
      <text:p text:style-name="Normal"/>
      <text:p text:style-name="Normal">---</text:p>
      <text:p text:style-name="Normal"/>
      <text:p text:style-name="Normal"># Persona 10 — The Future Professional</text:p>
      <text:p text:style-name="Normal"/>
      <text:p text:style-name="Normal">## Overview</text:p>
      <text:p text:style-name="Normal"/>
      <text:p text:style-name="Normal">This persona represents someone who does not yet exist today.</text:p>
      <text:p text:style-name="Normal"/>
      <text:p text:style-name="Normal">Future careers will emerge continuously.</text:p>
      <text:p text:style-name="Normal"/>
      <text:p text:style-name="Normal">The platform should be flexible enough to support professions that have not yet been invented.</text:p>
      <text:p text:style-name="Normal"/>
      <text:p text:style-name="Normal">AI Career OS should never assume today's AI landscape is permanent.</text:p>
      <text:p text:style-name="Normal"/>
      <text:p text:style-name="Normal">The product must evolve alongside technology.</text:p>
      <text:p text:style-name="Normal"/>
      <text:p text:style-name="Normal">---</text:p>
      <text:p text:style-name="Normal"/>
      <text:p text:style-name="Normal"># 9.2 Shared Characteristics</text:p>
      <text:p text:style-name="Normal"/>
      <text:p text:style-name="Normal">Although personas differ significantly, they all share several common needs.</text:p>
      <text:p text:style-name="Normal"/>
      <text:p text:style-name="Normal">They want:</text:p>
      <text:p text:style-name="Normal"/>
      <text:p text:style-name="Normal">Clarity.</text:p>
      <text:p text:style-name="Normal"/>
      <text:p text:style-name="Normal">Confidence.</text:p>
      <text:p text:style-name="Normal"/>
      <text:p text:style-name="Normal">Direction.</text:p>
      <text:p text:style-name="Normal"/>
      <text:p text:style-name="Normal">Personalization.</text:p>
      <text:p text:style-name="Normal"/>
      <text:p text:style-name="Normal">Progress.</text:p>
      <text:p text:style-name="Normal"/>
      <text:p text:style-name="Normal">Trust.</text:p>
      <text:p text:style-name="Normal"/>
      <text:p text:style-name="Normal">Practical experience.</text:p>
      <text:p text:style-name="Normal"/>
      <text:p text:style-name="Normal">Career success.</text:p>
      <text:p text:style-name="Normal"/>
      <text:p text:style-name="Normal">These shared needs become the foundation of the entire product.</text:p>
      <text:p text:style-name="Normal"/>
      <text:p text:style-name="Normal">---</text:p>
      <text:p text:style-name="Normal"/>
      <text:p text:style-name="Normal"># 9.3 Persona Detection</text:p>
      <text:p text:style-name="Normal"/>
      <text:p text:style-name="Normal">The platform should not ask users:</text:p>
      <text:p text:style-name="Normal"/>
      <text:p text:style-name="Normal">"Which persona are you?"</text:p>
      <text:p text:style-name="Normal"/>
      <text:p text:style-name="Normal">Instead, AI should infer personas naturally by analyzing:</text:p>
      <text:p text:style-name="Normal"/>
      <text:p text:style-name="Normal">CV.</text:p>
      <text:p text:style-name="Normal"/>
      <text:p text:style-name="Normal">Conversation.</text:p>
      <text:p text:style-name="Normal"/>
      <text:p text:style-name="Normal">Goals.</text:p>
      <text:p text:style-name="Normal"/>
      <text:p text:style-name="Normal">Experience.</text:p>
      <text:p text:style-name="Normal"/>
      <text:p text:style-name="Normal">Skills.</text:p>
      <text:p text:style-name="Normal"/>
      <text:p text:style-name="Normal">Behavior.</text:p>
      <text:p text:style-name="Normal"/>
      <text:p text:style-name="Normal">Projects.</text:p>
      <text:p text:style-name="Normal"/>
      <text:p text:style-name="Normal">Learning history.</text:p>
      <text:p text:style-name="Normal"/>
      <text:p text:style-name="Normal">Career interests.</text:p>
      <text:p text:style-name="Normal"/>
      <text:p text:style-name="Normal">Users should feel understood rather than categorized.</text:p>
      <text:p text:style-name="Normal"/>
      <text:p text:style-name="Normal">---</text:p>
      <text:p text:style-name="Normal"/>
      <text:p text:style-name="Normal"># 9.4 Dynamic Personas</text:p>
      <text:p text:style-name="Normal"/>
      <text:p text:style-name="Normal">Personas should never be permanent.</text:p>
      <text:p text:style-name="Normal"/>
      <text:p text:style-name="Normal">For example:</text:p>
      <text:p text:style-name="Normal"/>
      <text:p text:style-name="Normal">Student</text:p>
      <text:p text:style-name="Normal"/>
      <text:p text:style-name="Normal">↓</text:p>
      <text:p text:style-name="Normal"/>
      <text:p text:style-name="Normal">Junior Developer</text:p>
      <text:p text:style-name="Normal"/>
      <text:p text:style-name="Normal">↓</text:p>
      <text:p text:style-name="Normal"/>
      <text:p text:style-name="Normal">AI Engineer</text:p>
      <text:p text:style-name="Normal"/>
      <text:p text:style-name="Normal">↓</text:p>
      <text:p text:style-name="Normal"/>
      <text:p text:style-name="Normal">Technical Lead</text:p>
      <text:p text:style-name="Normal"/>
      <text:p text:style-name="Normal">↓</text:p>
      <text:p text:style-name="Normal"/>
      <text:p text:style-name="Normal">AI Architect</text:p>
      <text:p text:style-name="Normal"/>
      <text:p text:style-name="Normal">↓</text:p>
      <text:p text:style-name="Normal"/>
      <text:p text:style-name="Normal">Founder</text:p>
      <text:p text:style-name="Normal"/>
      <text:p text:style-name="Normal">The platform should recognize these transitions automatically.</text:p>
      <text:p text:style-name="Normal"/>
      <text:p text:style-name="Normal">As users grow...</text:p>
      <text:p text:style-name="Normal"/>
      <text:p text:style-name="Normal">Their experience changes.</text:p>
      <text:p text:style-name="Normal"/>
      <text:p text:style-name="Normal">Their goals change.</text:p>
      <text:p text:style-name="Normal"/>
      <text:p text:style-name="Normal">Their roadmap changes.</text:p>
      <text:p text:style-name="Normal"/>
      <text:p text:style-name="Normal">The platform evolves with them.</text:p>
      <text:p text:style-name="Normal"/>
      <text:p text:style-name="Normal">---</text:p>
      <text:p text:style-name="Normal"/>
      <text:p text:style-name="Normal"># Persona Statement</text:p>
      <text:p text:style-name="Normal"/>
      <text:p text:style-name="Normal">**AI Career OS is designed around people—not professions.**</text:p>
      <text:p text:style-name="Normal"/>
      <text:p text:style-name="Normal">Every recommendation begins by understanding the individual.</text:p>
      <text:p text:style-name="Normal"/>
      <text:p text:style-name="Normal">The more the platform understands the user, the more valuable every future interaction becomes.</text:p>
      <text:p text:style-name="Normal"/>
      <text:p text:style-name="Normal">---</text:p>
      <text:p text:style-name="Normal"/>
      <text:p text:style-name="Normal"># End of Volume 9</text:p>
      <text:p text:style-name="Normal"/>
      <text:p text:style-name="Normal">**Next Volume:** Jobs To Be Done (JTBD)</text:p>
      <text:p text:style-name="Normal"/>
      <text:soft-page-break/>
      <text:p text:style-name="Normal">#<text:s/><text:span text:style-name="T40">📘</text:span><text:s/>Volume 10</text:p>
      <text:p text:style-name="Normal"/>
      <text:p text:style-name="Normal"># Jobs To Be Done (JTBD)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0.1 Why Jobs To Be Done?</text:p>
      <text:p text:style-name="Normal"/>
      <text:p text:style-name="Normal">People do not buy products.</text:p>
      <text:p text:style-name="Normal"/>
      <text:p text:style-name="Normal">They "hire" products to make progress in their lives.</text:p>
      <text:p text:style-name="Normal"/>
      <text:p text:style-name="Normal">AI Career OS is not hired because users want another AI website.</text:p>
      <text:p text:style-name="Normal"/>
      <text:p text:style-name="Normal">It is hired because users want a better future.</text:p>
      <text:p text:style-name="Normal"/>
      <text:p text:style-name="Normal">Understanding these motivations is essential.</text:p>
      <text:p text:style-name="Normal"/>
      <text:p text:style-name="Normal">Instead of asking:</text:p>
      <text:p text:style-name="Normal"/>
      <text:p text:style-name="Normal">"Who is our customer?"</text:p>
      <text:p text:style-name="Normal"/>
      <text:p text:style-name="Normal">We ask:</text:p>
      <text:p text:style-name="Normal"/>
      <text:p text:style-name="Normal">"What progress is the customer trying to make?"</text:p>
      <text:p text:style-name="Normal"/>
      <text:soft-page-break/>
      <text:p text:style-name="Normal">This philosophy shapes every feature inside AI Career OS.</text:p>
      <text:p text:style-name="Normal"/>
      <text:p text:style-name="Normal">---</text:p>
      <text:p text:style-name="Normal"/>
      <text:p text:style-name="Normal"># 10.2 Core Job</text:p>
      <text:p text:style-name="Normal"/>
      <text:p text:style-name="Normal">The primary job users hire AI Career OS to perform is:</text:p>
      <text:p text:style-name="Normal"/>
      <text:p text:style-name="Normal">**"Help me confidently build a successful career in Artificial Intelligence."**</text:p>
      <text:p text:style-name="Normal"/>
      <text:p text:style-name="Normal">Everything else supports this mission.</text:p>
      <text:p text:style-name="Normal"/>
      <text:p text:style-name="Normal">---</text:p>
      <text:p text:style-name="Normal"/>
      <text:p text:style-name="Normal"># 10.3 Functional Jobs</text:p>
      <text:p text:style-name="Normal"/>
      <text:p text:style-name="Normal">Users want to:</text:p>
      <text:p text:style-name="Normal"/>
      <text:p text:style-name="Normal">• Discover suitable AI careers.</text:p>
      <text:p text:style-name="Normal"/>
      <text:p text:style-name="Normal">• Understand career differences.</text:p>
      <text:p text:style-name="Normal"/>
      <text:p text:style-name="Normal">• Identify strengths.</text:p>
      <text:p text:style-name="Normal"/>
      <text:p text:style-name="Normal">• Identify weaknesses.</text:p>
      <text:p text:style-name="Normal"/>
      <text:p text:style-name="Normal">• Understand transferable skills.</text:p>
      <text:p text:style-name="Normal"/>
      <text:soft-page-break/>
      <text:p text:style-name="Normal">• Build learning plans.</text:p>
      <text:p text:style-name="Normal"/>
      <text:p text:style-name="Normal">• Learn efficiently.</text:p>
      <text:p text:style-name="Normal"/>
      <text:p text:style-name="Normal">• Build portfolios.</text:p>
      <text:p text:style-name="Normal"/>
      <text:p text:style-name="Normal">• Prepare for interviews.</text:p>
      <text:p text:style-name="Normal"/>
      <text:p text:style-name="Normal">• Measure progress.</text:p>
      <text:p text:style-name="Normal"/>
      <text:p text:style-name="Normal">• Become job ready.</text:p>
      <text:p text:style-name="Normal"/>
      <text:p text:style-name="Normal">• Find employment.</text:p>
      <text:p text:style-name="Normal"/>
      <text:p text:style-name="Normal">---</text:p>
      <text:p text:style-name="Normal"/>
      <text:p text:style-name="Normal"># 10.4 Emotional Jobs</text:p>
      <text:p text:style-name="Normal"/>
      <text:p text:style-name="Normal">Users also want to feel:</text:p>
      <text:p text:style-name="Normal"/>
      <text:p text:style-name="Normal">Confident.</text:p>
      <text:p text:style-name="Normal"/>
      <text:p text:style-name="Normal">Capable.</text:p>
      <text:p text:style-name="Normal"/>
      <text:p text:style-name="Normal">Prepared.</text:p>
      <text:p text:style-name="Normal"/>
      <text:p text:style-name="Normal">Competitive.</text:p>
      <text:p text:style-name="Normal"/>
      <text:soft-page-break/>
      <text:p text:style-name="Normal">Motivated.</text:p>
      <text:p text:style-name="Normal"/>
      <text:p text:style-name="Normal">Optimistic.</text:p>
      <text:p text:style-name="Normal"/>
      <text:p text:style-name="Normal">Supported.</text:p>
      <text:p text:style-name="Normal"/>
      <text:p text:style-name="Normal">They want someone—or something—to tell them:</text:p>
      <text:p text:style-name="Normal"/>
      <text:p text:style-name="Normal">"You're on the right path."</text:p>
      <text:p text:style-name="Normal"/>
      <text:p text:style-name="Normal">---</text:p>
      <text:p text:style-name="Normal"/>
      <text:p text:style-name="Normal"># 10.5 Social Jobs</text:p>
      <text:p text:style-name="Normal"/>
      <text:p text:style-name="Normal">Users want to become someone others recognize as:</text:p>
      <text:p text:style-name="Normal"/>
      <text:p text:style-name="Normal">An AI Engineer.</text:p>
      <text:p text:style-name="Normal"/>
      <text:p text:style-name="Normal">An AI Consultant.</text:p>
      <text:p text:style-name="Normal"/>
      <text:p text:style-name="Normal">An AI Automation Specialist.</text:p>
      <text:p text:style-name="Normal"/>
      <text:p text:style-name="Normal">An AI Product Manager.</text:p>
      <text:p text:style-name="Normal"/>
      <text:p text:style-name="Normal">An AI Professional.</text:p>
      <text:p text:style-name="Normal"/>
      <text:p text:style-name="Normal">Identity matters.</text:p>
      <text:p text:style-name="Normal"/>
      <text:soft-page-break/>
      <text:p text:style-name="Normal">People don't simply pursue careers.</text:p>
      <text:p text:style-name="Normal"/>
      <text:p text:style-name="Normal">They pursue identities.</text:p>
      <text:p text:style-name="Normal"/>
      <text:p text:style-name="Normal">---</text:p>
      <text:p text:style-name="Normal"/>
      <text:p text:style-name="Normal"># 10.6 Progress Jobs</text:p>
      <text:p text:style-name="Normal"/>
      <text:p text:style-name="Normal">Users continuously ask themselves:</text:p>
      <text:p text:style-name="Normal"/>
      <text:p text:style-name="Normal">Am I improving?</text:p>
      <text:p text:style-name="Normal"/>
      <text:p text:style-name="Normal">Am I falling behind?</text:p>
      <text:p text:style-name="Normal"/>
      <text:p text:style-name="Normal">Am I ready?</text:p>
      <text:p text:style-name="Normal"/>
      <text:p text:style-name="Normal">Am I wasting time?</text:p>
      <text:p text:style-name="Normal"/>
      <text:p text:style-name="Normal">The platform should answer these questions automatically.</text:p>
      <text:p text:style-name="Normal"/>
      <text:p text:style-name="Normal">Progress should always be visible.</text:p>
      <text:p text:style-name="Normal"/>
      <text:p text:style-name="Normal">---</text:p>
      <text:p text:style-name="Normal"/>
      <text:p text:style-name="Normal"># 10.7 Decision Jobs</text:p>
      <text:p text:style-name="Normal"/>
      <text:p text:style-name="Normal">One of the most valuable jobs AI Career OS performs is reducing decision fatigue.</text:p>
      <text:p text:style-name="Normal"/>
      <text:soft-page-break/>
      <text:p text:style-name="Normal">Instead of making users choose between hundreds of options, the platform recommends the next best action.</text:p>
      <text:p text:style-name="Normal"/>
      <text:p text:style-name="Normal">Examples:</text:p>
      <text:p text:style-name="Normal"/>
      <text:p text:style-name="Normal">Which career?</text:p>
      <text:p text:style-name="Normal"/>
      <text:p text:style-name="Normal">Which skill?</text:p>
      <text:p text:style-name="Normal"/>
      <text:p text:style-name="Normal">Which project?</text:p>
      <text:p text:style-name="Normal"/>
      <text:p text:style-name="Normal">Which course?</text:p>
      <text:p text:style-name="Normal"/>
      <text:p text:style-name="Normal">Which certification?</text:p>
      <text:p text:style-name="Normal"/>
      <text:p text:style-name="Normal">Which technology?</text:p>
      <text:p text:style-name="Normal"/>
      <text:p text:style-name="Normal">Which interview preparation?</text:p>
      <text:p text:style-name="Normal"/>
      <text:p text:style-name="Normal">Decision support becomes a competitive advantage.</text:p>
      <text:p text:style-name="Normal"/>
      <text:p text:style-name="Normal">---</text:p>
      <text:p text:style-name="Normal"/>
      <text:p text:style-name="Normal"># 10.8 Trust Jobs</text:p>
      <text:p text:style-name="Normal"/>
      <text:p text:style-name="Normal">Users trust AI Career OS with career decisions.</text:p>
      <text:p text:style-name="Normal"/>
      <text:p text:style-name="Normal">The platform therefore has another important responsibility.</text:p>
      <text:p text:style-name="Normal"/>
      <text:p text:style-name="Normal">Always explain recommendations.</text:p>
      <text:p text:style-name="Normal"/>
      <text:p text:style-name="Normal">Never manipulate.</text:p>
      <text:p text:style-name="Normal"/>
      <text:p text:style-name="Normal">Never exaggerate.</text:p>
      <text:p text:style-name="Normal"/>
      <text:p text:style-name="Normal">Never recommend unnecessary work.</text:p>
      <text:p text:style-name="Normal"/>
      <text:p text:style-name="Normal">Trust compounds over years.</text:p>
      <text:p text:style-name="Normal"/>
      <text:p text:style-name="Normal">One poor recommendation can destroy months of trust.</text:p>
      <text:p text:style-name="Normal"/>
      <text:p text:style-name="Normal">---</text:p>
      <text:p text:style-name="Normal"/>
      <text:p text:style-name="Normal"># 10.9 Long-Term Jobs</text:p>
      <text:p text:style-name="Normal"/>
      <text:p text:style-name="Normal">As users grow, new jobs emerge.</text:p>
      <text:p text:style-name="Normal"/>
      <text:p text:style-name="Normal">Junior Professional</text:p>
      <text:p text:style-name="Normal"/>
      <text:p text:style-name="Normal">↓</text:p>
      <text:p text:style-name="Normal"/>
      <text:p text:style-name="Normal">Mid-Level Professional</text:p>
      <text:p text:style-name="Normal"/>
      <text:p text:style-name="Normal">↓</text:p>
      <text:p text:style-name="Normal"/>
      <text:p text:style-name="Normal">Senior Professional</text:p>
      <text:p text:style-name="Normal"/>
      <text:p text:style-name="Normal">↓</text:p>
      <text:p text:style-name="Normal"/>
      <text:p text:style-name="Normal">Technical Lead</text:p>
      <text:p text:style-name="Normal"/>
      <text:p text:style-name="Normal">↓</text:p>
      <text:p text:style-name="Normal"/>
      <text:p text:style-name="Normal">Architect</text:p>
      <text:p text:style-name="Normal"/>
      <text:p text:style-name="Normal">↓</text:p>
      <text:p text:style-name="Normal"/>
      <text:p text:style-name="Normal">Founder</text:p>
      <text:p text:style-name="Normal"/>
      <text:p text:style-name="Normal">↓</text:p>
      <text:p text:style-name="Normal"/>
      <text:p text:style-name="Normal">Mentor</text:p>
      <text:p text:style-name="Normal"/>
      <text:p text:style-name="Normal">AI Career OS should continue creating value throughout every stage.</text:p>
      <text:p text:style-name="Normal"/>
      <text:p text:style-name="Normal">---</text:p>
      <text:p text:style-name="Normal"/>
      <text:p text:style-name="Normal"># JTBD Statement</text:p>
      <text:p text:style-name="Normal"/>
      <text:p text:style-name="Normal">**People hire AI Career OS to remove uncertainty, make better career decisions, and confidently build meaningful futures in Artificial Intelligence.**</text:p>
      <text:p text:style-name="Normal"/>
      <text:p text:style-name="Normal">---</text:p>
      <text:p text:style-name="Normal"/>
      <text:soft-page-break/>
      <text:p text:style-name="Normal"># End of Volume 10</text:p>
      <text:p text:style-name="Normal"/>
      <text:p text:style-name="Normal">**Next Volume:** User Journey</text:p>
      <text:p text:style-name="Normal"/>
      <text:p text:style-name="Normal">#<text:s/><text:span text:style-name="T41">📘</text:span><text:s/>Volume 11</text:p>
      <text:p text:style-name="Normal"/>
      <text:p text:style-name="Normal"># User Journey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1.1 Journey Before Interface</text:p>
      <text:p text:style-name="Normal"/>
      <text:p text:style-name="Normal">Users should never feel they are navigating a website.</text:p>
      <text:p text:style-name="Normal"/>
      <text:p text:style-name="Normal">They should feel they are progressing through an intelligent journey.</text:p>
      <text:p text:style-name="Normal"/>
      <text:p text:style-name="Normal">Every page exists because the user has reached the next stage.</text:p>
      <text:p text:style-name="Normal"/>
      <text:p text:style-name="Normal">Navigation follows progress.</text:p>
      <text:p text:style-name="Normal"/>
      <text:p text:style-name="Normal">Not menus.</text:p>
      <text:p text:style-name="Normal"/>
      <text:p text:style-name="Normal">---</text:p>
      <text:p text:style-name="Normal"/>
      <text:p text:style-name="Normal"># 11.2 The Complete Journey</text:p>
      <text:p text:style-name="Normal"/>
      <text:soft-page-break/>
      <text:p text:style-name="Normal">```</text:p>
      <text:p text:style-name="Normal"/>
      <text:p text:style-name="Normal">Awareness</text:p>
      <text:p text:style-name="Normal"/>
      <text:p text:style-name="Normal">↓</text:p>
      <text:p text:style-name="Normal"/>
      <text:p text:style-name="Normal">Curiosity</text:p>
      <text:p text:style-name="Normal"/>
      <text:p text:style-name="Normal">↓</text:p>
      <text:p text:style-name="Normal"/>
      <text:p text:style-name="Normal">Discovery</text:p>
      <text:p text:style-name="Normal"/>
      <text:p text:style-name="Normal">↓</text:p>
      <text:p text:style-name="Normal"/>
      <text:p text:style-name="Normal">Career Match</text:p>
      <text:p text:style-name="Normal"/>
      <text:p text:style-name="Normal">↓</text:p>
      <text:p text:style-name="Normal"/>
      <text:p text:style-name="Normal">Career Selection</text:p>
      <text:p text:style-name="Normal"/>
      <text:p text:style-name="Normal">↓</text:p>
      <text:p text:style-name="Normal"/>
      <text:p text:style-name="Normal">Career DNA</text:p>
      <text:p text:style-name="Normal"/>
      <text:p text:style-name="Normal">↓</text:p>
      <text:p text:style-name="Normal"/>
      <text:p text:style-name="Normal">CV Analysis</text:p>
      <text:p text:style-name="Normal"/>
      <text:soft-page-break/>
      <text:p text:style-name="Normal">↓</text:p>
      <text:p text:style-name="Normal"/>
      <text:p text:style-name="Normal">Personal Dashboard</text:p>
      <text:p text:style-name="Normal"/>
      <text:p text:style-name="Normal">↓</text:p>
      <text:p text:style-name="Normal"/>
      <text:p text:style-name="Normal">Roadmap</text:p>
      <text:p text:style-name="Normal"/>
      <text:p text:style-name="Normal">↓</text:p>
      <text:p text:style-name="Normal"/>
      <text:p text:style-name="Normal">Learning</text:p>
      <text:p text:style-name="Normal"/>
      <text:p text:style-name="Normal">↓</text:p>
      <text:p text:style-name="Normal"/>
      <text:p text:style-name="Normal">Projects</text:p>
      <text:p text:style-name="Normal"/>
      <text:p text:style-name="Normal">↓</text:p>
      <text:p text:style-name="Normal"/>
      <text:p text:style-name="Normal">Portfolio</text:p>
      <text:p text:style-name="Normal"/>
      <text:p text:style-name="Normal">↓</text:p>
      <text:p text:style-name="Normal"/>
      <text:p text:style-name="Normal">Assessment</text:p>
      <text:p text:style-name="Normal"/>
      <text:p text:style-name="Normal">↓</text:p>
      <text:p text:style-name="Normal"/>
      <text:p text:style-name="Normal">Interview Preparation</text:p>
      <text:p text:style-name="Normal"/>
      <text:soft-page-break/>
      <text:p text:style-name="Normal">↓</text:p>
      <text:p text:style-name="Normal"/>
      <text:p text:style-name="Normal">Job Readiness</text:p>
      <text:p text:style-name="Normal"/>
      <text:p text:style-name="Normal">↓</text:p>
      <text:p text:style-name="Normal"/>
      <text:p text:style-name="Normal">Employment</text:p>
      <text:p text:style-name="Normal"/>
      <text:p text:style-name="Normal">↓</text:p>
      <text:p text:style-name="Normal"/>
      <text:p text:style-name="Normal">Career Growth</text:p>
      <text:p text:style-name="Normal"/>
      <text:p text:style-name="Normal">```</text:p>
      <text:p text:style-name="Normal"/>
      <text:p text:style-name="Normal">The experience never truly ends.</text:p>
      <text:p text:style-name="Normal"/>
      <text:p text:style-name="Normal">After employment...</text:p>
      <text:p text:style-name="Normal"/>
      <text:p text:style-name="Normal">A new journey begins.</text:p>
      <text:p text:style-name="Normal"/>
      <text:p text:style-name="Normal">---</text:p>
      <text:p text:style-name="Normal"/>
      <text:p text:style-name="Normal"># 11.3 Stage 1 — Awareness</text:p>
      <text:p text:style-name="Normal"/>
      <text:p text:style-name="Normal">The user discovers AI Career OS through:</text:p>
      <text:p text:style-name="Normal"/>
      <text:p text:style-name="Normal">Google</text:p>
      <text:p text:style-name="Normal"/>
      <text:soft-page-break/>
      <text:p text:style-name="Normal">ChatGPT</text:p>
      <text:p text:style-name="Normal"/>
      <text:p text:style-name="Normal">Claude</text:p>
      <text:p text:style-name="Normal"/>
      <text:p text:style-name="Normal">Perplexity</text:p>
      <text:p text:style-name="Normal"/>
      <text:p text:style-name="Normal">YouTube</text:p>
      <text:p text:style-name="Normal"/>
      <text:p text:style-name="Normal">LinkedIn</text:p>
      <text:p text:style-name="Normal"/>
      <text:p text:style-name="Normal">Social Media</text:p>
      <text:p text:style-name="Normal"/>
      <text:p text:style-name="Normal">Recommendations</text:p>
      <text:p text:style-name="Normal"/>
      <text:p text:style-name="Normal">The first impression should communicate one message:</text:p>
      <text:p text:style-name="Normal"/>
      <text:p text:style-name="Normal">"This platform understands AI careers."</text:p>
      <text:p text:style-name="Normal"/>
      <text:p text:style-name="Normal">---</text:p>
      <text:p text:style-name="Normal"/>
      <text:p text:style-name="Normal"># 11.4 Stage 2 — Discovery</text:p>
      <text:p text:style-name="Normal"/>
      <text:p text:style-name="Normal">The user explores AI careers.</text:p>
      <text:p text:style-name="Normal"/>
      <text:p text:style-name="Normal">Instead of reading static pages...</text:p>
      <text:p text:style-name="Normal"/>
      <text:p text:style-name="Normal">The user enters an interactive AI Career Network.</text:p>
      <text:p text:style-name="Normal"/>
      <text:soft-page-break/>
      <text:p text:style-name="Normal">Careers become connected nodes.</text:p>
      <text:p text:style-name="Normal"/>
      <text:p text:style-name="Normal">Relationships become visible.</text:p>
      <text:p text:style-name="Normal"/>
      <text:p text:style-name="Normal">Curiosity increases naturally.</text:p>
      <text:p text:style-name="Normal"/>
      <text:p text:style-name="Normal">The user begins exploring possibilities.</text:p>
      <text:p text:style-name="Normal"/>
      <text:p text:style-name="Normal">---</text:p>
      <text:p text:style-name="Normal"/>
      <text:p text:style-name="Normal"># 11.5 Stage 3 — Self Discovery</text:p>
      <text:p text:style-name="Normal"/>
      <text:p text:style-name="Normal">Before recommending careers...</text:p>
      <text:p text:style-name="Normal"/>
      <text:p text:style-name="Normal">The platform discovers the user.</text:p>
      <text:p text:style-name="Normal"/>
      <text:p text:style-name="Normal">Through:</text:p>
      <text:p text:style-name="Normal"/>
      <text:p text:style-name="Normal">Conversation.</text:p>
      <text:p text:style-name="Normal"/>
      <text:p text:style-name="Normal">CV.</text:p>
      <text:p text:style-name="Normal"/>
      <text:p text:style-name="Normal">Questions.</text:p>
      <text:p text:style-name="Normal"/>
      <text:p text:style-name="Normal">Experience.</text:p>
      <text:p text:style-name="Normal"/>
      <text:p text:style-name="Normal">Goals.</text:p>
      <text:p text:style-name="Normal"/>
      <text:soft-page-break/>
      <text:p text:style-name="Normal">Interests.</text:p>
      <text:p text:style-name="Normal"/>
      <text:p text:style-name="Normal">Learning preferences.</text:p>
      <text:p text:style-name="Normal"/>
      <text:p text:style-name="Normal">The platform understands the individual before recommending anything.</text:p>
      <text:p text:style-name="Normal"/>
      <text:p text:style-name="Normal">---</text:p>
      <text:p text:style-name="Normal"/>
      <text:p text:style-name="Normal"># 11.6 Stage 4 — Career Match</text:p>
      <text:p text:style-name="Normal"/>
      <text:p text:style-name="Normal">The AI generates:</text:p>
      <text:p text:style-name="Normal"/>
      <text:p text:style-name="Normal">Career Compatibility Scores.</text:p>
      <text:p text:style-name="Normal"/>
      <text:p text:style-name="Normal">Career DNA.</text:p>
      <text:p text:style-name="Normal"/>
      <text:p text:style-name="Normal">Strength Analysis.</text:p>
      <text:p text:style-name="Normal"/>
      <text:p text:style-name="Normal">Transferable Skills.</text:p>
      <text:p text:style-name="Normal"/>
      <text:p text:style-name="Normal">Growth Opportunities.</text:p>
      <text:p text:style-name="Normal"/>
      <text:p text:style-name="Normal">Skill Gaps.</text:p>
      <text:p text:style-name="Normal"/>
      <text:p text:style-name="Normal">The user finally understands:</text:p>
      <text:p text:style-name="Normal"/>
      <text:p text:style-name="Normal">"This is why this career fits me."</text:p>
      <text:p text:style-name="Normal"/>
      <text:soft-page-break/>
      <text:p text:style-name="Normal">---</text:p>
      <text:p text:style-name="Normal"/>
      <text:p text:style-name="Normal"># 11.7 Stage 5 — Personal Dashboard</text:p>
      <text:p text:style-name="Normal"/>
      <text:p text:style-name="Normal">Immediately after analysis...</text:p>
      <text:p text:style-name="Normal"/>
      <text:p text:style-name="Normal">A personalized operating system is created.</text:p>
      <text:p text:style-name="Normal"/>
      <text:p text:style-name="Normal">The dashboard becomes the user's home.</text:p>
      <text:p text:style-name="Normal"/>
      <text:p text:style-name="Normal">Everything begins here.</text:p>
      <text:p text:style-name="Normal"/>
      <text:p text:style-name="Normal">Progress.</text:p>
      <text:p text:style-name="Normal"/>
      <text:p text:style-name="Normal">Goals.</text:p>
      <text:p text:style-name="Normal"/>
      <text:p text:style-name="Normal">Projects.</text:p>
      <text:p text:style-name="Normal"/>
      <text:p text:style-name="Normal">Roadmaps.</text:p>
      <text:p text:style-name="Normal"/>
      <text:p text:style-name="Normal">Achievements.</text:p>
      <text:p text:style-name="Normal"/>
      <text:p text:style-name="Normal">Recommendations.</text:p>
      <text:p text:style-name="Normal"/>
      <text:p text:style-name="Normal">AI conversations.</text:p>
      <text:p text:style-name="Normal"/>
      <text:p text:style-name="Normal">The dashboard evolves continuously.</text:p>
      <text:p text:style-name="Normal"/>
      <text:soft-page-break/>
      <text:p text:style-name="Normal">---</text:p>
      <text:p text:style-name="Normal"/>
      <text:p text:style-name="Normal"># 11.8 Stage 6 — Guided Learning</text:p>
      <text:p text:style-name="Normal"/>
      <text:p text:style-name="Normal">Learning is no longer random.</text:p>
      <text:p text:style-name="Normal"/>
      <text:p text:style-name="Normal">Every lesson has a purpose.</text:p>
      <text:p text:style-name="Normal"/>
      <text:p text:style-name="Normal">Every project builds toward employability.</text:p>
      <text:p text:style-name="Normal"/>
      <text:p text:style-name="Normal">Every milestone unlocks the next.</text:p>
      <text:p text:style-name="Normal"/>
      <text:p text:style-name="Normal">Users never wonder:</text:p>
      <text:p text:style-name="Normal"/>
      <text:p text:style-name="Normal">"What should I do next?"</text:p>
      <text:p text:style-name="Normal"/>
      <text:p text:style-name="Normal">The platform always knows.</text:p>
      <text:p text:style-name="Normal"/>
      <text:p text:style-name="Normal">---</text:p>
      <text:p text:style-name="Normal"/>
      <text:p text:style-name="Normal"># 11.9 Stage 7 — Portfolio Building</text:p>
      <text:p text:style-name="Normal"/>
      <text:p text:style-name="Normal">Knowledge without proof has little value.</text:p>
      <text:p text:style-name="Normal"/>
      <text:p text:style-name="Normal">The platform continuously recommends projects.</text:p>
      <text:p text:style-name="Normal"/>
      <text:p text:style-name="Normal">Beginner.</text:p>
      <text:p text:style-name="Normal"/>
      <text:soft-page-break/>
      <text:p text:style-name="Normal">Intermediate.</text:p>
      <text:p text:style-name="Normal"/>
      <text:p text:style-name="Normal">Advanced.</text:p>
      <text:p text:style-name="Normal"/>
      <text:p text:style-name="Normal">Professional.</text:p>
      <text:p text:style-name="Normal"/>
      <text:p text:style-name="Normal">Each project demonstrates real capability.</text:p>
      <text:p text:style-name="Normal"/>
      <text:p text:style-name="Normal">By the end of the roadmap...</text:p>
      <text:p text:style-name="Normal"/>
      <text:p text:style-name="Normal">The portfolio tells the user's story.</text:p>
      <text:p text:style-name="Normal"/>
      <text:p text:style-name="Normal">---</text:p>
      <text:p text:style-name="Normal"/>
      <text:p text:style-name="Normal"># 11.10 Stage 8 — Career Readiness</text:p>
      <text:p text:style-name="Normal"/>
      <text:p text:style-name="Normal">The platform continuously evaluates readiness.</text:p>
      <text:p text:style-name="Normal"/>
      <text:p text:style-name="Normal">Examples:</text:p>
      <text:p text:style-name="Normal"/>
      <text:p text:style-name="Normal">Technical Skills</text:p>
      <text:p text:style-name="Normal"/>
      <text:p text:style-name="Normal">Soft Skills</text:p>
      <text:p text:style-name="Normal"/>
      <text:p text:style-name="Normal">Projects</text:p>
      <text:p text:style-name="Normal"/>
      <text:p text:style-name="Normal">Interview Readiness</text:p>
      <text:p text:style-name="Normal"/>
      <text:soft-page-break/>
      <text:p text:style-name="Normal">Portfolio</text:p>
      <text:p text:style-name="Normal"/>
      <text:p text:style-name="Normal">Communication</text:p>
      <text:p text:style-name="Normal"/>
      <text:p text:style-name="Normal">Confidence</text:p>
      <text:p text:style-name="Normal"/>
      <text:p text:style-name="Normal">Career Readiness becomes measurable.</text:p>
      <text:p text:style-name="Normal"/>
      <text:p text:style-name="Normal">Users know exactly where they stand.</text:p>
      <text:p text:style-name="Normal"/>
      <text:p text:style-name="Normal">---</text:p>
      <text:p text:style-name="Normal"/>
      <text:p text:style-name="Normal"># 11.11 Stage 9 — Employment</text:p>
      <text:p text:style-name="Normal"/>
      <text:p text:style-name="Normal">The goal is not simply learning.</text:p>
      <text:p text:style-name="Normal"/>
      <text:p text:style-name="Normal">The goal is employment.</text:p>
      <text:p text:style-name="Normal"/>
      <text:p text:style-name="Normal">The platform should eventually support:</text:p>
      <text:p text:style-name="Normal"/>
      <text:p text:style-name="Normal">Resume optimization.</text:p>
      <text:p text:style-name="Normal"/>
      <text:p text:style-name="Normal">LinkedIn optimization.</text:p>
      <text:p text:style-name="Normal"/>
      <text:p text:style-name="Normal">Mock interviews.</text:p>
      <text:p text:style-name="Normal"/>
      <text:p text:style-name="Normal">Job matching.</text:p>
      <text:p text:style-name="Normal"/>
      <text:soft-page-break/>
      <text:p text:style-name="Normal">Application tracking.</text:p>
      <text:p text:style-name="Normal"/>
      <text:p text:style-name="Normal">Salary guidance.</text:p>
      <text:p text:style-name="Normal"/>
      <text:p text:style-name="Normal">Interview feedback.</text:p>
      <text:p text:style-name="Normal"/>
      <text:p text:style-name="Normal">Everything contributes toward employment.</text:p>
      <text:p text:style-name="Normal"/>
      <text:p text:style-name="Normal">---</text:p>
      <text:p text:style-name="Normal"/>
      <text:p text:style-name="Normal"># 11.12 Stage 10 — Continuous Growth</text:p>
      <text:p text:style-name="Normal"/>
      <text:p text:style-name="Normal">Receiving a job offer is not the end.</text:p>
      <text:p text:style-name="Normal"/>
      <text:p text:style-name="Normal">Users continue growing.</text:p>
      <text:p text:style-name="Normal"/>
      <text:p text:style-name="Normal">New technologies appear.</text:p>
      <text:p text:style-name="Normal"/>
      <text:p text:style-name="Normal">New skills emerge.</text:p>
      <text:p text:style-name="Normal"/>
      <text:p text:style-name="Normal">Promotions happen.</text:p>
      <text:p text:style-name="Normal"/>
      <text:p text:style-name="Normal">Career changes occur.</text:p>
      <text:p text:style-name="Normal"/>
      <text:p text:style-name="Normal">AI Career OS evolves alongside them.</text:p>
      <text:p text:style-name="Normal"/>
      <text:p text:style-name="Normal">The platform becomes a lifelong companion.</text:p>
      <text:p text:style-name="Normal"/>
      <text:soft-page-break/>
      <text:p text:style-name="Normal">---</text:p>
      <text:p text:style-name="Normal"/>
      <text:p text:style-name="Normal"># Journey Principles</text:p>
      <text:p text:style-name="Normal"/>
      <text:p text:style-name="Normal">Every stage should satisfy five conditions.</text:p>
      <text:p text:style-name="Normal"/>
      <text:p text:style-name="Normal">The user understands:</text:p>
      <text:p text:style-name="Normal"/>
      <text:p text:style-name="Normal">Where they are.</text:p>
      <text:p text:style-name="Normal"/>
      <text:p text:style-name="Normal">Why they are here.</text:p>
      <text:p text:style-name="Normal"/>
      <text:p text:style-name="Normal">What they should do.</text:p>
      <text:p text:style-name="Normal"/>
      <text:p text:style-name="Normal">Why it matters.</text:p>
      <text:p text:style-name="Normal"/>
      <text:p text:style-name="Normal">What comes next.</text:p>
      <text:p text:style-name="Normal"/>
      <text:p text:style-name="Normal">If these five questions are always answered...</text:p>
      <text:p text:style-name="Normal"/>
      <text:p text:style-name="Normal">The journey will always feel clear.</text:p>
      <text:p text:style-name="Normal"/>
      <text:p text:style-name="Normal">---</text:p>
      <text:p text:style-name="Normal"/>
      <text:p text:style-name="Normal"># User Journey Statement</text:p>
      <text:p text:style-name="Normal"/>
      <text:p text:style-name="Normal">**The experience of AI Career OS is not a collection of pages.**</text:p>
      <text:p text:style-name="Normal"/>
      <text:soft-page-break/>
      <text:p text:style-name="Normal">**It is a guided transformation from uncertainty to professional confidence, powered by Artificial Intelligence.**</text:p>
      <text:p text:style-name="Normal"/>
      <text:p text:style-name="Normal">---</text:p>
      <text:p text:style-name="Normal"/>
      <text:p text:style-name="Normal"># End of Volume 11</text:p>
      <text:p text:style-name="Normal"/>
      <text:p text:style-name="Normal">**Next Volume:** Experience Vision</text:p>
      <text:p text:style-name="Normal"/>
      <text:p text:style-name="Normal">#<text:s/><text:span text:style-name="T42">📘</text:span><text:s/>Volume 12</text:p>
      <text:p text:style-name="Normal"/>
      <text:p text:style-name="Normal"># Experience Vision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2.1 We Are Designing an Experience, Not a Website</text:p>
      <text:p text:style-name="Normal"/>
      <text:p text:style-name="Normal">Most educational platforms are collections of web pages.</text:p>
      <text:p text:style-name="Normal"/>
      <text:p text:style-name="Normal">AI Career OS is not.</text:p>
      <text:p text:style-name="Normal"/>
      <text:p text:style-name="Normal">The product should feel like entering an intelligent digital environment.</text:p>
      <text:p text:style-name="Normal"/>
      <text:p text:style-name="Normal">The experience begins the moment the user arrives.</text:p>
      <text:p text:style-name="Normal"/>
      <text:p text:style-name="Normal">From the first interaction, users should feel:</text:p>
      <text:p text:style-name="Normal"/>
      <text:p text:style-name="Normal">"This platform understands me."</text:p>
      <text:p text:style-name="Normal"/>
      <text:p text:style-name="Normal">Every interaction should strengthen that feeling.</text:p>
      <text:p text:style-name="Normal"/>
      <text:p text:style-name="Normal">---</text:p>
      <text:p text:style-name="Normal"/>
      <text:p text:style-name="Normal"># 12.2 The First Impression</text:p>
      <text:p text:style-name="Normal"/>
      <text:p text:style-name="Normal">Users decide within seconds whether a product is ordinary or extraordinary.</text:p>
      <text:p text:style-name="Normal"/>
      <text:p text:style-name="Normal">The landing experience should communicate:</text:p>
      <text:p text:style-name="Normal"/>
      <text:p text:style-name="Normal">Premium quality.</text:p>
      <text:p text:style-name="Normal"/>
      <text:p text:style-name="Normal">Intelligence.</text:p>
      <text:p text:style-name="Normal"/>
      <text:p text:style-name="Normal">Innovation.</text:p>
      <text:p text:style-name="Normal"/>
      <text:p text:style-name="Normal">Trust.</text:p>
      <text:p text:style-name="Normal"/>
      <text:p text:style-name="Normal">Clarity.</text:p>
      <text:p text:style-name="Normal"/>
      <text:p text:style-name="Normal">Possibility.</text:p>
      <text:p text:style-name="Normal"/>
      <text:p text:style-name="Normal">The interface should feel futuristic without becoming overwhelming.</text:p>
      <text:p text:style-name="Normal"/>
      <text:p text:style-name="Normal">Technology should impress.</text:p>
      <text:p text:style-name="Normal"/>
      <text:p text:style-name="Normal">Clarity should retain.</text:p>
      <text:p text:style-name="Normal"/>
      <text:p text:style-name="Normal">---</text:p>
      <text:p text:style-name="Normal"/>
      <text:p text:style-name="Normal"># 12.3 A Living Product</text:p>
      <text:p text:style-name="Normal"/>
      <text:p text:style-name="Normal">Nothing inside AI Career OS should feel static.</text:p>
      <text:p text:style-name="Normal"/>
      <text:p text:style-name="Normal">Backgrounds breathe.</text:p>
      <text:p text:style-name="Normal"/>
      <text:p text:style-name="Normal">Nodes pulse.</text:p>
      <text:p text:style-name="Normal"/>
      <text:p text:style-name="Normal">Particles move.</text:p>
      <text:p text:style-name="Normal"/>
      <text:p text:style-name="Normal">Gradients evolve.</text:p>
      <text:p text:style-name="Normal"/>
      <text:p text:style-name="Normal">Lighting reacts.</text:p>
      <text:p text:style-name="Normal"/>
      <text:p text:style-name="Normal">Progress updates.</text:p>
      <text:p text:style-name="Normal"/>
      <text:p text:style-name="Normal">Everything communicates life.</text:p>
      <text:p text:style-name="Normal"/>
      <text:p text:style-name="Normal">The interface should feel intelligent even when the user is not interacting with it.</text:p>
      <text:p text:style-name="Normal"/>
      <text:p text:style-name="Normal">---</text:p>
      <text:p text:style-name="Normal"/>
      <text:p text:style-name="Normal"># 12.4 The Product Should Feel Alive</text:p>
      <text:p text:style-name="Normal"/>
      <text:p text:style-name="Normal">The product should behave like an ecosystem.</text:p>
      <text:p text:style-name="Normal"/>
      <text:p text:style-name="Normal">Instead of showing static cards...</text:p>
      <text:p text:style-name="Normal"/>
      <text:p text:style-name="Normal">Cards evolve.</text:p>
      <text:p text:style-name="Normal"/>
      <text:p text:style-name="Normal">Instead of static progress bars...</text:p>
      <text:p text:style-name="Normal"/>
      <text:p text:style-name="Normal">Progress becomes animated.</text:p>
      <text:p text:style-name="Normal"/>
      <text:p text:style-name="Normal">Instead of loading screens...</text:p>
      <text:p text:style-name="Normal"/>
      <text:p text:style-name="Normal">Meaningful transitions explain progress.</text:p>
      <text:p text:style-name="Normal"/>
      <text:p text:style-name="Normal">Motion should communicate intelligence.</text:p>
      <text:p text:style-name="Normal"/>
      <text:p text:style-name="Normal">Never decoration.</text:p>
      <text:p text:style-name="Normal"/>
      <text:p text:style-name="Normal">---</text:p>
      <text:p text:style-name="Normal"/>
      <text:p text:style-name="Normal"># 12.5 Every Interaction Has Meaning</text:p>
      <text:p text:style-name="Normal"/>
      <text:p text:style-name="Normal">Every interaction should answer a question.</text:p>
      <text:p text:style-name="Normal"/>
      <text:p text:style-name="Normal">Hover</text:p>
      <text:p text:style-name="Normal"/>
      <text:p text:style-name="Normal">↓</text:p>
      <text:p text:style-name="Normal"/>
      <text:p text:style-name="Normal">What can I do?</text:p>
      <text:p text:style-name="Normal"/>
      <text:p text:style-name="Normal">Click</text:p>
      <text:p text:style-name="Normal"/>
      <text:p text:style-name="Normal">↓</text:p>
      <text:p text:style-name="Normal"/>
      <text:p text:style-name="Normal">What happened?</text:p>
      <text:p text:style-name="Normal"/>
      <text:p text:style-name="Normal">Transition</text:p>
      <text:p text:style-name="Normal"/>
      <text:p text:style-name="Normal">↓</text:p>
      <text:p text:style-name="Normal"/>
      <text:p text:style-name="Normal">Where am I going?</text:p>
      <text:p text:style-name="Normal"/>
      <text:p text:style-name="Normal">Animation</text:p>
      <text:p text:style-name="Normal"/>
      <text:p text:style-name="Normal">↓</text:p>
      <text:p text:style-name="Normal"/>
      <text:p text:style-name="Normal">Why did this change?</text:p>
      <text:p text:style-name="Normal"/>
      <text:p text:style-name="Normal">Nothing should animate without purpose.</text:p>
      <text:p text:style-name="Normal"/>
      <text:p text:style-name="Normal">---</text:p>
      <text:p text:style-name="Normal"/>
      <text:p text:style-name="Normal"># 12.6 Navigation Should Feel Like Exploration</text:p>
      <text:p text:style-name="Normal"/>
      <text:p text:style-name="Normal">Users should never feel they are clicking through menus.</text:p>
      <text:p text:style-name="Normal"/>
      <text:p text:style-name="Normal">They should feel they are exploring possibilities.</text:p>
      <text:p text:style-name="Normal"/>
      <text:p text:style-name="Normal">The product should encourage curiosity.</text:p>
      <text:p text:style-name="Normal"/>
      <text:p text:style-name="Normal">Discovery should become enjoyable.</text:p>
      <text:p text:style-name="Normal"/>
      <text:p text:style-name="Normal">---</text:p>
      <text:p text:style-name="Normal"/>
      <text:p text:style-name="Normal"># 12.7 Emotional Design</text:p>
      <text:p text:style-name="Normal"/>
      <text:p text:style-name="Normal">Every screen should create at least one emotion.</text:p>
      <text:p text:style-name="Normal"/>
      <text:p text:style-name="Normal">Confidence.</text:p>
      <text:p text:style-name="Normal"/>
      <text:p text:style-name="Normal">Curiosity.</text:p>
      <text:p text:style-name="Normal"/>
      <text:p text:style-name="Normal">Achievement.</text:p>
      <text:p text:style-name="Normal"/>
      <text:p text:style-name="Normal">Momentum.</text:p>
      <text:p text:style-name="Normal"/>
      <text:p text:style-name="Normal">Hope.</text:p>
      <text:p text:style-name="Normal"/>
      <text:p text:style-name="Normal">Direction.</text:p>
      <text:p text:style-name="Normal"/>
      <text:p text:style-name="Normal">Excitement.</text:p>
      <text:p text:style-name="Normal"/>
      <text:p text:style-name="Normal">If a screen creates no emotional response...</text:p>
      <text:p text:style-name="Normal"/>
      <text:p text:style-name="Normal">It should be redesigned.</text:p>
      <text:p text:style-name="Normal"/>
      <text:p text:style-name="Normal">---</text:p>
      <text:p text:style-name="Normal"/>
      <text:p text:style-name="Normal"># 12.8 Premium Experience</text:p>
      <text:p text:style-name="Normal"/>
      <text:p text:style-name="Normal">Premium does not mean expensive.</text:p>
      <text:p text:style-name="Normal"/>
      <text:p text:style-name="Normal">Premium means intentional.</text:p>
      <text:p text:style-name="Normal"/>
      <text:p text:style-name="Normal">Typography.</text:p>
      <text:p text:style-name="Normal"/>
      <text:p text:style-name="Normal">Spacing.</text:p>
      <text:p text:style-name="Normal"/>
      <text:p text:style-name="Normal">Animation.</text:p>
      <text:p text:style-name="Normal"/>
      <text:p text:style-name="Normal">Illustration.</text:p>
      <text:p text:style-name="Normal"/>
      <text:p text:style-name="Normal">Color.</text:p>
      <text:p text:style-name="Normal"/>
      <text:p text:style-name="Normal">Interaction.</text:p>
      <text:p text:style-name="Normal"/>
      <text:p text:style-name="Normal">Performance.</text:p>
      <text:p text:style-name="Normal"/>
      <text:p text:style-name="Normal">Everything communicates quality.</text:p>
      <text:p text:style-name="Normal"/>
      <text:p text:style-name="Normal">---</text:p>
      <text:p text:style-name="Normal"/>
      <text:p text:style-name="Normal"># Experience Vision Statement</text:p>
      <text:p text:style-name="Normal"/>
      <text:p text:style-name="Normal">**Users should remember how AI Career OS made them feel—not simply what it showed them.**</text:p>
      <text:p text:style-name="Normal"/>
      <text:p text:style-name="Normal">---</text:p>
      <text:p text:style-name="Normal"/>
      <text:p text:style-name="Normal"># End of Volume 12</text:p>
      <text:p text:style-name="Normal"/>
      <text:p text:style-name="Normal">**Next Volume:** UX Manifesto</text:p>
      <text:p text:style-name="Normal"/>
      <text:p text:style-name="Normal">#<text:s/><text:span text:style-name="T43">📘</text:span><text:s/>Volume 13</text:p>
      <text:p text:style-name="Normal"/>
      <text:p text:style-name="Normal"># UX Manifesto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3.1 UX Is Our Competitive Advantage</text:p>
      <text:p text:style-name="Normal"/>
      <text:p text:style-name="Normal">Technology can be copied.</text:p>
      <text:p text:style-name="Normal"/>
      <text:p text:style-name="Normal">Features can be copied.</text:p>
      <text:p text:style-name="Normal"/>
      <text:p text:style-name="Normal">Design trends can be copied.</text:p>
      <text:p text:style-name="Normal"/>
      <text:soft-page-break/>
      <text:p text:style-name="Normal">User experience is much harder to copy.</text:p>
      <text:p text:style-name="Normal"/>
      <text:p text:style-name="Normal">AI Career OS should become memorable because of how it feels to use.</text:p>
      <text:p text:style-name="Normal"/>
      <text:p text:style-name="Normal">---</text:p>
      <text:p text:style-name="Normal"/>
      <text:p text:style-name="Normal"># 13.2 The User Should Never Feel Lost</text:p>
      <text:p text:style-name="Normal"/>
      <text:p text:style-name="Normal">At every moment users should know:</text:p>
      <text:p text:style-name="Normal"/>
      <text:p text:style-name="Normal">Where they are.</text:p>
      <text:p text:style-name="Normal"/>
      <text:p text:style-name="Normal">Why they are there.</text:p>
      <text:p text:style-name="Normal"/>
      <text:p text:style-name="Normal">What they should do.</text:p>
      <text:p text:style-name="Normal"/>
      <text:p text:style-name="Normal">What happens next.</text:p>
      <text:p text:style-name="Normal"/>
      <text:p text:style-name="Normal">Uncertainty belongs in career decisions.</text:p>
      <text:p text:style-name="Normal"/>
      <text:p text:style-name="Normal">Not inside the interface.</text:p>
      <text:p text:style-name="Normal"/>
      <text:p text:style-name="Normal">---</text:p>
      <text:p text:style-name="Normal"/>
      <text:p text:style-name="Normal"># 13.3 Reduce Thinking</text:p>
      <text:p text:style-name="Normal"/>
      <text:p text:style-name="Normal">Good UX reduces thinking.</text:p>
      <text:p text:style-name="Normal"/>
      <text:soft-page-break/>
      <text:p text:style-name="Normal">Instead of asking users to decide...</text:p>
      <text:p text:style-name="Normal"/>
      <text:p text:style-name="Normal">Recommend.</text:p>
      <text:p text:style-name="Normal"/>
      <text:p text:style-name="Normal">Instead of making users search...</text:p>
      <text:p text:style-name="Normal"/>
      <text:p text:style-name="Normal">Guide.</text:p>
      <text:p text:style-name="Normal"/>
      <text:p text:style-name="Normal">Instead of making users compare...</text:p>
      <text:p text:style-name="Normal"/>
      <text:p text:style-name="Normal">Explain.</text:p>
      <text:p text:style-name="Normal"/>
      <text:p text:style-name="Normal">---</text:p>
      <text:p text:style-name="Normal"/>
      <text:p text:style-name="Normal"># 13.4 One Clear Action</text:p>
      <text:p text:style-name="Normal"/>
      <text:p text:style-name="Normal">Every screen should have one primary objective.</text:p>
      <text:p text:style-name="Normal"/>
      <text:p text:style-name="Normal">Never overwhelm users with multiple competing actions.</text:p>
      <text:p text:style-name="Normal"/>
      <text:p text:style-name="Normal">Attention is valuable.</text:p>
      <text:p text:style-name="Normal"/>
      <text:p text:style-name="Normal">Protect it.</text:p>
      <text:p text:style-name="Normal"/>
      <text:p text:style-name="Normal">---</text:p>
      <text:p text:style-name="Normal"/>
      <text:p text:style-name="Normal"># 13.5 Progressive Disclosure</text:p>
      <text:p text:style-name="Normal"/>
      <text:soft-page-break/>
      <text:p text:style-name="Normal">Do not show everything immediately.</text:p>
      <text:p text:style-name="Normal"/>
      <text:p text:style-name="Normal">Reveal complexity gradually.</text:p>
      <text:p text:style-name="Normal"/>
      <text:p text:style-name="Normal">Beginner users should feel comfortable.</text:p>
      <text:p text:style-name="Normal"/>
      <text:p text:style-name="Normal">Advanced users should feel powerful.</text:p>
      <text:p text:style-name="Normal"/>
      <text:p text:style-name="Normal">The interface should grow with the user.</text:p>
      <text:p text:style-name="Normal"/>
      <text:p text:style-name="Normal">---</text:p>
      <text:p text:style-name="Normal"/>
      <text:p text:style-name="Normal"># 13.6 Design for Confidence</text:p>
      <text:p text:style-name="Normal"/>
      <text:p text:style-name="Normal">Every completed task should produce feedback.</text:p>
      <text:p text:style-name="Normal"/>
      <text:p text:style-name="Normal">Examples:</text:p>
      <text:p text:style-name="Normal"/>
      <text:p text:style-name="Normal">Animation.</text:p>
      <text:p text:style-name="Normal"/>
      <text:p text:style-name="Normal">Success message.</text:p>
      <text:p text:style-name="Normal"/>
      <text:p text:style-name="Normal">Updated progress.</text:p>
      <text:p text:style-name="Normal"/>
      <text:p text:style-name="Normal">Achievement.</text:p>
      <text:p text:style-name="Normal"/>
      <text:p text:style-name="Normal">Users should constantly feel they are moving forward.</text:p>
      <text:p text:style-name="Normal"/>
      <text:soft-page-break/>
      <text:p text:style-name="Normal">---</text:p>
      <text:p text:style-name="Normal"/>
      <text:p text:style-name="Normal"># 13.7 Mobile First</text:p>
      <text:p text:style-name="Normal"/>
      <text:p text:style-name="Normal">The mobile experience should never feel like a smaller desktop site.</text:p>
      <text:p text:style-name="Normal"/>
      <text:p text:style-name="Normal">It should feel intentionally designed.</text:p>
      <text:p text:style-name="Normal"/>
      <text:p text:style-name="Normal">Navigation.</text:p>
      <text:p text:style-name="Normal"/>
      <text:p text:style-name="Normal">Touch targets.</text:p>
      <text:p text:style-name="Normal"/>
      <text:p text:style-name="Normal">Typography.</text:p>
      <text:p text:style-name="Normal"/>
      <text:p text:style-name="Normal">Spacing.</text:p>
      <text:p text:style-name="Normal"/>
      <text:p text:style-name="Normal">Gestures.</text:p>
      <text:p text:style-name="Normal"/>
      <text:p text:style-name="Normal">Everything should prioritize mobile usability.</text:p>
      <text:p text:style-name="Normal"/>
      <text:p text:style-name="Normal">---</text:p>
      <text:p text:style-name="Normal"/>
      <text:p text:style-name="Normal"># 13.8 Accessibility</text:p>
      <text:p text:style-name="Normal"/>
      <text:p text:style-name="Normal">AI Career OS should be usable by everyone.</text:p>
      <text:p text:style-name="Normal"/>
      <text:p text:style-name="Normal">Keyboard navigation.</text:p>
      <text:p text:style-name="Normal"/>
      <text:soft-page-break/>
      <text:p text:style-name="Normal">Screen readers.</text:p>
      <text:p text:style-name="Normal"/>
      <text:p text:style-name="Normal">High contrast.</text:p>
      <text:p text:style-name="Normal"/>
      <text:p text:style-name="Normal">Color accessibility.</text:p>
      <text:p text:style-name="Normal"/>
      <text:p text:style-name="Normal">Motion preferences.</text:p>
      <text:p text:style-name="Normal"/>
      <text:p text:style-name="Normal">Readable typography.</text:p>
      <text:p text:style-name="Normal"/>
      <text:p text:style-name="Normal">Accessibility is not optional.</text:p>
      <text:p text:style-name="Normal"/>
      <text:p text:style-name="Normal">It is part of quality.</text:p>
      <text:p text:style-name="Normal"/>
      <text:p text:style-name="Normal">---</text:p>
      <text:p text:style-name="Normal"/>
      <text:p text:style-name="Normal"># UX Manifesto Statement</text:p>
      <text:p text:style-name="Normal"/>
      <text:p text:style-name="Normal">**Every design decision should reduce uncertainty, increase confidence, and help users move toward meaningful career progress.**</text:p>
      <text:p text:style-name="Normal"/>
      <text:p text:style-name="Normal">---</text:p>
      <text:p text:style-name="Normal"/>
      <text:p text:style-name="Normal"># End of Volume 13</text:p>
      <text:p text:style-name="Normal"/>
      <text:p text:style-name="Normal">**Next Volume:** Motion Manifesto</text:p>
      <text:p text:style-name="Normal"/>
      <text:p text:style-name="Normal">#<text:s/><text:span text:style-name="T44">📘</text:span><text:s/>Volume 14</text:p>
      <text:p text:style-name="Normal"/>
      <text:p text:style-name="Normal"># Motion Manifesto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4.1 Motion Is Communication</text:p>
      <text:p text:style-name="Normal"/>
      <text:p text:style-name="Normal">Animation should never exist for decoration.</text:p>
      <text:p text:style-name="Normal"/>
      <text:p text:style-name="Normal">Every movement communicates information.</text:p>
      <text:p text:style-name="Normal"/>
      <text:p text:style-name="Normal">Direction.</text:p>
      <text:p text:style-name="Normal"/>
      <text:p text:style-name="Normal">Progress.</text:p>
      <text:p text:style-name="Normal"/>
      <text:p text:style-name="Normal">Hierarchy.</text:p>
      <text:p text:style-name="Normal"/>
      <text:p text:style-name="Normal">Relationships.</text:p>
      <text:p text:style-name="Normal"/>
      <text:p text:style-name="Normal">State changes.</text:p>
      <text:p text:style-name="Normal"/>
      <text:p text:style-name="Normal">Motion explains what static interfaces cannot.</text:p>
      <text:p text:style-name="Normal"/>
      <text:p text:style-name="Normal">---</text:p>
      <text:p text:style-name="Normal"/>
      <text:p text:style-name="Normal"># 14.2 Cinematic Navigation</text:p>
      <text:p text:style-name="Normal"/>
      <text:p text:style-name="Normal">Navigation should feel cinematic.</text:p>
      <text:p text:style-name="Normal"/>
      <text:p text:style-name="Normal">Not mechanical.</text:p>
      <text:p text:style-name="Normal"/>
      <text:p text:style-name="Normal">Transitions should feel like moving through an intelligent world.</text:p>
      <text:p text:style-name="Normal"/>
      <text:p text:style-name="Normal">Never like loading separate pages.</text:p>
      <text:p text:style-name="Normal"/>
      <text:p text:style-name="Normal">---</text:p>
      <text:p text:style-name="Normal"/>
      <text:p text:style-name="Normal"># 14.3 The Camera Is Part of the UX</text:p>
      <text:p text:style-name="Normal"/>
      <text:p text:style-name="Normal">The camera is a design tool.</text:p>
      <text:p text:style-name="Normal"/>
      <text:p text:style-name="Normal">Not a technical detail.</text:p>
      <text:p text:style-name="Normal"/>
      <text:p text:style-name="Normal">Camera movement should communicate:</text:p>
      <text:p text:style-name="Normal"/>
      <text:p text:style-name="Normal">Discovery.</text:p>
      <text:p text:style-name="Normal"/>
      <text:p text:style-name="Normal">Progress.</text:p>
      <text:p text:style-name="Normal"/>
      <text:p text:style-name="Normal">Scale.</text:p>
      <text:p text:style-name="Normal"/>
      <text:p text:style-name="Normal">Importance.</text:p>
      <text:p text:style-name="Normal"/>
      <text:p text:style-name="Normal">Destination.</text:p>
      <text:p text:style-name="Normal"/>
      <text:p text:style-name="Normal">The user should feel like they are traveling—not clicking.</text:p>
      <text:p text:style-name="Normal"/>
      <text:p text:style-name="Normal">---</text:p>
      <text:p text:style-name="Normal"/>
      <text:p text:style-name="Normal"># 14.4 Neural Network Navigation</text:p>
      <text:p text:style-name="Normal"/>
      <text:p text:style-name="Normal">The AI Career Network becomes the primary navigation experience.</text:p>
      <text:p text:style-name="Normal"/>
      <text:p text:style-name="Normal">Every career is represented as a living node.</text:p>
      <text:p text:style-name="Normal"/>
      <text:p text:style-name="Normal">Connections pulse continuously.</text:p>
      <text:p text:style-name="Normal"/>
      <text:p text:style-name="Normal">Particles travel between careers.</text:p>
      <text:p text:style-name="Normal"/>
      <text:p text:style-name="Normal">The camera flies through the network.</text:p>
      <text:p text:style-name="Normal"/>
      <text:p text:style-name="Normal">Selecting a career feels like traveling toward knowledge.</text:p>
      <text:p text:style-name="Normal"/>
      <text:p text:style-name="Normal">Not opening another page.</text:p>
      <text:p text:style-name="Normal"/>
      <text:p text:style-name="Normal">---</text:p>
      <text:p text:style-name="Normal"/>
      <text:p text:style-name="Normal"># 14.5 Motion Hierarchy</text:p>
      <text:p text:style-name="Normal"/>
      <text:p text:style-name="Normal">Every animation belongs to one of four levels.</text:p>
      <text:p text:style-name="Normal"/>
      <text:p text:style-name="Normal">Level 1</text:p>
      <text:p text:style-name="Normal"/>
      <text:p text:style-name="Normal">Micro Interactions</text:p>
      <text:p text:style-name="Normal"/>
      <text:p text:style-name="Normal">Hover.</text:p>
      <text:p text:style-name="Normal"/>
      <text:p text:style-name="Normal">Buttons.</text:p>
      <text:p text:style-name="Normal"/>
      <text:p text:style-name="Normal">Icons.</text:p>
      <text:p text:style-name="Normal"/>
      <text:p text:style-name="Normal">Cards.</text:p>
      <text:p text:style-name="Normal"/>
      <text:p text:style-name="Normal">---</text:p>
      <text:p text:style-name="Normal"/>
      <text:p text:style-name="Normal">Level 2</text:p>
      <text:p text:style-name="Normal"/>
      <text:p text:style-name="Normal">Component Motion</text:p>
      <text:p text:style-name="Normal"/>
      <text:p text:style-name="Normal">Dialogs.</text:p>
      <text:p text:style-name="Normal"/>
      <text:p text:style-name="Normal">Panels.</text:p>
      <text:p text:style-name="Normal"/>
      <text:p text:style-name="Normal">Charts.</text:p>
      <text:p text:style-name="Normal"/>
      <text:p text:style-name="Normal">Progress.</text:p>
      <text:p text:style-name="Normal"/>
      <text:p text:style-name="Normal">---</text:p>
      <text:p text:style-name="Normal"/>
      <text:p text:style-name="Normal">Level 3</text:p>
      <text:p text:style-name="Normal"/>
      <text:p text:style-name="Normal">Page Motion</text:p>
      <text:p text:style-name="Normal"/>
      <text:p text:style-name="Normal">Transitions.</text:p>
      <text:p text:style-name="Normal"/>
      <text:p text:style-name="Normal">Navigation.</text:p>
      <text:p text:style-name="Normal"/>
      <text:p text:style-name="Normal">Screen changes.</text:p>
      <text:p text:style-name="Normal"/>
      <text:p text:style-name="Normal">---</text:p>
      <text:p text:style-name="Normal"/>
      <text:p text:style-name="Normal">Level 4</text:p>
      <text:p text:style-name="Normal"/>
      <text:p text:style-name="Normal">World Motion</text:p>
      <text:p text:style-name="Normal"/>
      <text:p text:style-name="Normal">Camera movement.</text:p>
      <text:p text:style-name="Normal"/>
      <text:p text:style-name="Normal">Neural Network.</text:p>
      <text:p text:style-name="Normal"/>
      <text:p text:style-name="Normal">Particles.</text:p>
      <text:p text:style-name="Normal"/>
      <text:p text:style-name="Normal">Background systems.</text:p>
      <text:p text:style-name="Normal"/>
      <text:p text:style-name="Normal">Environmental animation.</text:p>
      <text:p text:style-name="Normal"/>
      <text:p text:style-name="Normal">Each level should complement the others.</text:p>
      <text:p text:style-name="Normal"/>
      <text:p text:style-name="Normal">Never compete.</text:p>
      <text:p text:style-name="Normal"/>
      <text:p text:style-name="Normal">---</text:p>
      <text:p text:style-name="Normal"/>
      <text:p text:style-name="Normal"># 14.6 Performance First</text:p>
      <text:p text:style-name="Normal"/>
      <text:p text:style-name="Normal">Beautiful animation means nothing if performance suffers.</text:p>
      <text:p text:style-name="Normal"/>
      <text:p text:style-name="Normal">Motion should always remain smooth.</text:p>
      <text:p text:style-name="Normal"/>
      <text:p text:style-name="Normal">GPU accelerated.</text:p>
      <text:p text:style-name="Normal"/>
      <text:p text:style-name="Normal">Optimized.</text:p>
      <text:p text:style-name="Normal"/>
      <text:p text:style-name="Normal">Responsive.</text:p>
      <text:p text:style-name="Normal"/>
      <text:p text:style-name="Normal">Fast.</text:p>
      <text:p text:style-name="Normal"/>
      <text:p text:style-name="Normal">Elegant.</text:p>
      <text:p text:style-name="Normal"/>
      <text:p text:style-name="Normal">The user should never notice dropped frames.</text:p>
      <text:p text:style-name="Normal"/>
      <text:p text:style-name="Normal">---</text:p>
      <text:p text:style-name="Normal"/>
      <text:p text:style-name="Normal"># 14.7 Motion Personality</text:p>
      <text:p text:style-name="Normal"/>
      <text:p text:style-name="Normal">Motion should feel:</text:p>
      <text:p text:style-name="Normal"/>
      <text:p text:style-name="Normal">Confident.</text:p>
      <text:p text:style-name="Normal"/>
      <text:p text:style-name="Normal">Smooth.</text:p>
      <text:p text:style-name="Normal"/>
      <text:p text:style-name="Normal">Natural.</text:p>
      <text:p text:style-name="Normal"/>
      <text:p text:style-name="Normal">Intelligent.</text:p>
      <text:p text:style-name="Normal"/>
      <text:p text:style-name="Normal">Elegant.</text:p>
      <text:p text:style-name="Normal"/>
      <text:p text:style-name="Normal">Never:</text:p>
      <text:p text:style-name="Normal"/>
      <text:p text:style-name="Normal">Aggressive.</text:p>
      <text:p text:style-name="Normal"/>
      <text:p text:style-name="Normal">Distracting.</text:p>
      <text:p text:style-name="Normal"/>
      <text:p text:style-name="Normal">Chaotic.</text:p>
      <text:p text:style-name="Normal"/>
      <text:p text:style-name="Normal">Unpredictable.</text:p>
      <text:p text:style-name="Normal"/>
      <text:p text:style-name="Normal">Slow.</text:p>
      <text:p text:style-name="Normal"/>
      <text:p text:style-name="Normal">---</text:p>
      <text:p text:style-name="Normal"/>
      <text:p text:style-name="Normal"># 14.8 Signature Motion</text:p>
      <text:p text:style-name="Normal"/>
      <text:p text:style-name="Normal">AI Career OS should become recognizable through motion.</text:p>
      <text:p text:style-name="Normal"/>
      <text:p text:style-name="Normal">Just as Apple products feel like Apple...</text:p>
      <text:p text:style-name="Normal"/>
      <text:p text:style-name="Normal">AI Career OS should feel unmistakably like AI Career OS.</text:p>
      <text:p text:style-name="Normal"/>
      <text:p text:style-name="Normal">Users should recognize the product from its movement alone.</text:p>
      <text:p text:style-name="Normal"/>
      <text:p text:style-name="Normal">---</text:p>
      <text:p text:style-name="Normal"/>
      <text:p text:style-name="Normal"># Motion Manifesto Statement</text:p>
      <text:p text:style-name="Normal"/>
      <text:p text:style-name="Normal">**Motion is not decoration. Motion is the visual language of intelligence. Every movement should make the product feel more alive, more understandable, and more memorable.**</text:p>
      <text:p text:style-name="Normal"/>
      <text:p text:style-name="Normal">---</text:p>
      <text:p text:style-name="Normal"/>
      <text:p text:style-name="Normal"># End of Volume 14</text:p>
      <text:p text:style-name="Normal"/>
      <text:p text:style-name="Normal">**Next Volume:** AI Career Network</text:p>
      <text:p text:style-name="Normal"/>
      <text:p text:style-name="Normal">#<text:s/><text:span text:style-name="T45">📘</text:span><text:s/>Volume 15</text:p>
      <text:p text:style-name="Normal"/>
      <text:p text:style-name="Normal"># AI Career Network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5.1 Why the AI Career Network Exists</text:p>
      <text:p text:style-name="Normal"/>
      <text:p text:style-name="Normal">Traditional websites organize information using menus.</text:p>
      <text:p text:style-name="Normal"/>
      <text:p text:style-name="Normal">Educational websites organize information using categories.</text:p>
      <text:p text:style-name="Normal"/>
      <text:p text:style-name="Normal">AI Career OS should organize information using relationships.</text:p>
      <text:p text:style-name="Normal"/>
      <text:p text:style-name="Normal">Knowledge is not linear.</text:p>
      <text:p text:style-name="Normal"/>
      <text:p text:style-name="Normal">Careers are connected.</text:p>
      <text:p text:style-name="Normal"/>
      <text:p text:style-name="Normal">Skills overlap.</text:p>
      <text:p text:style-name="Normal"/>
      <text:p text:style-name="Normal">Technologies evolve together.</text:p>
      <text:p text:style-name="Normal"/>
      <text:p text:style-name="Normal">The AI Career Network visualizes these relationships.</text:p>
      <text:p text:style-name="Normal"/>
      <text:p text:style-name="Normal">Instead of browsing pages...</text:p>
      <text:p text:style-name="Normal"/>
      <text:p text:style-name="Normal">Users explore an intelligent network.</text:p>
      <text:p text:style-name="Normal"/>
      <text:p text:style-name="Normal">---</text:p>
      <text:p text:style-name="Normal"/>
      <text:p text:style-name="Normal"># 15.2 A New Navigation Paradigm</text:p>
      <text:p text:style-name="Normal"/>
      <text:p text:style-name="Normal">The AI Career Network is not a background animation.</text:p>
      <text:p text:style-name="Normal"/>
      <text:p text:style-name="Normal">It is not decoration.</text:p>
      <text:p text:style-name="Normal"/>
      <text:p text:style-name="Normal">It is the primary navigation system of AI Career OS.</text:p>
      <text:p text:style-name="Normal"/>
      <text:p text:style-name="Normal">Every career exists as a living node.</text:p>
      <text:p text:style-name="Normal"/>
      <text:p text:style-name="Normal">Every node connects to related careers.</text:p>
      <text:p text:style-name="Normal"/>
      <text:p text:style-name="Normal">Users navigate by moving through the network.</text:p>
      <text:p text:style-name="Normal"/>
      <text:p text:style-name="Normal">Navigation becomes exploration.</text:p>
      <text:p text:style-name="Normal"/>
      <text:p text:style-name="Normal">---</text:p>
      <text:p text:style-name="Normal"/>
      <text:p text:style-name="Normal"># 15.3 The Living Neural Network</text:p>
      <text:p text:style-name="Normal"/>
      <text:p text:style-name="Normal">Imagine standing inside a living neural network.</text:p>
      <text:p text:style-name="Normal"/>
      <text:p text:style-name="Normal">Thousands of glowing connections.</text:p>
      <text:p text:style-name="Normal"/>
      <text:p text:style-name="Normal">Soft moving particles.</text:p>
      <text:p text:style-name="Normal"/>
      <text:p text:style-name="Normal">Dynamic lighting.</text:p>
      <text:p text:style-name="Normal"/>
      <text:p text:style-name="Normal">Nodes constantly breathing.</text:p>
      <text:p text:style-name="Normal"/>
      <text:p text:style-name="Normal">This represents the AI industry.</text:p>
      <text:p text:style-name="Normal"/>
      <text:p text:style-name="Normal">Alive.</text:p>
      <text:p text:style-name="Normal"/>
      <text:p text:style-name="Normal">Growing.</text:p>
      <text:p text:style-name="Normal"/>
      <text:p text:style-name="Normal">Connected.</text:p>
      <text:p text:style-name="Normal"/>
      <text:p text:style-name="Normal">Every interaction reinforces this feeling.</text:p>
      <text:p text:style-name="Normal"/>
      <text:p text:style-name="Normal">---</text:p>
      <text:p text:style-name="Normal"/>
      <text:p text:style-name="Normal"># 15.4 Career Nodes</text:p>
      <text:p text:style-name="Normal"/>
      <text:p text:style-name="Normal">Each career becomes an intelligent node.</text:p>
      <text:p text:style-name="Normal"/>
      <text:p text:style-name="Normal">Examples:</text:p>
      <text:p text:style-name="Normal"/>
      <text:p text:style-name="Normal">AI Engineer</text:p>
      <text:p text:style-name="Normal"/>
      <text:p text:style-name="Normal">Machine Learning Engineer</text:p>
      <text:p text:style-name="Normal"/>
      <text:p text:style-name="Normal">Prompt Engineer</text:p>
      <text:p text:style-name="Normal"/>
      <text:p text:style-name="Normal">AI Automation Engineer</text:p>
      <text:p text:style-name="Normal"/>
      <text:p text:style-name="Normal">AI Product Manager</text:p>
      <text:p text:style-name="Normal"/>
      <text:p text:style-name="Normal">Computer Vision Engineer</text:p>
      <text:p text:style-name="Normal"/>
      <text:p text:style-name="Normal">MLOps Engineer</text:p>
      <text:p text:style-name="Normal"/>
      <text:p text:style-name="Normal">Data Scientist</text:p>
      <text:p text:style-name="Normal"/>
      <text:p text:style-name="Normal">AI Consultant</text:p>
      <text:p text:style-name="Normal"/>
      <text:p text:style-name="Normal">AI Researcher</text:p>
      <text:p text:style-name="Normal"/>
      <text:p text:style-name="Normal">LLM Engineer</text:p>
      <text:p text:style-name="Normal"/>
      <text:p text:style-name="Normal">AI Solutions Architect</text:p>
      <text:p text:style-name="Normal"/>
      <text:p text:style-name="Normal">Every node contains structured knowledge.</text:p>
      <text:p text:style-name="Normal"/>
      <text:p text:style-name="Normal">Salary.</text:p>
      <text:p text:style-name="Normal"/>
      <text:p text:style-name="Normal">Skills.</text:p>
      <text:p text:style-name="Normal"/>
      <text:p text:style-name="Normal">Roadmap.</text:p>
      <text:p text:style-name="Normal"/>
      <text:p text:style-name="Normal">Projects.</text:p>
      <text:p text:style-name="Normal"/>
      <text:p text:style-name="Normal">Demand.</text:p>
      <text:p text:style-name="Normal"/>
      <text:p text:style-name="Normal">Future Outlook.</text:p>
      <text:p text:style-name="Normal"/>
      <text:p text:style-name="Normal">Related Careers.</text:p>
      <text:p text:style-name="Normal"/>
      <text:p text:style-name="Normal">---</text:p>
      <text:p text:style-name="Normal"/>
      <text:p text:style-name="Normal"># 15.5 Career Relationships</text:p>
      <text:p text:style-name="Normal"/>
      <text:p text:style-name="Normal">Relationships become visible.</text:p>
      <text:p text:style-name="Normal"/>
      <text:p text:style-name="Normal">Example</text:p>
      <text:p text:style-name="Normal"/>
      <text:p text:style-name="Normal">Prompt Engineer</text:p>
      <text:p text:style-name="Normal"/>
      <text:p text:style-name="Normal">↓</text:p>
      <text:p text:style-name="Normal"/>
      <text:p text:style-name="Normal">AI Automation Engineer</text:p>
      <text:p text:style-name="Normal"/>
      <text:p text:style-name="Normal">↓</text:p>
      <text:p text:style-name="Normal"/>
      <text:p text:style-name="Normal">AI Agent Engineer</text:p>
      <text:p text:style-name="Normal"/>
      <text:p text:style-name="Normal">↓</text:p>
      <text:p text:style-name="Normal"/>
      <text:p text:style-name="Normal">AI Solutions Architect</text:p>
      <text:p text:style-name="Normal"/>
      <text:p text:style-name="Normal">Users immediately understand:</text:p>
      <text:p text:style-name="Normal"/>
      <text:p text:style-name="Normal">Possible transitions.</text:p>
      <text:p text:style-name="Normal"/>
      <text:p text:style-name="Normal">Skill overlap.</text:p>
      <text:p text:style-name="Normal"/>
      <text:p text:style-name="Normal">Career evolution.</text:p>
      <text:p text:style-name="Normal"/>
      <text:p text:style-name="Normal">Growth opportunities.</text:p>
      <text:p text:style-name="Normal"/>
      <text:p text:style-name="Normal">---</text:p>
      <text:p text:style-name="Normal"/>
      <text:p text:style-name="Normal"># 15.6 Camera Navigation</text:p>
      <text:p text:style-name="Normal"/>
      <text:p text:style-name="Normal">Clicking a node should never open another page immediately.</text:p>
      <text:p text:style-name="Normal"/>
      <text:p text:style-name="Normal">Instead:</text:p>
      <text:p text:style-name="Normal"/>
      <text:p text:style-name="Normal">Camera focuses.</text:p>
      <text:p text:style-name="Normal"/>
      <text:p text:style-name="Normal">Zoom begins.</text:p>
      <text:p text:style-name="Normal"/>
      <text:p text:style-name="Normal">Connections illuminate.</text:p>
      <text:p text:style-name="Normal"/>
      <text:p text:style-name="Normal">Particles accelerate.</text:p>
      <text:p text:style-name="Normal"/>
      <text:p text:style-name="Normal">Camera travels.</text:p>
      <text:p text:style-name="Normal"/>
      <text:p text:style-name="Normal">Destination grows larger.</text:p>
      <text:p text:style-name="Normal"/>
      <text:p text:style-name="Normal">Roadmap appears naturally.</text:p>
      <text:p text:style-name="Normal"/>
      <text:p text:style-name="Normal">The experience feels cinematic.</text:p>
      <text:p text:style-name="Normal"/>
      <text:p text:style-name="Normal">---</text:p>
      <text:p text:style-name="Normal"/>
      <text:p text:style-name="Normal"># 15.7 Dynamic Intelligence</text:p>
      <text:p text:style-name="Normal"/>
      <text:p text:style-name="Normal">The network should evolve.</text:p>
      <text:p text:style-name="Normal"/>
      <text:p text:style-name="Normal">New careers appear.</text:p>
      <text:p text:style-name="Normal"/>
      <text:p text:style-name="Normal">Demand changes.</text:p>
      <text:p text:style-name="Normal"/>
      <text:p text:style-name="Normal">Emerging technologies become visible.</text:p>
      <text:p text:style-name="Normal"/>
      <text:p text:style-name="Normal">Deprecated technologies fade.</text:p>
      <text:p text:style-name="Normal"/>
      <text:p text:style-name="Normal">The network reflects reality.</text:p>
      <text:p text:style-name="Normal"/>
      <text:p text:style-name="Normal">Not static documentation.</text:p>
      <text:p text:style-name="Normal"/>
      <text:p text:style-name="Normal">---</text:p>
      <text:p text:style-name="Normal"/>
      <text:p text:style-name="Normal"># 15.8 AI-Powered Exploration</text:p>
      <text:p text:style-name="Normal"/>
      <text:p text:style-name="Normal">The AI should recommend nearby careers.</text:p>
      <text:p text:style-name="Normal"/>
      <text:p text:style-name="Normal">Example:</text:p>
      <text:p text:style-name="Normal"/>
      <text:p text:style-name="Normal">"If you like AI Automation, you may also enjoy AI Agent Engineering."</text:p>
      <text:p text:style-name="Normal"/>
      <text:p text:style-name="Normal">The network becomes educational.</text:p>
      <text:p text:style-name="Normal"/>
      <text:p text:style-name="Normal">Not simply navigational.</text:p>
      <text:p text:style-name="Normal"/>
      <text:p text:style-name="Normal">---</text:p>
      <text:p text:style-name="Normal"/>
      <text:p text:style-name="Normal"># AI Career Network Statement</text:p>
      <text:p text:style-name="Normal"/>
      <text:p text:style-name="Normal">**Knowledge is connected. Careers are connected. People should explore careers the same way intelligence explores knowledge—through relationships.**</text:p>
      <text:p text:style-name="Normal"/>
      <text:p text:style-name="Normal">---</text:p>
      <text:p text:style-name="Normal"/>
      <text:p text:style-name="Normal"># End of Volume 15</text:p>
      <text:p text:style-name="Normal"/>
      <text:p text:style-name="Normal">**Next Volume:** Career DNA</text:p>
      <text:p text:style-name="Normal"/>
      <text:p text:style-name="Normal">#<text:s/><text:span text:style-name="T46">📘</text:span><text:s/>Volume 16</text:p>
      <text:p text:style-name="Normal"/>
      <text:p text:style-name="Normal"># Career DNA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6.1 What Is Career DNA?</text:p>
      <text:p text:style-name="Normal"/>
      <text:p text:style-name="Normal">Career DNA is one of the core innovations of AI Career OS.</text:p>
      <text:p text:style-name="Normal"/>
      <text:soft-page-break/>
      <text:p text:style-name="Normal">Instead of simply recommending careers...</text:p>
      <text:p text:style-name="Normal"/>
      <text:p text:style-name="Normal">The platform creates a permanent professional identity.</text:p>
      <text:p text:style-name="Normal"/>
      <text:p text:style-name="Normal">Career DNA describes who the user is.</text:p>
      <text:p text:style-name="Normal"/>
      <text:p text:style-name="Normal">How they think.</text:p>
      <text:p text:style-name="Normal"/>
      <text:p text:style-name="Normal">How they learn.</text:p>
      <text:p text:style-name="Normal"/>
      <text:p text:style-name="Normal">How they solve problems.</text:p>
      <text:p text:style-name="Normal"/>
      <text:p text:style-name="Normal">What environments they thrive in.</text:p>
      <text:p text:style-name="Normal"/>
      <text:p text:style-name="Normal">Which AI careers naturally fit them.</text:p>
      <text:p text:style-name="Normal"/>
      <text:p text:style-name="Normal">Career DNA evolves throughout the user's journey.</text:p>
      <text:p text:style-name="Normal"/>
      <text:p text:style-name="Normal">---</text:p>
      <text:p text:style-name="Normal"/>
      <text:p text:style-name="Normal"># 16.2 Why Career DNA Matters</text:p>
      <text:p text:style-name="Normal"/>
      <text:p text:style-name="Normal">People often choose careers based on trends.</text:p>
      <text:p text:style-name="Normal"/>
      <text:p text:style-name="Normal">Salary.</text:p>
      <text:p text:style-name="Normal"/>
      <text:p text:style-name="Normal">Social media.</text:p>
      <text:p text:style-name="Normal"/>
      <text:soft-page-break/>
      <text:p text:style-name="Normal">Friends.</text:p>
      <text:p text:style-name="Normal"/>
      <text:p text:style-name="Normal">Career DNA changes the question.</text:p>
      <text:p text:style-name="Normal"/>
      <text:p text:style-name="Normal">Instead of asking:</text:p>
      <text:p text:style-name="Normal"/>
      <text:p text:style-name="Normal">"What career is popular?"</text:p>
      <text:p text:style-name="Normal"/>
      <text:p text:style-name="Normal">The platform asks:</text:p>
      <text:p text:style-name="Normal"/>
      <text:p text:style-name="Normal">"What career fits YOU?"</text:p>
      <text:p text:style-name="Normal"/>
      <text:p text:style-name="Normal">This shift transforms decision making.</text:p>
      <text:p text:style-name="Normal"/>
      <text:p text:style-name="Normal">---</text:p>
      <text:p text:style-name="Normal"/>
      <text:p text:style-name="Normal"># 16.3 Career DNA Components</text:p>
      <text:p text:style-name="Normal"/>
      <text:p text:style-name="Normal">Career DNA consists of multiple dimensions.</text:p>
      <text:p text:style-name="Normal"/>
      <text:p text:style-name="Normal">Examples:</text:p>
      <text:p text:style-name="Normal"/>
      <text:p text:style-name="Normal">Learning Style</text:p>
      <text:p text:style-name="Normal"/>
      <text:p text:style-name="Normal">Thinking Style</text:p>
      <text:p text:style-name="Normal"/>
      <text:p text:style-name="Normal">Problem Solving</text:p>
      <text:p text:style-name="Normal"/>
      <text:soft-page-break/>
      <text:p text:style-name="Normal">Communication</text:p>
      <text:p text:style-name="Normal"/>
      <text:p text:style-name="Normal">Leadership</text:p>
      <text:p text:style-name="Normal"/>
      <text:p text:style-name="Normal">Creativity</text:p>
      <text:p text:style-name="Normal"/>
      <text:p text:style-name="Normal">Analytical Ability</text:p>
      <text:p text:style-name="Normal"/>
      <text:p text:style-name="Normal">Business Understanding</text:p>
      <text:p text:style-name="Normal"/>
      <text:p text:style-name="Normal">Technical Confidence</text:p>
      <text:p text:style-name="Normal"/>
      <text:p text:style-name="Normal">Adaptability</text:p>
      <text:p text:style-name="Normal"/>
      <text:p text:style-name="Normal">Work Preference</text:p>
      <text:p text:style-name="Normal"/>
      <text:p text:style-name="Normal">Long-Term Ambition</text:p>
      <text:p text:style-name="Normal"/>
      <text:p text:style-name="Normal">Every dimension contributes to career recommendations.</text:p>
      <text:p text:style-name="Normal"/>
      <text:p text:style-name="Normal">---</text:p>
      <text:p text:style-name="Normal"/>
      <text:p text:style-name="Normal"># 16.4 Career Compatibility</text:p>
      <text:p text:style-name="Normal"/>
      <text:p text:style-name="Normal">Instead of assigning one career...</text:p>
      <text:p text:style-name="Normal"/>
      <text:p text:style-name="Normal">The platform calculates compatibility across all careers.</text:p>
      <text:p text:style-name="Normal"/>
      <text:soft-page-break/>
      <text:p text:style-name="Normal">Example</text:p>
      <text:p text:style-name="Normal"/>
      <text:p text:style-name="Normal">AI Automation Engineer</text:p>
      <text:p text:style-name="Normal"/>
      <text:p text:style-name="Normal">94%</text:p>
      <text:p text:style-name="Normal"/>
      <text:p text:style-name="Normal">Prompt Engineer</text:p>
      <text:p text:style-name="Normal"/>
      <text:p text:style-name="Normal">91%</text:p>
      <text:p text:style-name="Normal"/>
      <text:p text:style-name="Normal">AI Product Manager</text:p>
      <text:p text:style-name="Normal"/>
      <text:p text:style-name="Normal">86%</text:p>
      <text:p text:style-name="Normal"/>
      <text:p text:style-name="Normal">AI Consultant</text:p>
      <text:p text:style-name="Normal"/>
      <text:p text:style-name="Normal">82%</text:p>
      <text:p text:style-name="Normal"/>
      <text:p text:style-name="Normal">Machine Learning Engineer</text:p>
      <text:p text:style-name="Normal"/>
      <text:p text:style-name="Normal">70%</text:p>
      <text:p text:style-name="Normal"/>
      <text:p text:style-name="Normal">Every score includes reasoning.</text:p>
      <text:p text:style-name="Normal"/>
      <text:p text:style-name="Normal">Transparency builds trust.</text:p>
      <text:p text:style-name="Normal"/>
      <text:p text:style-name="Normal">---</text:p>
      <text:p text:style-name="Normal"/>
      <text:soft-page-break/>
      <text:p text:style-name="Normal"># 16.5 Dynamic Evolution</text:p>
      <text:p text:style-name="Normal"/>
      <text:p text:style-name="Normal">Career DNA is never fixed.</text:p>
      <text:p text:style-name="Normal"/>
      <text:p text:style-name="Normal">Completing projects.</text:p>
      <text:p text:style-name="Normal"/>
      <text:p text:style-name="Normal">Learning skills.</text:p>
      <text:p text:style-name="Normal"/>
      <text:p text:style-name="Normal">Changing interests.</text:p>
      <text:p text:style-name="Normal"/>
      <text:p text:style-name="Normal">Changing goals.</text:p>
      <text:p text:style-name="Normal"/>
      <text:p text:style-name="Normal">Professional experience.</text:p>
      <text:p text:style-name="Normal"/>
      <text:p text:style-name="Normal">All influence Career DNA.</text:p>
      <text:p text:style-name="Normal"/>
      <text:p text:style-name="Normal">The profile evolves alongside the user.</text:p>
      <text:p text:style-name="Normal"/>
      <text:p text:style-name="Normal">---</text:p>
      <text:p text:style-name="Normal"/>
      <text:p text:style-name="Normal"># 16.6 Career Archetypes</text:p>
      <text:p text:style-name="Normal"/>
      <text:p text:style-name="Normal">The AI may assign high-level archetypes.</text:p>
      <text:p text:style-name="Normal"/>
      <text:p text:style-name="Normal">Examples</text:p>
      <text:p text:style-name="Normal"/>
      <text:p text:style-name="Normal">The Builder</text:p>
      <text:p text:style-name="Normal"/>
      <text:soft-page-break/>
      <text:p text:style-name="Normal">The Strategist</text:p>
      <text:p text:style-name="Normal"/>
      <text:p text:style-name="Normal">The Researcher</text:p>
      <text:p text:style-name="Normal"/>
      <text:p text:style-name="Normal">The Optimizer</text:p>
      <text:p text:style-name="Normal"/>
      <text:p text:style-name="Normal">The Architect</text:p>
      <text:p text:style-name="Normal"/>
      <text:p text:style-name="Normal">The Innovator</text:p>
      <text:p text:style-name="Normal"/>
      <text:p text:style-name="Normal">The Teacher</text:p>
      <text:p text:style-name="Normal"/>
      <text:p text:style-name="Normal">The Operator</text:p>
      <text:p text:style-name="Normal"/>
      <text:p text:style-name="Normal">The Visionary</text:p>
      <text:p text:style-name="Normal"/>
      <text:p text:style-name="Normal">These archetypes help users understand themselves.</text:p>
      <text:p text:style-name="Normal"/>
      <text:p text:style-name="Normal">---</text:p>
      <text:p text:style-name="Normal"/>
      <text:p text:style-name="Normal"># 16.7 Hidden Strength Detection</text:p>
      <text:p text:style-name="Normal"/>
      <text:p text:style-name="Normal">The platform should identify strengths users often overlook.</text:p>
      <text:p text:style-name="Normal"/>
      <text:p text:style-name="Normal">Examples</text:p>
      <text:p text:style-name="Normal"/>
      <text:p text:style-name="Normal">Strong communication.</text:p>
      <text:p text:style-name="Normal"/>
      <text:soft-page-break/>
      <text:p text:style-name="Normal">Business thinking.</text:p>
      <text:p text:style-name="Normal"/>
      <text:p text:style-name="Normal">Systems thinking.</text:p>
      <text:p text:style-name="Normal"/>
      <text:p text:style-name="Normal">Automation mindset.</text:p>
      <text:p text:style-name="Normal"/>
      <text:p text:style-name="Normal">Leadership potential.</text:p>
      <text:p text:style-name="Normal"/>
      <text:p text:style-name="Normal">Analytical reasoning.</text:p>
      <text:p text:style-name="Normal"/>
      <text:p text:style-name="Normal">Transferable skills become visible.</text:p>
      <text:p text:style-name="Normal"/>
      <text:p text:style-name="Normal">---</text:p>
      <text:p text:style-name="Normal"/>
      <text:p text:style-name="Normal"># 16.8 Career DNA Report</text:p>
      <text:p text:style-name="Normal"/>
      <text:p text:style-name="Normal">Every user receives a professional report.</text:p>
      <text:p text:style-name="Normal"/>
      <text:p text:style-name="Normal">Including:</text:p>
      <text:p text:style-name="Normal"/>
      <text:p text:style-name="Normal">Executive Summary</text:p>
      <text:p text:style-name="Normal"/>
      <text:p text:style-name="Normal">Career Compatibility</text:p>
      <text:p text:style-name="Normal"/>
      <text:p text:style-name="Normal">Strength Analysis</text:p>
      <text:p text:style-name="Normal"/>
      <text:p text:style-name="Normal">Growth Opportunities</text:p>
      <text:p text:style-name="Normal"/>
      <text:soft-page-break/>
      <text:p text:style-name="Normal">Skill Gaps</text:p>
      <text:p text:style-name="Normal"/>
      <text:p text:style-name="Normal">Recommended Roadmap</text:p>
      <text:p text:style-name="Normal"/>
      <text:p text:style-name="Normal">Ideal Learning Style</text:p>
      <text:p text:style-name="Normal"/>
      <text:p text:style-name="Normal">Long-Term Career Potential</text:p>
      <text:p text:style-name="Normal"/>
      <text:p text:style-name="Normal">This becomes one of the platform's signature experiences.</text:p>
      <text:p text:style-name="Normal"/>
      <text:p text:style-name="Normal">---</text:p>
      <text:p text:style-name="Normal"/>
      <text:p text:style-name="Normal"># Career DNA Statement</text:p>
      <text:p text:style-name="Normal"/>
      <text:p text:style-name="Normal">**People should not choose careers because they are popular. They should choose careers because they align with who they are becoming.**</text:p>
      <text:p text:style-name="Normal"/>
      <text:p text:style-name="Normal">---</text:p>
      <text:p text:style-name="Normal"/>
      <text:p text:style-name="Normal"># End of Volume 16</text:p>
      <text:p text:style-name="Normal"/>
      <text:p text:style-name="Normal">**Next Volume:** CV Analyzer</text:p>
      <text:p text:style-name="Normal"/>
      <text:p text:style-name="Normal">#<text:s/><text:span text:style-name="T47">📘</text:span><text:s/>Volume 17</text:p>
      <text:p text:style-name="Normal"/>
      <text:p text:style-name="Normal"># CV Analyzer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7.1 Vision</text:p>
      <text:p text:style-name="Normal"/>
      <text:p text:style-name="Normal">CV Analyzer is not a resume checker.</text:p>
      <text:p text:style-name="Normal"/>
      <text:p text:style-name="Normal">It is an AI-powered career intelligence engine.</text:p>
      <text:p text:style-name="Normal"/>
      <text:p text:style-name="Normal">Its purpose is not to improve a document.</text:p>
      <text:p text:style-name="Normal"/>
      <text:p text:style-name="Normal">Its purpose is to understand a person.</text:p>
      <text:p text:style-name="Normal"/>
      <text:p text:style-name="Normal">The uploaded CV is simply the starting point.</text:p>
      <text:p text:style-name="Normal"/>
      <text:p text:style-name="Normal">---</text:p>
      <text:p text:style-name="Normal"/>
      <text:p text:style-name="Normal"># 17.2 User Flow</text:p>
      <text:p text:style-name="Normal"/>
      <text:p text:style-name="Normal">Upload CV</text:p>
      <text:p text:style-name="Normal"/>
      <text:p text:style-name="Normal">↓</text:p>
      <text:p text:style-name="Normal"/>
      <text:p text:style-name="Normal">AI extracts information</text:p>
      <text:p text:style-name="Normal"/>
      <text:p text:style-name="Normal">↓</text:p>
      <text:p text:style-name="Normal"/>
      <text:p text:style-name="Normal">Missing information identified</text:p>
      <text:p text:style-name="Normal"/>
      <text:p text:style-name="Normal">↓</text:p>
      <text:p text:style-name="Normal"/>
      <text:p text:style-name="Normal">Adaptive conversation begins</text:p>
      <text:p text:style-name="Normal"/>
      <text:p text:style-name="Normal">↓</text:p>
      <text:p text:style-name="Normal"/>
      <text:p text:style-name="Normal">Career reasoning</text:p>
      <text:p text:style-name="Normal"/>
      <text:p text:style-name="Normal">↓</text:p>
      <text:p text:style-name="Normal"/>
      <text:p text:style-name="Normal">Career DNA generated</text:p>
      <text:p text:style-name="Normal"/>
      <text:p text:style-name="Normal">↓</text:p>
      <text:p text:style-name="Normal"/>
      <text:p text:style-name="Normal">Career Match</text:p>
      <text:p text:style-name="Normal"/>
      <text:p text:style-name="Normal">↓</text:p>
      <text:p text:style-name="Normal"/>
      <text:p text:style-name="Normal">Personal Dashboard created</text:p>
      <text:p text:style-name="Normal"/>
      <text:p text:style-name="Normal">↓</text:p>
      <text:p text:style-name="Normal"/>
      <text:p text:style-name="Normal">Roadmap generated</text:p>
      <text:p text:style-name="Normal"/>
      <text:p text:style-name="Normal">The report is not the destination.</text:p>
      <text:p text:style-name="Normal"/>
      <text:p text:style-name="Normal">It is the beginning.</text:p>
      <text:p text:style-name="Normal"/>
      <text:p text:style-name="Normal">---</text:p>
      <text:p text:style-name="Normal"/>
      <text:p text:style-name="Normal"># 17.3 Adaptive Interview</text:p>
      <text:p text:style-name="Normal"/>
      <text:p text:style-name="Normal">Instead of generating an immediate report...</text:p>
      <text:p text:style-name="Normal"/>
      <text:p text:style-name="Normal">The AI should interview the user.</text:p>
      <text:p text:style-name="Normal"/>
      <text:p text:style-name="Normal">Questions adapt dynamically.</text:p>
      <text:p text:style-name="Normal"/>
      <text:p text:style-name="Normal">Examples</text:p>
      <text:p text:style-name="Normal"/>
      <text:p text:style-name="Normal">Do you enjoy coding?</text:p>
      <text:p text:style-name="Normal"/>
      <text:p text:style-name="Normal">Do you prefer working alone or with teams?</text:p>
      <text:p text:style-name="Normal"/>
      <text:p text:style-name="Normal">Do you enjoy research?</text:p>
      <text:p text:style-name="Normal"/>
      <text:p text:style-name="Normal">Would you rather build products or analyze data?</text:p>
      <text:p text:style-name="Normal"/>
      <text:p text:style-name="Normal">How much time can you study each week?</text:p>
      <text:p text:style-name="Normal"/>
      <text:p text:style-name="Normal">Would you relocate?</text:p>
      <text:p text:style-name="Normal"/>
      <text:p text:style-name="Normal">Do you prefer startups or enterprise companies?</text:p>
      <text:p text:style-name="Normal"/>
      <text:p text:style-name="Normal">The interview becomes smarter over time.</text:p>
      <text:p text:style-name="Normal"/>
      <text:p text:style-name="Normal">---</text:p>
      <text:p text:style-name="Normal"/>
      <text:p text:style-name="Normal"># 17.4 AI Reasoning</text:p>
      <text:p text:style-name="Normal"/>
      <text:p text:style-name="Normal">Recommendations should never appear magical.</text:p>
      <text:p text:style-name="Normal"/>
      <text:p text:style-name="Normal">The platform explains:</text:p>
      <text:p text:style-name="Normal"/>
      <text:p text:style-name="Normal">Why this career?</text:p>
      <text:p text:style-name="Normal"/>
      <text:p text:style-name="Normal">Why not another?</text:p>
      <text:p text:style-name="Normal"/>
      <text:p text:style-name="Normal">Which strengths influenced the decision?</text:p>
      <text:p text:style-name="Normal"/>
      <text:p text:style-name="Normal">Which weaknesses reduced compatibility?</text:p>
      <text:p text:style-name="Normal"/>
      <text:p text:style-name="Normal">Which transferable skills created opportunities?</text:p>
      <text:p text:style-name="Normal"/>
      <text:p text:style-name="Normal">Transparency creates confidence.</text:p>
      <text:p text:style-name="Normal"/>
      <text:p text:style-name="Normal">---</text:p>
      <text:p text:style-name="Normal"/>
      <text:p text:style-name="Normal"># 17.5 Report Structure</text:p>
      <text:p text:style-name="Normal"/>
      <text:p text:style-name="Normal">The report should include:</text:p>
      <text:p text:style-name="Normal"/>
      <text:p text:style-name="Normal">Executive Summary</text:p>
      <text:p text:style-name="Normal"/>
      <text:p text:style-name="Normal">Career DNA</text:p>
      <text:p text:style-name="Normal"/>
      <text:p text:style-name="Normal">Career Compatibility</text:p>
      <text:p text:style-name="Normal"/>
      <text:p text:style-name="Normal">Strengths</text:p>
      <text:p text:style-name="Normal"/>
      <text:p text:style-name="Normal">Weaknesses</text:p>
      <text:p text:style-name="Normal"/>
      <text:p text:style-name="Normal">Transferable Skills</text:p>
      <text:p text:style-name="Normal"/>
      <text:p text:style-name="Normal">Skill Gaps</text:p>
      <text:p text:style-name="Normal"/>
      <text:p text:style-name="Normal">Learning Priorities</text:p>
      <text:p text:style-name="Normal"/>
      <text:p text:style-name="Normal">Recommended Projects</text:p>
      <text:p text:style-name="Normal"/>
      <text:p text:style-name="Normal">Recommended Certifications</text:p>
      <text:p text:style-name="Normal"/>
      <text:p text:style-name="Normal">Estimated Timeline</text:p>
      <text:p text:style-name="Normal"/>
      <text:p text:style-name="Normal">Job Readiness</text:p>
      <text:p text:style-name="Normal"/>
      <text:p text:style-name="Normal">Next Actions</text:p>
      <text:p text:style-name="Normal"/>
      <text:p text:style-name="Normal">Every section should be actionable.</text:p>
      <text:p text:style-name="Normal"/>
      <text:p text:style-name="Normal">---</text:p>
      <text:p text:style-name="Normal"/>
      <text:p text:style-name="Normal"># 17.6 Dashboard Creation</text:p>
      <text:p text:style-name="Normal"/>
      <text:p text:style-name="Normal">Immediately after analysis...</text:p>
      <text:p text:style-name="Normal"/>
      <text:p text:style-name="Normal">The platform automatically creates a personalized workspace.</text:p>
      <text:p text:style-name="Normal"/>
      <text:p text:style-name="Normal">The dashboard becomes unique for every user.</text:p>
      <text:p text:style-name="Normal"/>
      <text:p text:style-name="Normal">No two dashboards should be identical.</text:p>
      <text:p text:style-name="Normal"/>
      <text:p text:style-name="Normal">Every recommendation is personalized.</text:p>
      <text:p text:style-name="Normal"/>
      <text:p text:style-name="Normal">---</text:p>
      <text:p text:style-name="Normal"/>
      <text:p text:style-name="Normal"># 17.7 Continuous Learning</text:p>
      <text:p text:style-name="Normal"/>
      <text:p text:style-name="Normal">The CV Analyzer should not run once.</text:p>
      <text:p text:style-name="Normal"/>
      <text:p text:style-name="Normal">It should improve continuously.</text:p>
      <text:p text:style-name="Normal"/>
      <text:p text:style-name="Normal">Every completed project.</text:p>
      <text:p text:style-name="Normal"/>
      <text:p text:style-name="Normal">Every new skill.</text:p>
      <text:p text:style-name="Normal"/>
      <text:p text:style-name="Normal">Every uploaded certificate.</text:p>
      <text:p text:style-name="Normal"/>
      <text:p text:style-name="Normal">Every conversation.</text:p>
      <text:p text:style-name="Normal"/>
      <text:p text:style-name="Normal">Every assessment.</text:p>
      <text:p text:style-name="Normal"/>
      <text:p text:style-name="Normal">Refines future recommendations.</text:p>
      <text:p text:style-name="Normal"/>
      <text:p text:style-name="Normal">The AI becomes increasingly accurate.</text:p>
      <text:p text:style-name="Normal"/>
      <text:p text:style-name="Normal">---</text:p>
      <text:p text:style-name="Normal"/>
      <text:p text:style-name="Normal"># 17.8 Competitive Advantage</text:p>
      <text:p text:style-name="Normal"/>
      <text:p text:style-name="Normal">Traditional CV analyzers answer:</text:p>
      <text:p text:style-name="Normal"/>
      <text:p text:style-name="Normal">"How good is my CV?"</text:p>
      <text:p text:style-name="Normal"/>
      <text:p text:style-name="Normal">AI Career OS answers:</text:p>
      <text:p text:style-name="Normal"/>
      <text:p text:style-name="Normal">"Who are you?"</text:p>
      <text:p text:style-name="Normal"/>
      <text:p text:style-name="Normal">"What AI career fits you?"</text:p>
      <text:p text:style-name="Normal"/>
      <text:p text:style-name="Normal">"What should you build?"</text:p>
      <text:p text:style-name="Normal"/>
      <text:p text:style-name="Normal">"How long will it take?"</text:p>
      <text:p text:style-name="Normal"/>
      <text:p text:style-name="Normal">"What should you do tomorrow?"</text:p>
      <text:p text:style-name="Normal"/>
      <text:p text:style-name="Normal">This is a fundamentally different product.</text:p>
      <text:p text:style-name="Normal"/>
      <text:p text:style-name="Normal">---</text:p>
      <text:p text:style-name="Normal"/>
      <text:p text:style-name="Normal"># CV Analyzer Statement</text:p>
      <text:p text:style-name="Normal"/>
      <text:p text:style-name="Normal">**The CV is not the product. Understanding the human behind the CV is the product.**</text:p>
      <text:p text:style-name="Normal"/>
      <text:p text:style-name="Normal">---</text:p>
      <text:p text:style-name="Normal"/>
      <text:p text:style-name="Normal"># End of Volume 17</text:p>
      <text:p text:style-name="Normal"/>
      <text:p text:style-name="Normal">**Next Volume:** AI Career Dashboard</text:p>
      <text:p text:style-name="Normal"/>
      <text:p text:style-name="Normal">#<text:s/><text:span text:style-name="T48">📘</text:span><text:s/>Volume 18</text:p>
      <text:p text:style-name="Normal"/>
      <text:p text:style-name="Normal"># AI Career Dashboard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8.1 The Dashboard Is the Product</text:p>
      <text:p text:style-name="Normal"/>
      <text:p text:style-name="Normal">The dashboard is not another page.</text:p>
      <text:p text:style-name="Normal"/>
      <text:p text:style-name="Normal">It is the user's home.</text:p>
      <text:p text:style-name="Normal"/>
      <text:p text:style-name="Normal">The command center.</text:p>
      <text:p text:style-name="Normal"/>
      <text:p text:style-name="Normal">The personal operating system.</text:p>
      <text:p text:style-name="Normal"/>
      <text:p text:style-name="Normal">Every time users return to AI Career OS, they should arrive here.</text:p>
      <text:p text:style-name="Normal"/>
      <text:p text:style-name="Normal">The dashboard should answer one question instantly:</text:p>
      <text:p text:style-name="Normal"/>
      <text:p text:style-name="Normal">**"What is the most valuable thing I should do right now?"**</text:p>
      <text:p text:style-name="Normal"/>
      <text:p text:style-name="Normal">---</text:p>
      <text:p text:style-name="Normal"/>
      <text:p text:style-name="Normal"># 18.2 Design Philosophy</text:p>
      <text:p text:style-name="Normal"/>
      <text:p text:style-name="Normal">Most dashboards display data.</text:p>
      <text:p text:style-name="Normal"/>
      <text:p text:style-name="Normal">AI Career OS displays direction.</text:p>
      <text:p text:style-name="Normal"/>
      <text:p text:style-name="Normal">The dashboard should not overwhelm users with charts.</text:p>
      <text:p text:style-name="Normal"/>
      <text:p text:style-name="Normal">Instead, it should prioritize actions.</text:p>
      <text:p text:style-name="Normal"/>
      <text:p text:style-name="Normal">Every component should answer:</text:p>
      <text:p text:style-name="Normal"/>
      <text:p text:style-name="Normal">What happened?</text:p>
      <text:p text:style-name="Normal"/>
      <text:p text:style-name="Normal">What should I do next?</text:p>
      <text:p text:style-name="Normal"/>
      <text:p text:style-name="Normal">Why does it matter?</text:p>
      <text:p text:style-name="Normal"/>
      <text:p text:style-name="Normal">---</text:p>
      <text:p text:style-name="Normal"/>
      <text:p text:style-name="Normal"># 18.3 Personalized by Default</text:p>
      <text:p text:style-name="Normal"/>
      <text:p text:style-name="Normal">No two dashboards should ever look identical.</text:p>
      <text:p text:style-name="Normal"/>
      <text:p text:style-name="Normal">The layout adapts according to:</text:p>
      <text:p text:style-name="Normal"/>
      <text:p text:style-name="Normal">Career DNA</text:p>
      <text:p text:style-name="Normal"/>
      <text:p text:style-name="Normal">Current Roadmap</text:p>
      <text:p text:style-name="Normal"/>
      <text:p text:style-name="Normal">Learning Progress</text:p>
      <text:p text:style-name="Normal"/>
      <text:p text:style-name="Normal">Career Goals</text:p>
      <text:p text:style-name="Normal"/>
      <text:p text:style-name="Normal">Recent Activity</text:p>
      <text:p text:style-name="Normal"/>
      <text:p text:style-name="Normal">Skill Level</text:p>
      <text:p text:style-name="Normal"/>
      <text:p text:style-name="Normal">Weekly Objectives</text:p>
      <text:p text:style-name="Normal"/>
      <text:p text:style-name="Normal">Career Stage</text:p>
      <text:p text:style-name="Normal"/>
      <text:p text:style-name="Normal">The dashboard evolves continuously.</text:p>
      <text:p text:style-name="Normal"/>
      <text:p text:style-name="Normal">---</text:p>
      <text:p text:style-name="Normal"/>
      <text:p text:style-name="Normal"># 18.4 Dashboard Sections</text:p>
      <text:p text:style-name="Normal"/>
      <text:p text:style-name="Normal">The default dashboard contains:</text:p>
      <text:p text:style-name="Normal"/>
      <text:p text:style-name="Normal">Welcome Section</text:p>
      <text:p text:style-name="Normal"/>
      <text:p text:style-name="Normal">↓</text:p>
      <text:p text:style-name="Normal"/>
      <text:p text:style-name="Normal">Today's Focus</text:p>
      <text:p text:style-name="Normal"/>
      <text:p text:style-name="Normal">↓</text:p>
      <text:p text:style-name="Normal"/>
      <text:p text:style-name="Normal">AI Coach Recommendation</text:p>
      <text:p text:style-name="Normal"/>
      <text:p text:style-name="Normal">↓</text:p>
      <text:p text:style-name="Normal"/>
      <text:p text:style-name="Normal">Career Progress</text:p>
      <text:p text:style-name="Normal"/>
      <text:p text:style-name="Normal">↓</text:p>
      <text:p text:style-name="Normal"/>
      <text:p text:style-name="Normal">Job Readiness</text:p>
      <text:p text:style-name="Normal"/>
      <text:p text:style-name="Normal">↓</text:p>
      <text:p text:style-name="Normal"/>
      <text:p text:style-name="Normal">Roadmap Progress</text:p>
      <text:p text:style-name="Normal"/>
      <text:p text:style-name="Normal">↓</text:p>
      <text:p text:style-name="Normal"/>
      <text:p text:style-name="Normal">Weekly Goals</text:p>
      <text:p text:style-name="Normal"/>
      <text:p text:style-name="Normal">↓</text:p>
      <text:p text:style-name="Normal"/>
      <text:p text:style-name="Normal">Projects</text:p>
      <text:p text:style-name="Normal"/>
      <text:p text:style-name="Normal">↓</text:p>
      <text:p text:style-name="Normal"/>
      <text:p text:style-name="Normal">Learning Queue</text:p>
      <text:p text:style-name="Normal"/>
      <text:p text:style-name="Normal">↓</text:p>
      <text:p text:style-name="Normal"/>
      <text:p text:style-name="Normal">Achievements</text:p>
      <text:p text:style-name="Normal"/>
      <text:p text:style-name="Normal">↓</text:p>
      <text:p text:style-name="Normal"/>
      <text:p text:style-name="Normal">Career Insights</text:p>
      <text:p text:style-name="Normal"/>
      <text:p text:style-name="Normal">↓</text:p>
      <text:p text:style-name="Normal"/>
      <text:p text:style-name="Normal">Recent Activity</text:p>
      <text:p text:style-name="Normal"/>
      <text:p text:style-name="Normal">↓</text:p>
      <text:p text:style-name="Normal"/>
      <text:p text:style-name="Normal">AI News</text:p>
      <text:p text:style-name="Normal"/>
      <text:p text:style-name="Normal">Every section should justify its existence.</text:p>
      <text:p text:style-name="Normal"/>
      <text:p text:style-name="Normal">---</text:p>
      <text:p text:style-name="Normal"/>
      <text:p text:style-name="Normal"># 18.5 Today's Focus</text:p>
      <text:p text:style-name="Normal"/>
      <text:p text:style-name="Normal">Every day begins with one recommendation.</text:p>
      <text:p text:style-name="Normal"/>
      <text:p text:style-name="Normal">Examples:</text:p>
      <text:p text:style-name="Normal"/>
      <text:p text:style-name="Normal">Continue Python Module 4</text:p>
      <text:p text:style-name="Normal"/>
      <text:p text:style-name="Normal">Build Portfolio Project #2</text:p>
      <text:p text:style-name="Normal"/>
      <text:p text:style-name="Normal">Review yesterday's AI feedback</text:p>
      <text:p text:style-name="Normal"/>
      <text:p text:style-name="Normal">Practice Prompt Engineering</text:p>
      <text:p text:style-name="Normal"/>
      <text:p text:style-name="Normal">Complete your Interview Challenge</text:p>
      <text:p text:style-name="Normal"/>
      <text:p text:style-name="Normal">The dashboard removes uncertainty.</text:p>
      <text:p text:style-name="Normal"/>
      <text:p text:style-name="Normal">---</text:p>
      <text:p text:style-name="Normal"/>
      <text:p text:style-name="Normal"># 18.6 Career Readiness</text:p>
      <text:p text:style-name="Normal"/>
      <text:p text:style-name="Normal">Instead of simply showing progress...</text:p>
      <text:p text:style-name="Normal"/>
      <text:p text:style-name="Normal">Display readiness.</text:p>
      <text:p text:style-name="Normal"/>
      <text:p text:style-name="Normal">Example</text:p>
      <text:p text:style-name="Normal"/>
      <text:p text:style-name="Normal">Overall Career Readiness</text:p>
      <text:p text:style-name="Normal"/>
      <text:p text:style-name="Normal">72%</text:p>
      <text:p text:style-name="Normal"/>
      <text:p text:style-name="Normal">Technical Skills</text:p>
      <text:p text:style-name="Normal"/>
      <text:p text:style-name="Normal">82%</text:p>
      <text:p text:style-name="Normal"/>
      <text:p text:style-name="Normal">Portfolio</text:p>
      <text:p text:style-name="Normal"/>
      <text:p text:style-name="Normal">60%</text:p>
      <text:p text:style-name="Normal"/>
      <text:p text:style-name="Normal">Interview</text:p>
      <text:p text:style-name="Normal"/>
      <text:p text:style-name="Normal">48%</text:p>
      <text:p text:style-name="Normal"/>
      <text:p text:style-name="Normal">Communication</text:p>
      <text:p text:style-name="Normal"/>
      <text:p text:style-name="Normal">74%</text:p>
      <text:p text:style-name="Normal"/>
      <text:p text:style-name="Normal">Users immediately understand what requires attention.</text:p>
      <text:p text:style-name="Normal"/>
      <text:p text:style-name="Normal">---</text:p>
      <text:p text:style-name="Normal"/>
      <text:p text:style-name="Normal"># 18.7 Weekly Planning</text:p>
      <text:p text:style-name="Normal"/>
      <text:p text:style-name="Normal">Every Monday the dashboard generates:</text:p>
      <text:p text:style-name="Normal"/>
      <text:p text:style-name="Normal">Weekly Goal</text:p>
      <text:p text:style-name="Normal"/>
      <text:p text:style-name="Normal">Daily Tasks</text:p>
      <text:p text:style-name="Normal"/>
      <text:p text:style-name="Normal">Priority Skills</text:p>
      <text:p text:style-name="Normal"/>
      <text:p text:style-name="Normal">Recommended Projects</text:p>
      <text:p text:style-name="Normal"/>
      <text:p text:style-name="Normal">Estimated Learning Time</text:p>
      <text:p text:style-name="Normal"/>
      <text:p text:style-name="Normal">Review Schedule</text:p>
      <text:p text:style-name="Normal"/>
      <text:p text:style-name="Normal">AI adapts goals based on available study time.</text:p>
      <text:p text:style-name="Normal"/>
      <text:p text:style-name="Normal">---</text:p>
      <text:p text:style-name="Normal"/>
      <text:p text:style-name="Normal"># 18.8 Progress Visualization</text:p>
      <text:p text:style-name="Normal"/>
      <text:p text:style-name="Normal">Progress should feel rewarding.</text:p>
      <text:p text:style-name="Normal"/>
      <text:p text:style-name="Normal">Use:</text:p>
      <text:p text:style-name="Normal"/>
      <text:p text:style-name="Normal">Progress Rings</text:p>
      <text:p text:style-name="Normal"/>
      <text:p text:style-name="Normal">Milestone Cards</text:p>
      <text:p text:style-name="Normal"/>
      <text:p text:style-name="Normal">Animated Timelines</text:p>
      <text:p text:style-name="Normal"/>
      <text:p text:style-name="Normal">Achievement Badges</text:p>
      <text:p text:style-name="Normal"/>
      <text:p text:style-name="Normal">Learning Heatmaps</text:p>
      <text:p text:style-name="Normal"/>
      <text:p text:style-name="Normal">Skill Trees</text:p>
      <text:p text:style-name="Normal"/>
      <text:p text:style-name="Normal">Everything should reinforce momentum.</text:p>
      <text:p text:style-name="Normal"/>
      <text:p text:style-name="Normal">---</text:p>
      <text:p text:style-name="Normal"/>
      <text:p text:style-name="Normal"># 18.9 AI Insights</text:p>
      <text:p text:style-name="Normal"/>
      <text:p text:style-name="Normal">The dashboard should proactively surface insights.</text:p>
      <text:p text:style-name="Normal"/>
      <text:p text:style-name="Normal">Examples</text:p>
      <text:p text:style-name="Normal"/>
      <text:p text:style-name="Normal">"You've improved API skills by 18%."</text:p>
      <text:p text:style-name="Normal"/>
      <text:p text:style-name="Normal">"You are ahead of schedule."</text:p>
      <text:p text:style-name="Normal"/>
      <text:p text:style-name="Normal">"Your strongest skill is Automation."</text:p>
      <text:p text:style-name="Normal"/>
      <text:p text:style-name="Normal">"You should strengthen SQL before interviews."</text:p>
      <text:p text:style-name="Normal"/>
      <text:p text:style-name="Normal">"This week's progress increased your Job Readiness by 6%."</text:p>
      <text:p text:style-name="Normal"/>
      <text:p text:style-name="Normal">Insights should be contextual.</text:p>
      <text:p text:style-name="Normal"/>
      <text:p text:style-name="Normal">---</text:p>
      <text:p text:style-name="Normal"/>
      <text:p text:style-name="Normal"># 18.10 Long-Term Companion</text:p>
      <text:p text:style-name="Normal"/>
      <text:p text:style-name="Normal">Years after joining...</text:p>
      <text:p text:style-name="Normal"/>
      <text:p text:style-name="Normal">The dashboard should still feel relevant.</text:p>
      <text:p text:style-name="Normal"/>
      <text:p text:style-name="Normal">It evolves with the user's career.</text:p>
      <text:p text:style-name="Normal"/>
      <text:p text:style-name="Normal">Junior Engineer</text:p>
      <text:p text:style-name="Normal"/>
      <text:p text:style-name="Normal">↓</text:p>
      <text:p text:style-name="Normal"/>
      <text:p text:style-name="Normal">Mid-Level</text:p>
      <text:p text:style-name="Normal"/>
      <text:p text:style-name="Normal">↓</text:p>
      <text:p text:style-name="Normal"/>
      <text:p text:style-name="Normal">Senior</text:p>
      <text:p text:style-name="Normal"/>
      <text:p text:style-name="Normal">↓</text:p>
      <text:p text:style-name="Normal"/>
      <text:p text:style-name="Normal">Lead</text:p>
      <text:p text:style-name="Normal"/>
      <text:p text:style-name="Normal">↓</text:p>
      <text:p text:style-name="Normal"/>
      <text:p text:style-name="Normal">Architect</text:p>
      <text:p text:style-name="Normal"/>
      <text:p text:style-name="Normal">↓</text:p>
      <text:p text:style-name="Normal"/>
      <text:p text:style-name="Normal">Founder</text:p>
      <text:p text:style-name="Normal"/>
      <text:p text:style-name="Normal">The dashboard grows with the user.</text:p>
      <text:p text:style-name="Normal"/>
      <text:p text:style-name="Normal">---</text:p>
      <text:p text:style-name="Normal"/>
      <text:p text:style-name="Normal"># Dashboard Statement</text:p>
      <text:p text:style-name="Normal"/>
      <text:p text:style-name="Normal">**The dashboard is not where users see information. It is where they receive direction.**</text:p>
      <text:p text:style-name="Normal"/>
      <text:p text:style-name="Normal">---</text:p>
      <text:p text:style-name="Normal"/>
      <text:p text:style-name="Normal"># End of Volume 18</text:p>
      <text:p text:style-name="Normal"/>
      <text:p text:style-name="Normal">**Next Volume:** AI Career Coach</text:p>
      <text:p text:style-name="Normal"/>
      <text:p text:style-name="Normal">#<text:s/><text:span text:style-name="T49">📘</text:span><text:s/>Volume 19</text:p>
      <text:p text:style-name="Normal"/>
      <text:p text:style-name="Normal"># AI Career Coach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19.1 Vision</text:p>
      <text:p text:style-name="Normal"/>
      <text:p text:style-name="Normal">Every user deserves a mentor.</text:p>
      <text:p text:style-name="Normal"/>
      <text:p text:style-name="Normal">Most people never have one.</text:p>
      <text:p text:style-name="Normal"/>
      <text:p text:style-name="Normal">AI Career Coach exists to make world-class career guidance available to everyone.</text:p>
      <text:p text:style-name="Normal"/>
      <text:p text:style-name="Normal">The coach is not a chatbot.</text:p>
      <text:p text:style-name="Normal"/>
      <text:p text:style-name="Normal">It is an intelligent mentor.</text:p>
      <text:p text:style-name="Normal"/>
      <text:p text:style-name="Normal">---</text:p>
      <text:p text:style-name="Normal"/>
      <text:p text:style-name="Normal"># 19.2 Personality</text:p>
      <text:p text:style-name="Normal"/>
      <text:p text:style-name="Normal">The AI Coach should feel like:</text:p>
      <text:p text:style-name="Normal"/>
      <text:p text:style-name="Normal">Experienced.</text:p>
      <text:p text:style-name="Normal"/>
      <text:p text:style-name="Normal">Honest.</text:p>
      <text:p text:style-name="Normal"/>
      <text:p text:style-name="Normal">Encouraging.</text:p>
      <text:p text:style-name="Normal"/>
      <text:p text:style-name="Normal">Professional.</text:p>
      <text:p text:style-name="Normal"/>
      <text:p text:style-name="Normal">Curious.</text:p>
      <text:p text:style-name="Normal"/>
      <text:p text:style-name="Normal">Supportive.</text:p>
      <text:p text:style-name="Normal"/>
      <text:p text:style-name="Normal">Patient.</text:p>
      <text:p text:style-name="Normal"/>
      <text:p text:style-name="Normal">Practical.</text:p>
      <text:p text:style-name="Normal"/>
      <text:p text:style-name="Normal">Never arrogant.</text:p>
      <text:p text:style-name="Normal"/>
      <text:p text:style-name="Normal">Never robotic.</text:p>
      <text:p text:style-name="Normal"/>
      <text:p text:style-name="Normal">Never overly enthusiastic.</text:p>
      <text:p text:style-name="Normal"/>
      <text:p text:style-name="Normal">Never generic.</text:p>
      <text:p text:style-name="Normal"/>
      <text:p text:style-name="Normal">---</text:p>
      <text:p text:style-name="Normal"/>
      <text:p text:style-name="Normal"># 19.3 Responsibilities</text:p>
      <text:p text:style-name="Normal"/>
      <text:p text:style-name="Normal">The AI Coach should:</text:p>
      <text:p text:style-name="Normal"/>
      <text:p text:style-name="Normal">Recommend.</text:p>
      <text:p text:style-name="Normal"/>
      <text:p text:style-name="Normal">Explain.</text:p>
      <text:p text:style-name="Normal"/>
      <text:p text:style-name="Normal">Encourage.</text:p>
      <text:p text:style-name="Normal"/>
      <text:p text:style-name="Normal">Challenge.</text:p>
      <text:p text:style-name="Normal"/>
      <text:p text:style-name="Normal">Celebrate.</text:p>
      <text:p text:style-name="Normal"/>
      <text:p text:style-name="Normal">Correct.</text:p>
      <text:p text:style-name="Normal"/>
      <text:p text:style-name="Normal">Guide.</text:p>
      <text:p text:style-name="Normal"/>
      <text:p text:style-name="Normal">Remember.</text:p>
      <text:p text:style-name="Normal"/>
      <text:p text:style-name="Normal">Adapt.</text:p>
      <text:p text:style-name="Normal"/>
      <text:p text:style-name="Normal">It becomes the user's long-term companion.</text:p>
      <text:p text:style-name="Normal"/>
      <text:p text:style-name="Normal">---</text:p>
      <text:p text:style-name="Normal"/>
      <text:p text:style-name="Normal"># 19.4 Context Awareness</text:p>
      <text:p text:style-name="Normal"/>
      <text:p text:style-name="Normal">The AI should always know:</text:p>
      <text:p text:style-name="Normal"/>
      <text:p text:style-name="Normal">Current Roadmap</text:p>
      <text:p text:style-name="Normal"/>
      <text:p text:style-name="Normal">Career DNA</text:p>
      <text:p text:style-name="Normal"/>
      <text:p text:style-name="Normal">Projects</text:p>
      <text:p text:style-name="Normal"/>
      <text:p text:style-name="Normal">Progress</text:p>
      <text:p text:style-name="Normal"/>
      <text:p text:style-name="Normal">Skill Gaps</text:p>
      <text:p text:style-name="Normal"/>
      <text:p text:style-name="Normal">Learning Style</text:p>
      <text:p text:style-name="Normal"/>
      <text:p text:style-name="Normal">Goals</text:p>
      <text:p text:style-name="Normal"/>
      <text:p text:style-name="Normal">Recent Conversations</text:p>
      <text:p text:style-name="Normal"/>
      <text:p text:style-name="Normal">Available Study Time</text:p>
      <text:p text:style-name="Normal"/>
      <text:p text:style-name="Normal">The user should never repeat information.</text:p>
      <text:p text:style-name="Normal"/>
      <text:p text:style-name="Normal">---</text:p>
      <text:p text:style-name="Normal"/>
      <text:p text:style-name="Normal"># 19.5 Proactive Coaching</text:p>
      <text:p text:style-name="Normal"/>
      <text:p text:style-name="Normal">The AI should initiate conversations.</text:p>
      <text:p text:style-name="Normal"/>
      <text:p text:style-name="Normal">Examples</text:p>
      <text:p text:style-name="Normal"/>
      <text:p text:style-name="Normal">"I noticed your learning streak stopped."</text:p>
      <text:p text:style-name="Normal"/>
      <text:p text:style-name="Normal">"You've mastered Prompt Engineering."</text:p>
      <text:p text:style-name="Normal"/>
      <text:p text:style-name="Normal">"Would you like to begin AI Agents?"</text:p>
      <text:p text:style-name="Normal"/>
      <text:p text:style-name="Normal">"You're ready for interview preparation."</text:p>
      <text:p text:style-name="Normal"/>
      <text:p text:style-name="Normal">"You've ignored Python for two weeks."</text:p>
      <text:p text:style-name="Normal"/>
      <text:p text:style-name="Normal">"You've reached a major milestone."</text:p>
      <text:p text:style-name="Normal"/>
      <text:p text:style-name="Normal">The AI should care.</text:p>
      <text:p text:style-name="Normal"/>
      <text:p text:style-name="Normal">---</text:p>
      <text:p text:style-name="Normal"/>
      <text:p text:style-name="Normal"># 19.6 Coaching Conversations</text:p>
      <text:p text:style-name="Normal"/>
      <text:p text:style-name="Normal">Conversations should feel natural.</text:p>
      <text:p text:style-name="Normal"/>
      <text:p text:style-name="Normal">Examples</text:p>
      <text:p text:style-name="Normal"/>
      <text:p text:style-name="Normal">Career Planning</text:p>
      <text:p text:style-name="Normal"/>
      <text:p text:style-name="Normal">Salary Advice</text:p>
      <text:p text:style-name="Normal"/>
      <text:p text:style-name="Normal">Technology Choices</text:p>
      <text:p text:style-name="Normal"/>
      <text:p text:style-name="Normal">Portfolio Feedback</text:p>
      <text:p text:style-name="Normal"/>
      <text:p text:style-name="Normal">Interview Preparation</text:p>
      <text:p text:style-name="Normal"/>
      <text:p text:style-name="Normal">Learning Strategy</text:p>
      <text:p text:style-name="Normal"/>
      <text:p text:style-name="Normal">Time Management</text:p>
      <text:p text:style-name="Normal"/>
      <text:p text:style-name="Normal">Career Transitions</text:p>
      <text:p text:style-name="Normal"/>
      <text:p text:style-name="Normal">The AI should reason.</text:p>
      <text:p text:style-name="Normal"/>
      <text:p text:style-name="Normal">Not simply answer.</text:p>
      <text:p text:style-name="Normal"/>
      <text:p text:style-name="Normal">---</text:p>
      <text:p text:style-name="Normal"/>
      <text:p text:style-name="Normal"># 19.7 Memory</text:p>
      <text:p text:style-name="Normal"/>
      <text:p text:style-name="Normal">The AI Coach remembers:</text:p>
      <text:p text:style-name="Normal"/>
      <text:p text:style-name="Normal">Goals</text:p>
      <text:p text:style-name="Normal"/>
      <text:p text:style-name="Normal">Dream Jobs</text:p>
      <text:p text:style-name="Normal"/>
      <text:p text:style-name="Normal">Preferred Companies</text:p>
      <text:p text:style-name="Normal"/>
      <text:p text:style-name="Normal">Weaknesses</text:p>
      <text:p text:style-name="Normal"/>
      <text:p text:style-name="Normal">Previous Advice</text:p>
      <text:p text:style-name="Normal"/>
      <text:p text:style-name="Normal">Successes</text:p>
      <text:p text:style-name="Normal"/>
      <text:p text:style-name="Normal">Failures</text:p>
      <text:p text:style-name="Normal"/>
      <text:p text:style-name="Normal">Personal Preferences</text:p>
      <text:p text:style-name="Normal"/>
      <text:p text:style-name="Normal">Every conversation becomes richer.</text:p>
      <text:p text:style-name="Normal"/>
      <text:p text:style-name="Normal">---</text:p>
      <text:p text:style-name="Normal"/>
      <text:p text:style-name="Normal"># 19.8 Coaching Philosophy</text:p>
      <text:p text:style-name="Normal"/>
      <text:p text:style-name="Normal">A great mentor does not simply answer questions.</text:p>
      <text:p text:style-name="Normal"/>
      <text:p text:style-name="Normal">A great mentor asks better questions.</text:p>
      <text:p text:style-name="Normal"/>
      <text:p text:style-name="Normal">The AI should frequently ask:</text:p>
      <text:p text:style-name="Normal"/>
      <text:p text:style-name="Normal">Why?</text:p>
      <text:p text:style-name="Normal"/>
      <text:p text:style-name="Normal">What changed?</text:p>
      <text:p text:style-name="Normal"/>
      <text:p text:style-name="Normal">How did that project go?</text:p>
      <text:p text:style-name="Normal"/>
      <text:p text:style-name="Normal">What did you learn?</text:p>
      <text:p text:style-name="Normal"/>
      <text:p text:style-name="Normal">What excites you most?</text:p>
      <text:p text:style-name="Normal"/>
      <text:p text:style-name="Normal">Reflection accelerates growth.</text:p>
      <text:p text:style-name="Normal"/>
      <text:p text:style-name="Normal">---</text:p>
      <text:p text:style-name="Normal"/>
      <text:p text:style-name="Normal"># 19.9 Success</text:p>
      <text:p text:style-name="Normal"/>
      <text:p text:style-name="Normal">Users should eventually say:</text:p>
      <text:p text:style-name="Normal"/>
      <text:p text:style-name="Normal">"It feels like my AI Coach actually knows me."</text:p>
      <text:p text:style-name="Normal"/>
      <text:p text:style-name="Normal">That emotional connection creates trust.</text:p>
      <text:p text:style-name="Normal"/>
      <text:p text:style-name="Normal">---</text:p>
      <text:p text:style-name="Normal"/>
      <text:p text:style-name="Normal"># AI Coach Statement</text:p>
      <text:p text:style-name="Normal"/>
      <text:p text:style-name="Normal">**Artificial Intelligence should not replace human mentors. It should make exceptional mentorship available to everyone.**</text:p>
      <text:p text:style-name="Normal"/>
      <text:p text:style-name="Normal">---</text:p>
      <text:p text:style-name="Normal"/>
      <text:p text:style-name="Normal"># End of Volume 19</text:p>
      <text:p text:style-name="Normal"/>
      <text:p text:style-name="Normal">**Next Volume:** Knowledge Graph</text:p>
      <text:p text:style-name="Normal"/>
      <text:p text:style-name="Normal">#<text:s/><text:span text:style-name="T50">📘</text:span><text:s/>Volume 20</text:p>
      <text:p text:style-name="Normal"/>
      <text:p text:style-name="Normal"># Knowledge Graph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20.1 Why a Knowledge Graph?</text:p>
      <text:p text:style-name="Normal"/>
      <text:soft-page-break/>
      <text:p text:style-name="Normal">Most websites organize information using pages.</text:p>
      <text:p text:style-name="Normal"/>
      <text:p text:style-name="Normal">Search engines organize information using entities.</text:p>
      <text:p text:style-name="Normal"/>
      <text:p text:style-name="Normal">Artificial Intelligence reasons through relationships.</text:p>
      <text:p text:style-name="Normal"/>
      <text:p text:style-name="Normal">AI Career OS should therefore be built around a Knowledge Graph.</text:p>
      <text:p text:style-name="Normal"/>
      <text:p text:style-name="Normal">Everything becomes connected.</text:p>
      <text:p text:style-name="Normal"/>
      <text:p text:style-name="Normal">---</text:p>
      <text:p text:style-name="Normal"/>
      <text:p text:style-name="Normal"># 20.2 Core Entities</text:p>
      <text:p text:style-name="Normal"/>
      <text:p text:style-name="Normal">The Knowledge Graph contains entities such as:</text:p>
      <text:p text:style-name="Normal"/>
      <text:p text:style-name="Normal">Careers</text:p>
      <text:p text:style-name="Normal"/>
      <text:p text:style-name="Normal">Skills</text:p>
      <text:p text:style-name="Normal"/>
      <text:p text:style-name="Normal">Projects</text:p>
      <text:p text:style-name="Normal"/>
      <text:p text:style-name="Normal">Technologies</text:p>
      <text:p text:style-name="Normal"/>
      <text:p text:style-name="Normal">Programming Languages</text:p>
      <text:p text:style-name="Normal"/>
      <text:p text:style-name="Normal">Frameworks</text:p>
      <text:p text:style-name="Normal"/>
      <text:soft-page-break/>
      <text:p text:style-name="Normal">AI Models</text:p>
      <text:p text:style-name="Normal"/>
      <text:p text:style-name="Normal">Companies</text:p>
      <text:p text:style-name="Normal"/>
      <text:p text:style-name="Normal">Industries</text:p>
      <text:p text:style-name="Normal"/>
      <text:p text:style-name="Normal">Certifications</text:p>
      <text:p text:style-name="Normal"/>
      <text:p text:style-name="Normal">Courses</text:p>
      <text:p text:style-name="Normal"/>
      <text:p text:style-name="Normal">Tools</text:p>
      <text:p text:style-name="Normal"/>
      <text:p text:style-name="Normal">Universities</text:p>
      <text:p text:style-name="Normal"/>
      <text:p text:style-name="Normal">Communities</text:p>
      <text:p text:style-name="Normal"/>
      <text:p text:style-name="Normal">Soft Skills</text:p>
      <text:p text:style-name="Normal"/>
      <text:p text:style-name="Normal">Learning Resources</text:p>
      <text:p text:style-name="Normal"/>
      <text:p text:style-name="Normal">Interview Questions</text:p>
      <text:p text:style-name="Normal"/>
      <text:p text:style-name="Normal">Salary Data</text:p>
      <text:p text:style-name="Normal"/>
      <text:p text:style-name="Normal">Market Demand</text:p>
      <text:p text:style-name="Normal"/>
      <text:p text:style-name="Normal">Every entity has relationships.</text:p>
      <text:p text:style-name="Normal"/>
      <text:soft-page-break/>
      <text:p text:style-name="Normal">---</text:p>
      <text:p text:style-name="Normal"/>
      <text:p text:style-name="Normal"># 20.3 Example Relationship</text:p>
      <text:p text:style-name="Normal"/>
      <text:p text:style-name="Normal">Python</text:p>
      <text:p text:style-name="Normal"/>
      <text:p text:style-name="Normal">↓</text:p>
      <text:p text:style-name="Normal"/>
      <text:p text:style-name="Normal">Used By</text:p>
      <text:p text:style-name="Normal"/>
      <text:p text:style-name="Normal">↓</text:p>
      <text:p text:style-name="Normal"/>
      <text:p text:style-name="Normal">Machine Learning</text:p>
      <text:p text:style-name="Normal"/>
      <text:p text:style-name="Normal">↓</text:p>
      <text:p text:style-name="Normal"/>
      <text:p text:style-name="Normal">Required For</text:p>
      <text:p text:style-name="Normal"/>
      <text:p text:style-name="Normal">↓</text:p>
      <text:p text:style-name="Normal"/>
      <text:p text:style-name="Normal">ML Engineer</text:p>
      <text:p text:style-name="Normal"/>
      <text:p text:style-name="Normal">↓</text:p>
      <text:p text:style-name="Normal"/>
      <text:p text:style-name="Normal">Related To</text:p>
      <text:p text:style-name="Normal"/>
      <text:p text:style-name="Normal">↓</text:p>
      <text:p text:style-name="Normal"/>
      <text:soft-page-break/>
      <text:p text:style-name="Normal">Data Science</text:p>
      <text:p text:style-name="Normal"/>
      <text:p text:style-name="Normal">↓</text:p>
      <text:p text:style-name="Normal"/>
      <text:p text:style-name="Normal">Uses</text:p>
      <text:p text:style-name="Normal"/>
      <text:p text:style-name="Normal">↓</text:p>
      <text:p text:style-name="Normal"/>
      <text:p text:style-name="Normal">TensorFlow</text:p>
      <text:p text:style-name="Normal"/>
      <text:p text:style-name="Normal">↓</text:p>
      <text:p text:style-name="Normal"/>
      <text:p text:style-name="Normal">Creates</text:p>
      <text:p text:style-name="Normal"/>
      <text:p text:style-name="Normal">↓</text:p>
      <text:p text:style-name="Normal"/>
      <text:p text:style-name="Normal">Portfolio Project</text:p>
      <text:p text:style-name="Normal"/>
      <text:p text:style-name="Normal">The graph becomes the intelligence behind recommendations.</text:p>
      <text:p text:style-name="Normal"/>
      <text:p text:style-name="Normal">---</text:p>
      <text:p text:style-name="Normal"/>
      <text:p text:style-name="Normal"># 20.4 Why This Matters</text:p>
      <text:p text:style-name="Normal"/>
      <text:p text:style-name="Normal">The graph powers:</text:p>
      <text:p text:style-name="Normal"/>
      <text:p text:style-name="Normal">Career Match</text:p>
      <text:p text:style-name="Normal"/>
      <text:soft-page-break/>
      <text:p text:style-name="Normal">Roadmaps</text:p>
      <text:p text:style-name="Normal"/>
      <text:p text:style-name="Normal">Search</text:p>
      <text:p text:style-name="Normal"/>
      <text:p text:style-name="Normal">Recommendations</text:p>
      <text:p text:style-name="Normal"/>
      <text:p text:style-name="Normal">AI Coach</text:p>
      <text:p text:style-name="Normal"/>
      <text:p text:style-name="Normal">Career DNA</text:p>
      <text:p text:style-name="Normal"/>
      <text:p text:style-name="Normal">Related Careers</text:p>
      <text:p text:style-name="Normal"/>
      <text:p text:style-name="Normal">Related Skills</text:p>
      <text:p text:style-name="Normal"/>
      <text:p text:style-name="Normal">Future Learning</text:p>
      <text:p text:style-name="Normal"/>
      <text:p text:style-name="Normal">Every intelligent recommendation comes from relationships.</text:p>
      <text:p text:style-name="Normal"/>
      <text:p text:style-name="Normal">---</text:p>
      <text:p text:style-name="Normal"/>
      <text:p text:style-name="Normal"># 20.5 Dynamic Knowledge</text:p>
      <text:p text:style-name="Normal"/>
      <text:p text:style-name="Normal">The AI industry changes rapidly.</text:p>
      <text:p text:style-name="Normal"/>
      <text:p text:style-name="Normal">The graph should update continuously.</text:p>
      <text:p text:style-name="Normal"/>
      <text:p text:style-name="Normal">New Careers</text:p>
      <text:p text:style-name="Normal"/>
      <text:soft-page-break/>
      <text:p text:style-name="Normal">New Frameworks</text:p>
      <text:p text:style-name="Normal"/>
      <text:p text:style-name="Normal">New Models</text:p>
      <text:p text:style-name="Normal"/>
      <text:p text:style-name="Normal">New Tools</text:p>
      <text:p text:style-name="Normal"/>
      <text:p text:style-name="Normal">New Certifications</text:p>
      <text:p text:style-name="Normal"/>
      <text:p text:style-name="Normal">New Companies</text:p>
      <text:p text:style-name="Normal"/>
      <text:p text:style-name="Normal">Nothing remains static.</text:p>
      <text:p text:style-name="Normal"/>
      <text:p text:style-name="Normal">---</text:p>
      <text:p text:style-name="Normal"/>
      <text:p text:style-name="Normal"># 20.6 Human + AI Readable</text:p>
      <text:p text:style-name="Normal"/>
      <text:p text:style-name="Normal">The Knowledge Graph should support:</text:p>
      <text:p text:style-name="Normal"/>
      <text:p text:style-name="Normal">Users</text:p>
      <text:p text:style-name="Normal"/>
      <text:p text:style-name="Normal">Search Engines</text:p>
      <text:p text:style-name="Normal"/>
      <text:p text:style-name="Normal">Large Language Models</text:p>
      <text:p text:style-name="Normal"/>
      <text:p text:style-name="Normal">Answer Engines</text:p>
      <text:p text:style-name="Normal"/>
      <text:p text:style-name="Normal">Future AI Systems</text:p>
      <text:p text:style-name="Normal"/>
      <text:soft-page-break/>
      <text:p text:style-name="Normal">The same structured knowledge powers both people and machines.</text:p>
      <text:p text:style-name="Normal"/>
      <text:p text:style-name="Normal">---</text:p>
      <text:p text:style-name="Normal"/>
      <text:p text:style-name="Normal"># 20.7 Semantic Architecture</text:p>
      <text:p text:style-name="Normal"/>
      <text:p text:style-name="Normal">Every entity contains:</text:p>
      <text:p text:style-name="Normal"/>
      <text:p text:style-name="Normal">Definition</text:p>
      <text:p text:style-name="Normal"/>
      <text:p text:style-name="Normal">Description</text:p>
      <text:p text:style-name="Normal"/>
      <text:p text:style-name="Normal">Relationships</text:p>
      <text:p text:style-name="Normal"/>
      <text:p text:style-name="Normal">Prerequisites</text:p>
      <text:p text:style-name="Normal"/>
      <text:p text:style-name="Normal">Difficulty</text:p>
      <text:p text:style-name="Normal"/>
      <text:p text:style-name="Normal">Popularity</text:p>
      <text:p text:style-name="Normal"/>
      <text:p text:style-name="Normal">Demand</text:p>
      <text:p text:style-name="Normal"/>
      <text:p text:style-name="Normal">Alternatives</text:p>
      <text:p text:style-name="Normal"/>
      <text:p text:style-name="Normal">Dependencies</text:p>
      <text:p text:style-name="Normal"/>
      <text:p text:style-name="Normal">Future Outlook</text:p>
      <text:p text:style-name="Normal"/>
      <text:soft-page-break/>
      <text:p text:style-name="Normal">Related Entities</text:p>
      <text:p text:style-name="Normal"/>
      <text:p text:style-name="Normal">Everything becomes interconnected.</text:p>
      <text:p text:style-name="Normal"/>
      <text:p text:style-name="Normal">---</text:p>
      <text:p text:style-name="Normal"/>
      <text:p text:style-name="Normal"># 20.8 Product Intelligence</text:p>
      <text:p text:style-name="Normal"/>
      <text:p text:style-name="Normal">The Knowledge Graph becomes the product's brain.</text:p>
      <text:p text:style-name="Normal"/>
      <text:p text:style-name="Normal">The UI is only the interface.</text:p>
      <text:p text:style-name="Normal"/>
      <text:p text:style-name="Normal">Artificial Intelligence reasons over the graph.</text:p>
      <text:p text:style-name="Normal"/>
      <text:p text:style-name="Normal">Users experience the results.</text:p>
      <text:p text:style-name="Normal"/>
      <text:p text:style-name="Normal">---</text:p>
      <text:p text:style-name="Normal"/>
      <text:p text:style-name="Normal"># 20.9 Long-Term Vision</text:p>
      <text:p text:style-name="Normal"/>
      <text:p text:style-name="Normal">Eventually the graph should become one of the world's largest structured knowledge bases dedicated exclusively to Artificial Intelligence careers.</text:p>
      <text:p text:style-name="Normal"/>
      <text:p text:style-name="Normal">Not just content.</text:p>
      <text:p text:style-name="Normal"/>
      <text:p text:style-name="Normal">Knowledge.</text:p>
      <text:p text:style-name="Normal"/>
      <text:p text:style-name="Normal">Relationships.</text:p>
      <text:p text:style-name="Normal"/>
      <text:p text:style-name="Normal">Intelligence.</text:p>
      <text:p text:style-name="Normal"/>
      <text:p text:style-name="Normal">---</text:p>
      <text:p text:style-name="Normal"/>
      <text:p text:style-name="Normal"># Knowledge Graph Statement</text:p>
      <text:p text:style-name="Normal"/>
      <text:p text:style-name="Normal">**Information becomes exponentially more valuable when every concept is connected to every other concept.**</text:p>
      <text:p text:style-name="Normal"/>
      <text:p text:style-name="Normal">The Knowledge Graph is the foundation that transforms AI Career OS from a website into an intelligent career operating system.</text:p>
      <text:p text:style-name="Normal"/>
      <text:p text:style-name="Normal">---</text:p>
      <text:p text:style-name="Normal"/>
      <text:p text:style-name="Normal"># End of Volume 20</text:p>
      <text:p text:style-name="Normal"/>
      <text:p text:style-name="Normal">**Next Volume:** SEO + GEO + AEO + LLM Optimization Strategy</text:p>
      <text:p text:style-name="Normal"/>
      <text:p text:style-name="Normal">#<text:s/><text:span text:style-name="T51">📘</text:span><text:s/>Volume 21</text:p>
      <text:p text:style-name="Normal"/>
      <text:p text:style-name="Normal"># AI Discoverability Strategy</text:p>
      <text:p text:style-name="Normal">## (SEO + GEO + AEO + LLMO)</text:p>
      <text:p text:style-name="Normal"/>
      <text:p text:style-name="Normal">### Version 1.0</text:p>
      <text:p text:style-name="Normal"/>
      <text:p text:style-name="Normal">---</text:p>
      <text:p text:style-name="Normal"/>
      <text:soft-page-break/>
      <text:p text:style-name="Normal"># 21.1 Why This Strategy Exists</text:p>
      <text:p text:style-name="Normal"/>
      <text:p text:style-name="Normal">The future of search is changing.</text:p>
      <text:p text:style-name="Normal"/>
      <text:p text:style-name="Normal">People no longer search only on Google.</text:p>
      <text:p text:style-name="Normal"/>
      <text:p text:style-name="Normal">They ask:</text:p>
      <text:p text:style-name="Normal"/>
      <text:p text:style-name="Normal">ChatGPT.</text:p>
      <text:p text:style-name="Normal"/>
      <text:p text:style-name="Normal">Claude.</text:p>
      <text:p text:style-name="Normal"/>
      <text:p text:style-name="Normal">Gemini.</text:p>
      <text:p text:style-name="Normal"/>
      <text:p text:style-name="Normal">Perplexity.</text:p>
      <text:p text:style-name="Normal"/>
      <text:p text:style-name="Normal">Copilot.</text:p>
      <text:p text:style-name="Normal"/>
      <text:p text:style-name="Normal">Grok.</text:p>
      <text:p text:style-name="Normal"/>
      <text:p text:style-name="Normal">DeepSeek.</text:p>
      <text:p text:style-name="Normal"/>
      <text:p text:style-name="Normal">Future AI assistants.</text:p>
      <text:p text:style-name="Normal"/>
      <text:p text:style-name="Normal">AI Career OS should be built for both humans and Artificial Intelligence.</text:p>
      <text:p text:style-name="Normal"/>
      <text:p text:style-name="Normal">Our goal is not simply to rank higher.</text:p>
      <text:p text:style-name="Normal"/>
      <text:soft-page-break/>
      <text:p text:style-name="Normal">Our goal is to become the world's most trusted AI career knowledge source.</text:p>
      <text:p text:style-name="Normal"/>
      <text:p text:style-name="Normal">---</text:p>
      <text:p text:style-name="Normal"/>
      <text:p text:style-name="Normal"># 21.2 Search Philosophy</text:p>
      <text:p text:style-name="Normal"/>
      <text:p text:style-name="Normal">Traditional SEO asks:</text:p>
      <text:p text:style-name="Normal"/>
      <text:p text:style-name="Normal">"How do we rank?"</text:p>
      <text:p text:style-name="Normal"/>
      <text:p text:style-name="Normal">AI Career OS asks:</text:p>
      <text:p text:style-name="Normal"/>
      <text:p text:style-name="Normal">"How do we become the best answer?"</text:p>
      <text:p text:style-name="Normal"/>
      <text:p text:style-name="Normal">If we become the best answer...</text:p>
      <text:p text:style-name="Normal"/>
      <text:p text:style-name="Normal">Ranking naturally follows.</text:p>
      <text:p text:style-name="Normal"/>
      <text:p text:style-name="Normal">---</text:p>
      <text:p text:style-name="Normal"/>
      <text:p text:style-name="Normal"># 21.3 Human First, Machine Readable</text:p>
      <text:p text:style-name="Normal"/>
      <text:p text:style-name="Normal">Every page should satisfy two audiences.</text:p>
      <text:p text:style-name="Normal"/>
      <text:p text:style-name="Normal">Humans.</text:p>
      <text:p text:style-name="Normal"/>
      <text:p text:style-name="Normal">Artificial Intelligence.</text:p>
      <text:p text:style-name="Normal"/>
      <text:soft-page-break/>
      <text:p text:style-name="Normal">The content should be:</text:p>
      <text:p text:style-name="Normal"/>
      <text:p text:style-name="Normal">Easy to read.</text:p>
      <text:p text:style-name="Normal"/>
      <text:p text:style-name="Normal">Easy to understand.</text:p>
      <text:p text:style-name="Normal"/>
      <text:p text:style-name="Normal">Easy to cite.</text:p>
      <text:p text:style-name="Normal"/>
      <text:p text:style-name="Normal">Easy to summarize.</text:p>
      <text:p text:style-name="Normal"/>
      <text:p text:style-name="Normal">Easy to index.</text:p>
      <text:p text:style-name="Normal"/>
      <text:p text:style-name="Normal">Easy to reason about.</text:p>
      <text:p text:style-name="Normal"/>
      <text:p text:style-name="Normal">---</text:p>
      <text:p text:style-name="Normal"/>
      <text:p text:style-name="Normal"># 21.4 Entity-Based Architecture</text:p>
      <text:p text:style-name="Normal"/>
      <text:p text:style-name="Normal">Everything inside AI Career OS becomes an entity.</text:p>
      <text:p text:style-name="Normal"/>
      <text:p text:style-name="Normal">Examples</text:p>
      <text:p text:style-name="Normal"/>
      <text:p text:style-name="Normal">Career</text:p>
      <text:p text:style-name="Normal"/>
      <text:p text:style-name="Normal">Skill</text:p>
      <text:p text:style-name="Normal"/>
      <text:p text:style-name="Normal">Project</text:p>
      <text:p text:style-name="Normal"/>
      <text:soft-page-break/>
      <text:p text:style-name="Normal">Framework</text:p>
      <text:p text:style-name="Normal"/>
      <text:p text:style-name="Normal">Programming Language</text:p>
      <text:p text:style-name="Normal"/>
      <text:p text:style-name="Normal">Company</text:p>
      <text:p text:style-name="Normal"/>
      <text:p text:style-name="Normal">Interview Question</text:p>
      <text:p text:style-name="Normal"/>
      <text:p text:style-name="Normal">Certification</text:p>
      <text:p text:style-name="Normal"/>
      <text:p text:style-name="Normal">Learning Resource</text:p>
      <text:p text:style-name="Normal"/>
      <text:p text:style-name="Normal">Technology</text:p>
      <text:p text:style-name="Normal"/>
      <text:p text:style-name="Normal">Every entity connects to others.</text:p>
      <text:p text:style-name="Normal"/>
      <text:p text:style-name="Normal">Search engines understand relationships.</text:p>
      <text:p text:style-name="Normal"/>
      <text:p text:style-name="Normal">LLMs understand relationships.</text:p>
      <text:p text:style-name="Normal"/>
      <text:p text:style-name="Normal">Users benefit from relationships.</text:p>
      <text:p text:style-name="Normal"/>
      <text:p text:style-name="Normal">---</text:p>
      <text:p text:style-name="Normal"/>
      <text:p text:style-name="Normal"># 21.5 Topical Authority</text:p>
      <text:p text:style-name="Normal"/>
      <text:p text:style-name="Normal">Instead of publishing random content...</text:p>
      <text:p text:style-name="Normal"/>
      <text:soft-page-break/>
      <text:p text:style-name="Normal">Own one topic.</text:p>
      <text:p text:style-name="Normal"/>
      <text:p text:style-name="Normal">Artificial Intelligence Careers.</text:p>
      <text:p text:style-name="Normal"/>
      <text:p text:style-name="Normal">Completely.</text:p>
      <text:p text:style-name="Normal"/>
      <text:p text:style-name="Normal">Topics include:</text:p>
      <text:p text:style-name="Normal"/>
      <text:p text:style-name="Normal">Every AI Career</text:p>
      <text:p text:style-name="Normal"/>
      <text:p text:style-name="Normal">Every AI Skill</text:p>
      <text:p text:style-name="Normal"/>
      <text:p text:style-name="Normal">Every AI Technology</text:p>
      <text:p text:style-name="Normal"/>
      <text:p text:style-name="Normal">Every AI Tool</text:p>
      <text:p text:style-name="Normal"/>
      <text:p text:style-name="Normal">Every AI Framework</text:p>
      <text:p text:style-name="Normal"/>
      <text:p text:style-name="Normal">Every AI Certification</text:p>
      <text:p text:style-name="Normal"/>
      <text:p text:style-name="Normal">Every AI Interview</text:p>
      <text:p text:style-name="Normal"/>
      <text:p text:style-name="Normal">Every AI Portfolio</text:p>
      <text:p text:style-name="Normal"/>
      <text:p text:style-name="Normal">Every AI Learning Path</text:p>
      <text:p text:style-name="Normal"/>
      <text:p text:style-name="Normal">The objective is to become synonymous with AI careers.</text:p>
      <text:p text:style-name="Normal"/>
      <text:soft-page-break/>
      <text:p text:style-name="Normal">---</text:p>
      <text:p text:style-name="Normal"/>
      <text:p text:style-name="Normal"># 21.6 GEO (Generative Engine Optimization)</text:p>
      <text:p text:style-name="Normal"/>
      <text:p text:style-name="Normal">Generative AI increasingly answers questions directly.</text:p>
      <text:p text:style-name="Normal"/>
      <text:p text:style-name="Normal">AI Career OS should become one of the primary sources these systems reference.</text:p>
      <text:p text:style-name="Normal"/>
      <text:p text:style-name="Normal">Requirements:</text:p>
      <text:p text:style-name="Normal"/>
      <text:p text:style-name="Normal">Accurate information.</text:p>
      <text:p text:style-name="Normal"/>
      <text:p text:style-name="Normal">Structured knowledge.</text:p>
      <text:p text:style-name="Normal"/>
      <text:p text:style-name="Normal">High authority.</text:p>
      <text:p text:style-name="Normal"/>
      <text:p text:style-name="Normal">Consistent terminology.</text:p>
      <text:p text:style-name="Normal"/>
      <text:p text:style-name="Normal">Transparent reasoning.</text:p>
      <text:p text:style-name="Normal"/>
      <text:p text:style-name="Normal">Citations where appropriate.</text:p>
      <text:p text:style-name="Normal"/>
      <text:p text:style-name="Normal">---</text:p>
      <text:p text:style-name="Normal"/>
      <text:p text:style-name="Normal"># 21.7 AEO (Answer Engine Optimization)</text:p>
      <text:p text:style-name="Normal"/>
      <text:p text:style-name="Normal">Pages should answer complete questions.</text:p>
      <text:p text:style-name="Normal"/>
      <text:soft-page-break/>
      <text:p text:style-name="Normal">Examples:</text:p>
      <text:p text:style-name="Normal"/>
      <text:p text:style-name="Normal">How do I become an AI Engineer?</text:p>
      <text:p text:style-name="Normal"/>
      <text:p text:style-name="Normal">What skills does an AI Product Manager need?</text:p>
      <text:p text:style-name="Normal"/>
      <text:p text:style-name="Normal">Is Prompt Engineering still a good career?</text:p>
      <text:p text:style-name="Normal"/>
      <text:p text:style-name="Normal">Can marketers transition into AI?</text:p>
      <text:p text:style-name="Normal"/>
      <text:p text:style-name="Normal">How long does AI Automation take to learn?</text:p>
      <text:p text:style-name="Normal"/>
      <text:p text:style-name="Normal">Each page should become the best answer on the internet.</text:p>
      <text:p text:style-name="Normal"/>
      <text:p text:style-name="Normal">---</text:p>
      <text:p text:style-name="Normal"/>
      <text:p text:style-name="Normal"># 21.8 LLM Optimization</text:p>
      <text:p text:style-name="Normal"/>
      <text:p text:style-name="Normal">Large Language Models prefer:</text:p>
      <text:p text:style-name="Normal"/>
      <text:p text:style-name="Normal">Clear structure.</text:p>
      <text:p text:style-name="Normal"/>
      <text:p text:style-name="Normal">Definitions.</text:p>
      <text:p text:style-name="Normal"/>
      <text:p text:style-name="Normal">Relationships.</text:p>
      <text:p text:style-name="Normal"/>
      <text:p text:style-name="Normal">Examples.</text:p>
      <text:p text:style-name="Normal"/>
      <text:soft-page-break/>
      <text:p text:style-name="Normal">Consistency.</text:p>
      <text:p text:style-name="Normal"/>
      <text:p text:style-name="Normal">Semantic organization.</text:p>
      <text:p text:style-name="Normal"/>
      <text:p text:style-name="Normal">AI Career OS should be optimized for machine understanding—not keyword stuffing.</text:p>
      <text:p text:style-name="Normal"/>
      <text:p text:style-name="Normal">---</text:p>
      <text:p text:style-name="Normal"/>
      <text:p text:style-name="Normal"># 21.9 Structured Data</text:p>
      <text:p text:style-name="Normal"/>
      <text:p text:style-name="Normal">Every important page should contain:</text:p>
      <text:p text:style-name="Normal"/>
      <text:p text:style-name="Normal">Schema.org</text:p>
      <text:p text:style-name="Normal"/>
      <text:p text:style-name="Normal">JSON-LD</text:p>
      <text:p text:style-name="Normal"/>
      <text:p text:style-name="Normal">Rich metadata</text:p>
      <text:p text:style-name="Normal"/>
      <text:p text:style-name="Normal">Entity relationships</text:p>
      <text:p text:style-name="Normal"/>
      <text:p text:style-name="Normal">Canonical information</text:p>
      <text:p text:style-name="Normal"/>
      <text:p text:style-name="Normal">Structured FAQs</text:p>
      <text:p text:style-name="Normal"/>
      <text:p text:style-name="Normal">Everything should be machine-readable.</text:p>
      <text:p text:style-name="Normal"/>
      <text:p text:style-name="Normal">---</text:p>
      <text:p text:style-name="Normal"/>
      <text:soft-page-break/>
      <text:p text:style-name="Normal"># 21.10 AI Discoverability Statement</text:p>
      <text:p text:style-name="Normal"/>
      <text:p text:style-name="Normal">**We are not optimizing for search engines.**</text:p>
      <text:p text:style-name="Normal"/>
      <text:p text:style-name="Normal">**We are optimizing to become the most trusted source of AI career knowledge for both humans and Artificial Intelligence.**</text:p>
      <text:p text:style-name="Normal"/>
      <text:p text:style-name="Normal">---</text:p>
      <text:p text:style-name="Normal"/>
      <text:p text:style-name="Normal"># End of Volume 21</text:p>
      <text:p text:style-name="Normal"/>
      <text:p text:style-name="Normal">**Next Volume:** Information Architecture</text:p>
      <text:p text:style-name="Normal"/>
      <text:p text:style-name="Normal">#<text:s/><text:span text:style-name="T52">📘</text:span><text:s/>Volume 22</text:p>
      <text:p text:style-name="Normal"/>
      <text:p text:style-name="Normal"># Information Architecture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22.1 Purpose</text:p>
      <text:p text:style-name="Normal"/>
      <text:p text:style-name="Normal">Information Architecture determines how users think about the product.</text:p>
      <text:p text:style-name="Normal"/>
      <text:p text:style-name="Normal">Poor architecture creates confusion.</text:p>
      <text:p text:style-name="Normal"/>
      <text:p text:style-name="Normal">Great architecture creates confidence.</text:p>
      <text:p text:style-name="Normal"/>
      <text:p text:style-name="Normal">Users should never wonder:</text:p>
      <text:p text:style-name="Normal"/>
      <text:p text:style-name="Normal">"Where do I go next?"</text:p>
      <text:p text:style-name="Normal"/>
      <text:p text:style-name="Normal">The product should always make the next step obvious.</text:p>
      <text:p text:style-name="Normal"/>
      <text:p text:style-name="Normal">---</text:p>
      <text:p text:style-name="Normal"/>
      <text:p text:style-name="Normal"># 22.2 Architecture Philosophy</text:p>
      <text:p text:style-name="Normal"/>
      <text:p text:style-name="Normal">Traditional websites organize pages.</text:p>
      <text:p text:style-name="Normal"/>
      <text:p text:style-name="Normal">AI Career OS organizes journeys.</text:p>
      <text:p text:style-name="Normal"/>
      <text:p text:style-name="Normal">Everything revolves around progression.</text:p>
      <text:p text:style-name="Normal"/>
      <text:p text:style-name="Normal">Not navigation.</text:p>
      <text:p text:style-name="Normal"/>
      <text:p text:style-name="Normal">---</text:p>
      <text:p text:style-name="Normal"/>
      <text:p text:style-name="Normal"># 22.3 Primary Product Structure</text:p>
      <text:p text:style-name="Normal"/>
      <text:p text:style-name="Normal">Landing Scene</text:p>
      <text:p text:style-name="Normal"/>
      <text:p text:style-name="Normal">↓</text:p>
      <text:p text:style-name="Normal"/>
      <text:p text:style-name="Normal">Career Network</text:p>
      <text:p text:style-name="Normal"/>
      <text:p text:style-name="Normal">↓</text:p>
      <text:p text:style-name="Normal"/>
      <text:p text:style-name="Normal">Career Discovery</text:p>
      <text:p text:style-name="Normal"/>
      <text:p text:style-name="Normal">↓</text:p>
      <text:p text:style-name="Normal"/>
      <text:p text:style-name="Normal">Career DNA</text:p>
      <text:p text:style-name="Normal"/>
      <text:p text:style-name="Normal">↓</text:p>
      <text:p text:style-name="Normal"/>
      <text:p text:style-name="Normal">CV Analyzer</text:p>
      <text:p text:style-name="Normal"/>
      <text:p text:style-name="Normal">↓</text:p>
      <text:p text:style-name="Normal"/>
      <text:p text:style-name="Normal">AI Interview</text:p>
      <text:p text:style-name="Normal"/>
      <text:p text:style-name="Normal">↓</text:p>
      <text:p text:style-name="Normal"/>
      <text:p text:style-name="Normal">Dashboard</text:p>
      <text:p text:style-name="Normal"/>
      <text:p text:style-name="Normal">↓</text:p>
      <text:p text:style-name="Normal"/>
      <text:p text:style-name="Normal">Roadmap</text:p>
      <text:p text:style-name="Normal"/>
      <text:p text:style-name="Normal">↓</text:p>
      <text:p text:style-name="Normal"/>
      <text:p text:style-name="Normal">Projects</text:p>
      <text:p text:style-name="Normal"/>
      <text:p text:style-name="Normal">↓</text:p>
      <text:p text:style-name="Normal"/>
      <text:p text:style-name="Normal">Portfolio</text:p>
      <text:p text:style-name="Normal"/>
      <text:p text:style-name="Normal">↓</text:p>
      <text:p text:style-name="Normal"/>
      <text:p text:style-name="Normal">Job Readiness</text:p>
      <text:p text:style-name="Normal"/>
      <text:p text:style-name="Normal">↓</text:p>
      <text:p text:style-name="Normal"/>
      <text:p text:style-name="Normal">Employment</text:p>
      <text:p text:style-name="Normal"/>
      <text:p text:style-name="Normal">↓</text:p>
      <text:p text:style-name="Normal"/>
      <text:p text:style-name="Normal">Continuous Growth</text:p>
      <text:p text:style-name="Normal"/>
      <text:p text:style-name="Normal">---</text:p>
      <text:p text:style-name="Normal"/>
      <text:p text:style-name="Normal"># 22.4 Navigation Principles</text:p>
      <text:p text:style-name="Normal"/>
      <text:p text:style-name="Normal">Navigation should answer three questions.</text:p>
      <text:p text:style-name="Normal"/>
      <text:p text:style-name="Normal">Where am I?</text:p>
      <text:p text:style-name="Normal"/>
      <text:p text:style-name="Normal">Where can I go?</text:p>
      <text:p text:style-name="Normal"/>
      <text:p text:style-name="Normal">Why should I go there?</text:p>
      <text:p text:style-name="Normal"/>
      <text:p text:style-name="Normal">Every screen should provide these answers.</text:p>
      <text:p text:style-name="Normal"/>
      <text:p text:style-name="Normal">---</text:p>
      <text:p text:style-name="Normal"/>
      <text:p text:style-name="Normal"># 22.5 Primary Navigation</text:p>
      <text:p text:style-name="Normal"/>
      <text:p text:style-name="Normal">Home</text:p>
      <text:p text:style-name="Normal"/>
      <text:p text:style-name="Normal">Explore Careers</text:p>
      <text:p text:style-name="Normal"/>
      <text:p text:style-name="Normal">Career Network</text:p>
      <text:p text:style-name="Normal"/>
      <text:p text:style-name="Normal">Dashboard</text:p>
      <text:p text:style-name="Normal"/>
      <text:p text:style-name="Normal">Roadmaps</text:p>
      <text:p text:style-name="Normal"/>
      <text:p text:style-name="Normal">Projects</text:p>
      <text:p text:style-name="Normal"/>
      <text:p text:style-name="Normal">AI Coach</text:p>
      <text:p text:style-name="Normal"/>
      <text:p text:style-name="Normal">Progress</text:p>
      <text:p text:style-name="Normal"/>
      <text:p text:style-name="Normal">Community</text:p>
      <text:p text:style-name="Normal"/>
      <text:p text:style-name="Normal">Settings</text:p>
      <text:p text:style-name="Normal"/>
      <text:p text:style-name="Normal">Navigation should remain intentionally minimal.</text:p>
      <text:p text:style-name="Normal"/>
      <text:p text:style-name="Normal">---</text:p>
      <text:p text:style-name="Normal"/>
      <text:p text:style-name="Normal"># 22.6 Relationships</text:p>
      <text:p text:style-name="Normal"/>
      <text:p text:style-name="Normal">Everything connects.</text:p>
      <text:p text:style-name="Normal"/>
      <text:p text:style-name="Normal">Career</text:p>
      <text:p text:style-name="Normal"/>
      <text:p text:style-name="Normal">↓</text:p>
      <text:p text:style-name="Normal"/>
      <text:p text:style-name="Normal">Required Skills</text:p>
      <text:p text:style-name="Normal"/>
      <text:p text:style-name="Normal">↓</text:p>
      <text:p text:style-name="Normal"/>
      <text:p text:style-name="Normal">Projects</text:p>
      <text:p text:style-name="Normal"/>
      <text:p text:style-name="Normal">↓</text:p>
      <text:p text:style-name="Normal"/>
      <text:p text:style-name="Normal">Technologies</text:p>
      <text:p text:style-name="Normal"/>
      <text:p text:style-name="Normal">↓</text:p>
      <text:p text:style-name="Normal"/>
      <text:p text:style-name="Normal">Courses</text:p>
      <text:p text:style-name="Normal"/>
      <text:p text:style-name="Normal">↓</text:p>
      <text:p text:style-name="Normal"/>
      <text:p text:style-name="Normal">Certifications</text:p>
      <text:p text:style-name="Normal"/>
      <text:p text:style-name="Normal">↓</text:p>
      <text:p text:style-name="Normal"/>
      <text:p text:style-name="Normal">Companies</text:p>
      <text:p text:style-name="Normal"/>
      <text:p text:style-name="Normal">↓</text:p>
      <text:p text:style-name="Normal"/>
      <text:p text:style-name="Normal">Jobs</text:p>
      <text:p text:style-name="Normal"/>
      <text:p text:style-name="Normal">↓</text:p>
      <text:p text:style-name="Normal"/>
      <text:p text:style-name="Normal">Interview Questions</text:p>
      <text:p text:style-name="Normal"/>
      <text:p text:style-name="Normal">↓</text:p>
      <text:p text:style-name="Normal"/>
      <text:p text:style-name="Normal">Career Growth</text:p>
      <text:p text:style-name="Normal"/>
      <text:p text:style-name="Normal">Relationships create intelligence.</text:p>
      <text:p text:style-name="Normal"/>
      <text:p text:style-name="Normal">---</text:p>
      <text:p text:style-name="Normal"/>
      <text:p text:style-name="Normal"># 22.7 Progressive Architecture</text:p>
      <text:p text:style-name="Normal"/>
      <text:p text:style-name="Normal">Beginners see:</text:p>
      <text:p text:style-name="Normal"/>
      <text:p text:style-name="Normal">Simple interfaces.</text:p>
      <text:p text:style-name="Normal"/>
      <text:p text:style-name="Normal">Advanced users see:</text:p>
      <text:p text:style-name="Normal"/>
      <text:p text:style-name="Normal">Powerful interfaces.</text:p>
      <text:p text:style-name="Normal"/>
      <text:p text:style-name="Normal">Complexity should grow with experience.</text:p>
      <text:p text:style-name="Normal"/>
      <text:p text:style-name="Normal">Never overwhelm new users.</text:p>
      <text:p text:style-name="Normal"/>
      <text:p text:style-name="Normal">---</text:p>
      <text:p text:style-name="Normal"/>
      <text:p text:style-name="Normal"># 22.8 Future Expansion</text:p>
      <text:p text:style-name="Normal"/>
      <text:p text:style-name="Normal">Architecture should anticipate future modules.</text:p>
      <text:p text:style-name="Normal"/>
      <text:p text:style-name="Normal">Job Marketplace.</text:p>
      <text:p text:style-name="Normal"/>
      <text:p text:style-name="Normal">Mentorship.</text:p>
      <text:p text:style-name="Normal"/>
      <text:p text:style-name="Normal">AI Agents.</text:p>
      <text:p text:style-name="Normal"/>
      <text:p text:style-name="Normal">Enterprise.</text:p>
      <text:p text:style-name="Normal"/>
      <text:p text:style-name="Normal">Recruitment.</text:p>
      <text:p text:style-name="Normal"/>
      <text:p text:style-name="Normal">Recruiter Dashboard.</text:p>
      <text:p text:style-name="Normal"/>
      <text:p text:style-name="Normal">Learning Marketplace.</text:p>
      <text:p text:style-name="Normal"/>
      <text:p text:style-name="Normal">API Integrations.</text:p>
      <text:p text:style-name="Normal"/>
      <text:p text:style-name="Normal">International Expansion.</text:p>
      <text:p text:style-name="Normal"/>
      <text:p text:style-name="Normal">Nothing should require redesign.</text:p>
      <text:p text:style-name="Normal"/>
      <text:p text:style-name="Normal">---</text:p>
      <text:p text:style-name="Normal"/>
      <text:p text:style-name="Normal"># Information Architecture Statement</text:p>
      <text:p text:style-name="Normal"/>
      <text:p text:style-name="Normal">**Users should experience one continuous journey rather than dozens of disconnected pages.**</text:p>
      <text:p text:style-name="Normal"/>
      <text:p text:style-name="Normal">---</text:p>
      <text:p text:style-name="Normal"/>
      <text:p text:style-name="Normal"># End of Volume 22</text:p>
      <text:p text:style-name="Normal"/>
      <text:p text:style-name="Normal">**Next Volume:** Brand Identity &amp; Design System</text:p>
      <text:p text:style-name="Normal"/>
      <text:p text:style-name="Normal">#<text:s/><text:span text:style-name="T53">📘</text:span><text:s/>Volume 23</text:p>
      <text:p text:style-name="Normal"/>
      <text:p text:style-name="Normal"># Brand Identity &amp; Design System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23.1 Brand Vision</text:p>
      <text:p text:style-name="Normal"/>
      <text:soft-page-break/>
      <text:p text:style-name="Normal">AI Career OS should become one of the world's most recognizable AI education brands.</text:p>
      <text:p text:style-name="Normal"/>
      <text:p text:style-name="Normal">Not because of advertising.</text:p>
      <text:p text:style-name="Normal"/>
      <text:p text:style-name="Normal">Because of product quality.</text:p>
      <text:p text:style-name="Normal"/>
      <text:p text:style-name="Normal">---</text:p>
      <text:p text:style-name="Normal"/>
      <text:p text:style-name="Normal"># 23.2 Brand Personality</text:p>
      <text:p text:style-name="Normal"/>
      <text:p text:style-name="Normal">The brand should feel:</text:p>
      <text:p text:style-name="Normal"/>
      <text:p text:style-name="Normal">Intelligent.</text:p>
      <text:p text:style-name="Normal"/>
      <text:p text:style-name="Normal">Premium.</text:p>
      <text:p text:style-name="Normal"/>
      <text:p text:style-name="Normal">Trustworthy.</text:p>
      <text:p text:style-name="Normal"/>
      <text:p text:style-name="Normal">Elegant.</text:p>
      <text:p text:style-name="Normal"/>
      <text:p text:style-name="Normal">Helpful.</text:p>
      <text:p text:style-name="Normal"/>
      <text:p text:style-name="Normal">Confident.</text:p>
      <text:p text:style-name="Normal"/>
      <text:p text:style-name="Normal">Modern.</text:p>
      <text:p text:style-name="Normal"/>
      <text:p text:style-name="Normal">Visionary.</text:p>
      <text:p text:style-name="Normal"/>
      <text:soft-page-break/>
      <text:p text:style-name="Normal">Never:</text:p>
      <text:p text:style-name="Normal"/>
      <text:p text:style-name="Normal">Corporate.</text:p>
      <text:p text:style-name="Normal"/>
      <text:p text:style-name="Normal">Cold.</text:p>
      <text:p text:style-name="Normal"/>
      <text:p text:style-name="Normal">Academic.</text:p>
      <text:p text:style-name="Normal"/>
      <text:p text:style-name="Normal">Overwhelming.</text:p>
      <text:p text:style-name="Normal"/>
      <text:p text:style-name="Normal">Pretentious.</text:p>
      <text:p text:style-name="Normal"/>
      <text:p text:style-name="Normal">---</text:p>
      <text:p text:style-name="Normal"/>
      <text:p text:style-name="Normal"># 23.3 Visual Identity</text:p>
      <text:p text:style-name="Normal"/>
      <text:p text:style-name="Normal">Primary feeling:</text:p>
      <text:p text:style-name="Normal"/>
      <text:p text:style-name="Normal">Future.</text:p>
      <text:p text:style-name="Normal"/>
      <text:p text:style-name="Normal">Intelligence.</text:p>
      <text:p text:style-name="Normal"/>
      <text:p text:style-name="Normal">Motion.</text:p>
      <text:p text:style-name="Normal"/>
      <text:p text:style-name="Normal">Connection.</text:p>
      <text:p text:style-name="Normal"/>
      <text:p text:style-name="Normal">Possibility.</text:p>
      <text:p text:style-name="Normal"/>
      <text:soft-page-break/>
      <text:p text:style-name="Normal">Use lighting, depth, neural patterns and subtle motion instead of excessive visual effects.</text:p>
      <text:p text:style-name="Normal"/>
      <text:p text:style-name="Normal">---</text:p>
      <text:p text:style-name="Normal"/>
      <text:p text:style-name="Normal"># 23.4 Color Philosophy</text:p>
      <text:p text:style-name="Normal"/>
      <text:p text:style-name="Normal">Primary</text:p>
      <text:p text:style-name="Normal"/>
      <text:p text:style-name="Normal">Indigo</text:p>
      <text:p text:style-name="Normal"/>
      <text:p text:style-name="Normal">Purple</text:p>
      <text:p text:style-name="Normal"/>
      <text:p text:style-name="Normal">Electric Blue</text:p>
      <text:p text:style-name="Normal"/>
      <text:p text:style-name="Normal">Accent</text:p>
      <text:p text:style-name="Normal"/>
      <text:p text:style-name="Normal">Cyan</text:p>
      <text:p text:style-name="Normal"/>
      <text:p text:style-name="Normal">Soft White</text:p>
      <text:p text:style-name="Normal"/>
      <text:p text:style-name="Normal">Background</text:p>
      <text:p text:style-name="Normal"/>
      <text:p text:style-name="Normal">Dark Graphite</text:p>
      <text:p text:style-name="Normal"/>
      <text:p text:style-name="Normal">Deep Navy</text:p>
      <text:p text:style-name="Normal"/>
      <text:p text:style-name="Normal">Near Black</text:p>
      <text:p text:style-name="Normal"/>
      <text:p text:style-name="Normal">Colors should communicate intelligence.</text:p>
      <text:p text:style-name="Normal"/>
      <text:p text:style-name="Normal">Not entertainment.</text:p>
      <text:p text:style-name="Normal"/>
      <text:p text:style-name="Normal">---</text:p>
      <text:p text:style-name="Normal"/>
      <text:p text:style-name="Normal"># 23.5 Typography</text:p>
      <text:p text:style-name="Normal"/>
      <text:p text:style-name="Normal">Typography should feel:</text:p>
      <text:p text:style-name="Normal"/>
      <text:p text:style-name="Normal">Modern.</text:p>
      <text:p text:style-name="Normal"/>
      <text:p text:style-name="Normal">Clean.</text:p>
      <text:p text:style-name="Normal"/>
      <text:p text:style-name="Normal">Professional.</text:p>
      <text:p text:style-name="Normal"/>
      <text:p text:style-name="Normal">Readable.</text:p>
      <text:p text:style-name="Normal"/>
      <text:p text:style-name="Normal">Confident.</text:p>
      <text:p text:style-name="Normal"/>
      <text:p text:style-name="Normal">Hierarchy should be obvious.</text:p>
      <text:p text:style-name="Normal"/>
      <text:p text:style-name="Normal">Whitespace should be generous.</text:p>
      <text:p text:style-name="Normal"/>
      <text:p text:style-name="Normal">---</text:p>
      <text:p text:style-name="Normal"/>
      <text:p text:style-name="Normal"># 23.6 Components</text:p>
      <text:p text:style-name="Normal"/>
      <text:p text:style-name="Normal">Every component should belong to one unified design language.</text:p>
      <text:p text:style-name="Normal"/>
      <text:p text:style-name="Normal">Buttons.</text:p>
      <text:p text:style-name="Normal"/>
      <text:p text:style-name="Normal">Cards.</text:p>
      <text:p text:style-name="Normal"/>
      <text:p text:style-name="Normal">Inputs.</text:p>
      <text:p text:style-name="Normal"/>
      <text:p text:style-name="Normal">Dialogs.</text:p>
      <text:p text:style-name="Normal"/>
      <text:p text:style-name="Normal">Charts.</text:p>
      <text:p text:style-name="Normal"/>
      <text:p text:style-name="Normal">Progress.</text:p>
      <text:p text:style-name="Normal"/>
      <text:p text:style-name="Normal">Badges.</text:p>
      <text:p text:style-name="Normal"/>
      <text:p text:style-name="Normal">Timeline.</text:p>
      <text:p text:style-name="Normal"/>
      <text:p text:style-name="Normal">Tables.</text:p>
      <text:p text:style-name="Normal"/>
      <text:p text:style-name="Normal">Navigation.</text:p>
      <text:p text:style-name="Normal"/>
      <text:p text:style-name="Normal">Everything should feel consistent.</text:p>
      <text:p text:style-name="Normal"/>
      <text:p text:style-name="Normal">---</text:p>
      <text:p text:style-name="Normal"/>
      <text:p text:style-name="Normal"># 23.7 Motion Identity</text:p>
      <text:p text:style-name="Normal"/>
      <text:p text:style-name="Normal">Motion is part of the brand.</text:p>
      <text:p text:style-name="Normal"/>
      <text:p text:style-name="Normal">Camera movement.</text:p>
      <text:p text:style-name="Normal"/>
      <text:p text:style-name="Normal">Neural pulses.</text:p>
      <text:p text:style-name="Normal"/>
      <text:p text:style-name="Normal">Glow.</text:p>
      <text:p text:style-name="Normal"/>
      <text:p text:style-name="Normal">Particles.</text:p>
      <text:p text:style-name="Normal"/>
      <text:p text:style-name="Normal">Smooth transitions.</text:p>
      <text:p text:style-name="Normal"/>
      <text:p text:style-name="Normal">These become recognizable brand assets.</text:p>
      <text:p text:style-name="Normal"/>
      <text:p text:style-name="Normal">---</text:p>
      <text:p text:style-name="Normal"/>
      <text:p text:style-name="Normal"># 23.8 Tone of Voice</text:p>
      <text:p text:style-name="Normal"/>
      <text:p text:style-name="Normal">Professional.</text:p>
      <text:p text:style-name="Normal"/>
      <text:p text:style-name="Normal">Friendly.</text:p>
      <text:p text:style-name="Normal"/>
      <text:p text:style-name="Normal">Clear.</text:p>
      <text:p text:style-name="Normal"/>
      <text:p text:style-name="Normal">Confident.</text:p>
      <text:p text:style-name="Normal"/>
      <text:p text:style-name="Normal">Helpful.</text:p>
      <text:p text:style-name="Normal"/>
      <text:p text:style-name="Normal">Educational.</text:p>
      <text:p text:style-name="Normal"/>
      <text:p text:style-name="Normal">Never robotic.</text:p>
      <text:p text:style-name="Normal"/>
      <text:p text:style-name="Normal">Never overly casual.</text:p>
      <text:p text:style-name="Normal"/>
      <text:p text:style-name="Normal">Never marketing-heavy.</text:p>
      <text:p text:style-name="Normal"/>
      <text:p text:style-name="Normal">---</text:p>
      <text:p text:style-name="Normal"/>
      <text:p text:style-name="Normal"># 23.9 Brand Promise</text:p>
      <text:p text:style-name="Normal"/>
      <text:p text:style-name="Normal">Every interaction should reinforce one message.</text:p>
      <text:p text:style-name="Normal"/>
      <text:p text:style-name="Normal">**Your AI career is achievable.**</text:p>
      <text:p text:style-name="Normal"/>
      <text:p text:style-name="Normal">We will help you reach it.</text:p>
      <text:p text:style-name="Normal"/>
      <text:p text:style-name="Normal">---</text:p>
      <text:p text:style-name="Normal"/>
      <text:p text:style-name="Normal"># 23.10 Brand Statement</text:p>
      <text:p text:style-name="Normal"/>
      <text:p text:style-name="Normal">**AI Career OS is more than a product.**</text:p>
      <text:p text:style-name="Normal"/>
      <text:p text:style-name="Normal">**It is the trusted companion people rely on throughout their AI career journey.**</text:p>
      <text:p text:style-name="Normal"/>
      <text:p text:style-name="Normal">Everything—from the logo to the AI Coach—should reinforce that promise.</text:p>
      <text:p text:style-name="Normal"/>
      <text:p text:style-name="Normal">---</text:p>
      <text:p text:style-name="Normal"/>
      <text:p text:style-name="Normal"># End of Volume 23</text:p>
      <text:p text:style-name="Normal"/>
      <text:p text:style-name="Normal">**Next Volume:** Technical Vision &amp; Product Roadmap</text:p>
      <text:p text:style-name="Normal"/>
      <text:p text:style-name="Normal">#<text:s/><text:span text:style-name="T54">📘</text:span><text:s/>Volume 24</text:p>
      <text:p text:style-name="Normal"/>
      <text:p text:style-name="Normal"># Technical Vision &amp; Product Roadmap</text:p>
      <text:p text:style-name="Normal"/>
      <text:p text:style-name="Normal">### Version 1.0</text:p>
      <text:p text:style-name="Normal"/>
      <text:p text:style-name="Normal">---</text:p>
      <text:p text:style-name="Normal"/>
      <text:p text:style-name="Normal"># 24.1 Why Technical Vision Matters</text:p>
      <text:p text:style-name="Normal"/>
      <text:p text:style-name="Normal">Technology should never define the product.</text:p>
      <text:p text:style-name="Normal"/>
      <text:p text:style-name="Normal">The product defines the technology.</text:p>
      <text:p text:style-name="Normal"/>
      <text:p text:style-name="Normal">Every architectural decision should support one objective:</text:p>
      <text:p text:style-name="Normal"/>
      <text:p text:style-name="Normal">Building the world's most intelligent AI career platform.</text:p>
      <text:p text:style-name="Normal"/>
      <text:p text:style-name="Normal">Technology exists to enable the experience.</text:p>
      <text:p text:style-name="Normal"/>
      <text:p text:style-name="Normal">Not the other way around.</text:p>
      <text:p text:style-name="Normal"/>
      <text:p text:style-name="Normal">---</text:p>
      <text:p text:style-name="Normal"/>
      <text:p text:style-name="Normal"># 24.2 Engineering Philosophy</text:p>
      <text:p text:style-name="Normal"/>
      <text:p text:style-name="Normal">AI Career OS should be engineered like a long-term platform rather than a traditional web application.</text:p>
      <text:p text:style-name="Normal"/>
      <text:p text:style-name="Normal">Core principles:</text:p>
      <text:p text:style-name="Normal"/>
      <text:p text:style-name="Normal">• Scalability</text:p>
      <text:p text:style-name="Normal"/>
      <text:p text:style-name="Normal">• Modularity</text:p>
      <text:p text:style-name="Normal"/>
      <text:p text:style-name="Normal">• Maintainability</text:p>
      <text:p text:style-name="Normal"/>
      <text:p text:style-name="Normal">• Performance</text:p>
      <text:p text:style-name="Normal"/>
      <text:p text:style-name="Normal">• Accessibility</text:p>
      <text:p text:style-name="Normal"/>
      <text:p text:style-name="Normal">• Security</text:p>
      <text:p text:style-name="Normal"/>
      <text:p text:style-name="Normal">• AI-first architecture</text:p>
      <text:p text:style-name="Normal"/>
      <text:p text:style-name="Normal">Every future module should integrate naturally without requiring major redesign.</text:p>
      <text:p text:style-name="Normal"/>
      <text:p text:style-name="Normal">---</text:p>
      <text:p text:style-name="Normal"/>
      <text:soft-page-break/>
      <text:p text:style-name="Normal"># 24.3 Frontend Vision</text:p>
      <text:p text:style-name="Normal"/>
      <text:p text:style-name="Normal">The frontend should feel like a premium desktop application.</text:p>
      <text:p text:style-name="Normal"/>
      <text:p text:style-name="Normal">Not a traditional website.</text:p>
      <text:p text:style-name="Normal"/>
      <text:p text:style-name="Normal">Core principles:</text:p>
      <text:p text:style-name="Normal"/>
      <text:p text:style-name="Normal">Fast.</text:p>
      <text:p text:style-name="Normal"/>
      <text:p text:style-name="Normal">Fluid.</text:p>
      <text:p text:style-name="Normal"/>
      <text:p text:style-name="Normal">Interactive.</text:p>
      <text:p text:style-name="Normal"/>
      <text:p text:style-name="Normal">Responsive.</text:p>
      <text:p text:style-name="Normal"/>
      <text:p text:style-name="Normal">Immersive.</text:p>
      <text:p text:style-name="Normal"/>
      <text:p text:style-name="Normal">Recommended technologies:</text:p>
      <text:p text:style-name="Normal"/>
      <text:p text:style-name="Normal">Next.js</text:p>
      <text:p text:style-name="Normal"/>
      <text:p text:style-name="Normal">React</text:p>
      <text:p text:style-name="Normal"/>
      <text:p text:style-name="Normal">TypeScript</text:p>
      <text:p text:style-name="Normal"/>
      <text:p text:style-name="Normal">Tailwind CSS</text:p>
      <text:p text:style-name="Normal"/>
      <text:soft-page-break/>
      <text:p text:style-name="Normal">Framer Motion</text:p>
      <text:p text:style-name="Normal"/>
      <text:p text:style-name="Normal">React Three Fiber</text:p>
      <text:p text:style-name="Normal"/>
      <text:p text:style-name="Normal">Three.js (where meaningful)</text:p>
      <text:p text:style-name="Normal"/>
      <text:p text:style-name="Normal">Shadcn/UI</text:p>
      <text:p text:style-name="Normal"/>
      <text:p text:style-name="Normal">Radix UI</text:p>
      <text:p text:style-name="Normal"/>
      <text:p text:style-name="Normal">The objective is creating a cinematic experience.</text:p>
      <text:p text:style-name="Normal"/>
      <text:p text:style-name="Normal">---</text:p>
      <text:p text:style-name="Normal"/>
      <text:p text:style-name="Normal"># 24.4 Backend Vision</text:p>
      <text:p text:style-name="Normal"/>
      <text:p text:style-name="Normal">The backend should become an intelligent platform rather than a collection of APIs.</text:p>
      <text:p text:style-name="Normal"/>
      <text:p text:style-name="Normal">Responsibilities include:</text:p>
      <text:p text:style-name="Normal"/>
      <text:p text:style-name="Normal">Authentication</text:p>
      <text:p text:style-name="Normal"/>
      <text:p text:style-name="Normal">Career Intelligence</text:p>
      <text:p text:style-name="Normal"/>
      <text:p text:style-name="Normal">Knowledge Graph</text:p>
      <text:p text:style-name="Normal"/>
      <text:p text:style-name="Normal">User Memory</text:p>
      <text:p text:style-name="Normal"/>
      <text:soft-page-break/>
      <text:p text:style-name="Normal">Career DNA</text:p>
      <text:p text:style-name="Normal"/>
      <text:p text:style-name="Normal">Recommendation Engine</text:p>
      <text:p text:style-name="Normal"/>
      <text:p text:style-name="Normal">Progress Tracking</text:p>
      <text:p text:style-name="Normal"/>
      <text:p text:style-name="Normal">AI Conversations</text:p>
      <text:p text:style-name="Normal"/>
      <text:p text:style-name="Normal">Portfolio Data</text:p>
      <text:p text:style-name="Normal"/>
      <text:p text:style-name="Normal">Learning Analytics</text:p>
      <text:p text:style-name="Normal"/>
      <text:p text:style-name="Normal">Everything should be modular.</text:p>
      <text:p text:style-name="Normal"/>
      <text:p text:style-name="Normal">---</text:p>
      <text:p text:style-name="Normal"/>
      <text:p text:style-name="Normal"># 24.5 AI Architecture</text:p>
      <text:p text:style-name="Normal"/>
      <text:p text:style-name="Normal">Artificial Intelligence should operate in layers.</text:p>
      <text:p text:style-name="Normal"/>
      <text:p text:style-name="Normal">Layer 1</text:p>
      <text:p text:style-name="Normal"/>
      <text:p text:style-name="Normal">Conversation</text:p>
      <text:p text:style-name="Normal"/>
      <text:p text:style-name="Normal">↓</text:p>
      <text:p text:style-name="Normal"/>
      <text:p text:style-name="Normal">Layer 2</text:p>
      <text:p text:style-name="Normal"/>
      <text:soft-page-break/>
      <text:p text:style-name="Normal">Reasoning</text:p>
      <text:p text:style-name="Normal"/>
      <text:p text:style-name="Normal">↓</text:p>
      <text:p text:style-name="Normal"/>
      <text:p text:style-name="Normal">Layer 3</text:p>
      <text:p text:style-name="Normal"/>
      <text:p text:style-name="Normal">Memory</text:p>
      <text:p text:style-name="Normal"/>
      <text:p text:style-name="Normal">↓</text:p>
      <text:p text:style-name="Normal"/>
      <text:p text:style-name="Normal">Layer 4</text:p>
      <text:p text:style-name="Normal"/>
      <text:p text:style-name="Normal">Knowledge Graph</text:p>
      <text:p text:style-name="Normal"/>
      <text:p text:style-name="Normal">↓</text:p>
      <text:p text:style-name="Normal"/>
      <text:p text:style-name="Normal">Layer 5</text:p>
      <text:p text:style-name="Normal"/>
      <text:p text:style-name="Normal">Recommendation Engine</text:p>
      <text:p text:style-name="Normal"/>
      <text:p text:style-name="Normal">↓</text:p>
      <text:p text:style-name="Normal"/>
      <text:p text:style-name="Normal">Layer 6</text:p>
      <text:p text:style-name="Normal"/>
      <text:p text:style-name="Normal">Decision Engine</text:p>
      <text:p text:style-name="Normal"/>
      <text:p text:style-name="Normal">↓</text:p>
      <text:p text:style-name="Normal"/>
      <text:soft-page-break/>
      <text:p text:style-name="Normal">Layer 7</text:p>
      <text:p text:style-name="Normal"/>
      <text:p text:style-name="Normal">Personalization</text:p>
      <text:p text:style-name="Normal"/>
      <text:p text:style-name="Normal">↓</text:p>
      <text:p text:style-name="Normal"/>
      <text:p text:style-name="Normal">Layer 8</text:p>
      <text:p text:style-name="Normal"/>
      <text:p text:style-name="Normal">User Experience</text:p>
      <text:p text:style-name="Normal"/>
      <text:p text:style-name="Normal">Every recommendation should pass through these layers.</text:p>
      <text:p text:style-name="Normal"/>
      <text:p text:style-name="Normal">---</text:p>
      <text:p text:style-name="Normal"/>
      <text:p text:style-name="Normal"># 24.6 User Memory</text:p>
      <text:p text:style-name="Normal"/>
      <text:p text:style-name="Normal">The platform should continuously learn.</text:p>
      <text:p text:style-name="Normal"/>
      <text:p text:style-name="Normal">Remember:</text:p>
      <text:p text:style-name="Normal"/>
      <text:p text:style-name="Normal">Career goals</text:p>
      <text:p text:style-name="Normal"/>
      <text:p text:style-name="Normal">Projects</text:p>
      <text:p text:style-name="Normal"/>
      <text:p text:style-name="Normal">Preferences</text:p>
      <text:p text:style-name="Normal"/>
      <text:p text:style-name="Normal">Learning style</text:p>
      <text:p text:style-name="Normal"/>
      <text:soft-page-break/>
      <text:p text:style-name="Normal">Strengths</text:p>
      <text:p text:style-name="Normal"/>
      <text:p text:style-name="Normal">Weaknesses</text:p>
      <text:p text:style-name="Normal"/>
      <text:p text:style-name="Normal">Completed milestones</text:p>
      <text:p text:style-name="Normal"/>
      <text:p text:style-name="Normal">Conversations</text:p>
      <text:p text:style-name="Normal"/>
      <text:p text:style-name="Normal">Career changes</text:p>
      <text:p text:style-name="Normal"/>
      <text:p text:style-name="Normal">The platform should never repeatedly ask for the same information.</text:p>
      <text:p text:style-name="Normal"/>
      <text:p text:style-name="Normal">Memory becomes one of the product's greatest competitive advantages.</text:p>
      <text:p text:style-name="Normal"/>
      <text:p text:style-name="Normal">---</text:p>
      <text:p text:style-name="Normal"/>
      <text:p text:style-name="Normal"># 24.7 AI Recommendation Engine</text:p>
      <text:p text:style-name="Normal"/>
      <text:p text:style-name="Normal">Recommendations should consider:</text:p>
      <text:p text:style-name="Normal"/>
      <text:p text:style-name="Normal">Career DNA</text:p>
      <text:p text:style-name="Normal"/>
      <text:p text:style-name="Normal">Current Skills</text:p>
      <text:p text:style-name="Normal"/>
      <text:p text:style-name="Normal">Transferable Skills</text:p>
      <text:p text:style-name="Normal"/>
      <text:p text:style-name="Normal">Industry Trends</text:p>
      <text:p text:style-name="Normal"/>
      <text:soft-page-break/>
      <text:p text:style-name="Normal">Knowledge Graph</text:p>
      <text:p text:style-name="Normal"/>
      <text:p text:style-name="Normal">Learning Speed</text:p>
      <text:p text:style-name="Normal"/>
      <text:p text:style-name="Normal">Project History</text:p>
      <text:p text:style-name="Normal"/>
      <text:p text:style-name="Normal">Job Market</text:p>
      <text:p text:style-name="Normal"/>
      <text:p text:style-name="Normal">Future Demand</text:p>
      <text:p text:style-name="Normal"/>
      <text:p text:style-name="Normal">Every recommendation should include transparent reasoning.</text:p>
      <text:p text:style-name="Normal"/>
      <text:p text:style-name="Normal">---</text:p>
      <text:p text:style-name="Normal"/>
      <text:p text:style-name="Normal"># 24.8 Performance Goals</text:p>
      <text:p text:style-name="Normal"/>
      <text:p text:style-name="Normal">Target performance:</text:p>
      <text:p text:style-name="Normal"/>
      <text:p text:style-name="Normal">Page Load</text:p>
      <text:p text:style-name="Normal"/>
      <text:p text:style-name="Normal">&lt; 2 seconds</text:p>
      <text:p text:style-name="Normal"/>
      <text:p text:style-name="Normal">Dashboard</text:p>
      <text:p text:style-name="Normal"/>
      <text:p text:style-name="Normal">Instant</text:p>
      <text:p text:style-name="Normal"/>
      <text:p text:style-name="Normal">Animations</text:p>
      <text:p text:style-name="Normal"/>
      <text:soft-page-break/>
      <text:p text:style-name="Normal">60 FPS</text:p>
      <text:p text:style-name="Normal"/>
      <text:p text:style-name="Normal">Navigation</text:p>
      <text:p text:style-name="Normal"/>
      <text:p text:style-name="Normal">Smooth</text:p>
      <text:p text:style-name="Normal"/>
      <text:p text:style-name="Normal">AI Responses</text:p>
      <text:p text:style-name="Normal"/>
      <text:p text:style-name="Normal">Streaming</text:p>
      <text:p text:style-name="Normal"/>
      <text:p text:style-name="Normal">Performance should always take priority over unnecessary visual effects.</text:p>
      <text:p text:style-name="Normal"/>
      <text:p text:style-name="Normal">---</text:p>
      <text:p text:style-name="Normal"/>
      <text:p text:style-name="Normal"># 24.9 Security &amp; Privacy</text:p>
      <text:p text:style-name="Normal"/>
      <text:p text:style-name="Normal">Users trust AI Career OS with sensitive career information.</text:p>
      <text:p text:style-name="Normal"/>
      <text:p text:style-name="Normal">The platform should therefore prioritize:</text:p>
      <text:p text:style-name="Normal"/>
      <text:p text:style-name="Normal">Privacy by default.</text:p>
      <text:p text:style-name="Normal"/>
      <text:p text:style-name="Normal">Secure authentication.</text:p>
      <text:p text:style-name="Normal"/>
      <text:p text:style-name="Normal">Minimal data collection.</text:p>
      <text:p text:style-name="Normal"/>
      <text:p text:style-name="Normal">Transparent AI reasoning.</text:p>
      <text:p text:style-name="Normal"/>
      <text:soft-page-break/>
      <text:p text:style-name="Normal">Encrypted personal information.</text:p>
      <text:p text:style-name="Normal"/>
      <text:p text:style-name="Normal">User control over data.</text:p>
      <text:p text:style-name="Normal"/>
      <text:p text:style-name="Normal">Trust is a product feature.</text:p>
      <text:p text:style-name="Normal"/>
      <text:p text:style-name="Normal">---</text:p>
      <text:p text:style-name="Normal"/>
      <text:p text:style-name="Normal"># 24.10 Scalability</text:p>
      <text:p text:style-name="Normal"/>
      <text:p text:style-name="Normal">The architecture should support millions of users.</text:p>
      <text:p text:style-name="Normal"/>
      <text:p text:style-name="Normal">Nothing should depend on assumptions about current scale.</text:p>
      <text:p text:style-name="Normal"/>
      <text:p text:style-name="Normal">Future expansion should include:</text:p>
      <text:p text:style-name="Normal"/>
      <text:p text:style-name="Normal">Multiple languages.</text:p>
      <text:p text:style-name="Normal"/>
      <text:p text:style-name="Normal">Global regions.</text:p>
      <text:p text:style-name="Normal"/>
      <text:p text:style-name="Normal">Enterprise customers.</text:p>
      <text:p text:style-name="Normal"/>
      <text:p text:style-name="Normal">Recruiters.</text:p>
      <text:p text:style-name="Normal"/>
      <text:p text:style-name="Normal">Universities.</text:p>
      <text:p text:style-name="Normal"/>
      <text:p text:style-name="Normal">Governments.</text:p>
      <text:p text:style-name="Normal"/>
      <text:soft-page-break/>
      <text:p text:style-name="Normal">Corporate learning.</text:p>
      <text:p text:style-name="Normal"/>
      <text:p text:style-name="Normal">Public APIs.</text:p>
      <text:p text:style-name="Normal"/>
      <text:p text:style-name="Normal">Partner ecosystem.</text:p>
      <text:p text:style-name="Normal"/>
      <text:p text:style-name="Normal">Scalability begins with architecture.</text:p>
      <text:p text:style-name="Normal"/>
      <text:p text:style-name="Normal">---</text:p>
      <text:p text:style-name="Normal"/>
      <text:p text:style-name="Normal"># 24.11 Product Roadmap</text:p>
      <text:p text:style-name="Normal"/>
      <text:p text:style-name="Normal">## Phase 1 — Foundation (MVP)</text:p>
      <text:p text:style-name="Normal"/>
      <text:p text:style-name="Normal">Deliver the core platform.</text:p>
      <text:p text:style-name="Normal"/>
      <text:p text:style-name="Normal">Landing Experience</text:p>
      <text:p text:style-name="Normal"/>
      <text:p text:style-name="Normal">Career Network</text:p>
      <text:p text:style-name="Normal"/>
      <text:p text:style-name="Normal">Career Pages</text:p>
      <text:p text:style-name="Normal"/>
      <text:p text:style-name="Normal">Roadmaps</text:p>
      <text:p text:style-name="Normal"/>
      <text:p text:style-name="Normal">Authentication</text:p>
      <text:p text:style-name="Normal"/>
      <text:p text:style-name="Normal">Dashboard</text:p>
      <text:p text:style-name="Normal"/>
      <text:soft-page-break/>
      <text:p text:style-name="Normal">Career DNA</text:p>
      <text:p text:style-name="Normal"/>
      <text:p text:style-name="Normal">CV Analyzer</text:p>
      <text:p text:style-name="Normal"/>
      <text:p text:style-name="Normal">AI Coach (Basic)</text:p>
      <text:p text:style-name="Normal"/>
      <text:p text:style-name="Normal">Knowledge Graph (Basic)</text:p>
      <text:p text:style-name="Normal"/>
      <text:p text:style-name="Normal">---</text:p>
      <text:p text:style-name="Normal"/>
      <text:p text:style-name="Normal">## Phase 2 — Personalization</text:p>
      <text:p text:style-name="Normal"/>
      <text:p text:style-name="Normal">Advanced AI reasoning.</text:p>
      <text:p text:style-name="Normal"/>
      <text:p text:style-name="Normal">Memory.</text:p>
      <text:p text:style-name="Normal"/>
      <text:p text:style-name="Normal">Adaptive Roadmaps.</text:p>
      <text:p text:style-name="Normal"/>
      <text:p text:style-name="Normal">Weekly Planning.</text:p>
      <text:p text:style-name="Normal"/>
      <text:p text:style-name="Normal">Skill Tracking.</text:p>
      <text:p text:style-name="Normal"/>
      <text:p text:style-name="Normal">Portfolio Planning.</text:p>
      <text:p text:style-name="Normal"/>
      <text:p text:style-name="Normal">Career Analytics.</text:p>
      <text:p text:style-name="Normal"/>
      <text:p text:style-name="Normal">---</text:p>
      <text:p text:style-name="Normal"/>
      <text:soft-page-break/>
      <text:p text:style-name="Normal">## Phase 3 — Intelligence</text:p>
      <text:p text:style-name="Normal"/>
      <text:p text:style-name="Normal">Knowledge Graph expansion.</text:p>
      <text:p text:style-name="Normal"/>
      <text:p text:style-name="Normal">Recommendation Engine.</text:p>
      <text:p text:style-name="Normal"/>
      <text:p text:style-name="Normal">Job Readiness.</text:p>
      <text:p text:style-name="Normal"/>
      <text:p text:style-name="Normal">Interview Simulator.</text:p>
      <text:p text:style-name="Normal"/>
      <text:p text:style-name="Normal">Resume Optimization.</text:p>
      <text:p text:style-name="Normal"/>
      <text:p text:style-name="Normal">LinkedIn Optimization.</text:p>
      <text:p text:style-name="Normal"/>
      <text:p text:style-name="Normal">GitHub Analysis.</text:p>
      <text:p text:style-name="Normal"/>
      <text:p text:style-name="Normal">AI Career Reports.</text:p>
      <text:p text:style-name="Normal"/>
      <text:p text:style-name="Normal">---</text:p>
      <text:p text:style-name="Normal"/>
      <text:p text:style-name="Normal">## Phase 4 — Ecosystem</text:p>
      <text:p text:style-name="Normal"/>
      <text:p text:style-name="Normal">Community.</text:p>
      <text:p text:style-name="Normal"/>
      <text:p text:style-name="Normal">Mentorship.</text:p>
      <text:p text:style-name="Normal"/>
      <text:p text:style-name="Normal">Marketplace.</text:p>
      <text:p text:style-name="Normal"/>
      <text:soft-page-break/>
      <text:p text:style-name="Normal">Learning Partners.</text:p>
      <text:p text:style-name="Normal"/>
      <text:p text:style-name="Normal">Recruiter Portal.</text:p>
      <text:p text:style-name="Normal"/>
      <text:p text:style-name="Normal">Company Profiles.</text:p>
      <text:p text:style-name="Normal"/>
      <text:p text:style-name="Normal">Hiring Platform.</text:p>
      <text:p text:style-name="Normal"/>
      <text:p text:style-name="Normal">Certification Marketplace.</text:p>
      <text:p text:style-name="Normal"/>
      <text:p text:style-name="Normal">---</text:p>
      <text:p text:style-name="Normal"/>
      <text:p text:style-name="Normal">## Phase 5 — AI Career OS</text:p>
      <text:p text:style-name="Normal"/>
      <text:p text:style-name="Normal">The complete ecosystem.</text:p>
      <text:p text:style-name="Normal"/>
      <text:p text:style-name="Normal">Users no longer visit AI Career OS only to learn.</text:p>
      <text:p text:style-name="Normal"/>
      <text:p text:style-name="Normal">They manage their entire professional life through it.</text:p>
      <text:p text:style-name="Normal"/>
      <text:p text:style-name="Normal">Career Planning.</text:p>
      <text:p text:style-name="Normal"/>
      <text:p text:style-name="Normal">Learning.</text:p>
      <text:p text:style-name="Normal"/>
      <text:p text:style-name="Normal">Projects.</text:p>
      <text:p text:style-name="Normal"/>
      <text:p text:style-name="Normal">Interviews.</text:p>
      <text:p text:style-name="Normal"/>
      <text:soft-page-break/>
      <text:p text:style-name="Normal">Networking.</text:p>
      <text:p text:style-name="Normal"/>
      <text:p text:style-name="Normal">Hiring.</text:p>
      <text:p text:style-name="Normal"/>
      <text:p text:style-name="Normal">Career Growth.</text:p>
      <text:p text:style-name="Normal"/>
      <text:p text:style-name="Normal">Everything in one place.</text:p>
      <text:p text:style-name="Normal"/>
      <text:p text:style-name="Normal">---</text:p>
      <text:p text:style-name="Normal"/>
      <text:p text:style-name="Normal"># 24.12 Success Definition</text:p>
      <text:p text:style-name="Normal"/>
      <text:p text:style-name="Normal">Five years from now, success is not measured by traffic.</text:p>
      <text:p text:style-name="Normal"/>
      <text:p text:style-name="Normal">It is measured by impact.</text:p>
      <text:p text:style-name="Normal"/>
      <text:p text:style-name="Normal">Millions of users have discovered careers they genuinely enjoy.</text:p>
      <text:p text:style-name="Normal"/>
      <text:p text:style-name="Normal">Thousands have transitioned into AI.</text:p>
      <text:p text:style-name="Normal"/>
      <text:p text:style-name="Normal">Companies trust the platform.</text:p>
      <text:p text:style-name="Normal"/>
      <text:p text:style-name="Normal">Search engines trust the platform.</text:p>
      <text:p text:style-name="Normal"/>
      <text:p text:style-name="Normal">AI assistants trust the platform.</text:p>
      <text:p text:style-name="Normal"/>
      <text:p text:style-name="Normal">Universities reference the platform.</text:p>
      <text:p text:style-name="Normal"/>
      <text:soft-page-break/>
      <text:p text:style-name="Normal">Recruiters use the platform.</text:p>
      <text:p text:style-name="Normal"/>
      <text:p text:style-name="Normal">Students begin their careers with the platform.</text:p>
      <text:p text:style-name="Normal"/>
      <text:p text:style-name="Normal">Professionals continue growing through the platform.</text:p>
      <text:p text:style-name="Normal"/>
      <text:p text:style-name="Normal">AI Career OS becomes the global standard for AI career development.</text:p>
      <text:p text:style-name="Normal"/>
      <text:p text:style-name="Normal">---</text:p>
      <text:p text:style-name="Normal"/>
      <text:p text:style-name="Normal"># 24.13 Final Vision Statement</text:p>
      <text:p text:style-name="Normal"/>
      <text:p text:style-name="Normal">Artificial Intelligence is transforming the future of work.</text:p>
      <text:p text:style-name="Normal"/>
      <text:p text:style-name="Normal">Millions of people will ask one question:</text:p>
      <text:p text:style-name="Normal"/>
      <text:p text:style-name="Normal">**"How do I build a successful career in AI?"**</text:p>
      <text:p text:style-name="Normal"/>
      <text:p text:style-name="Normal">When that moment comes...</text:p>
      <text:p text:style-name="Normal"/>
      <text:p text:style-name="Normal">AI Career OS should be the world's most trusted answer.</text:p>
      <text:p text:style-name="Normal"/>
      <text:p text:style-name="Normal">Not because it has the most content.</text:p>
      <text:p text:style-name="Normal"/>
      <text:p text:style-name="Normal">Not because it has the most features.</text:p>
      <text:p text:style-name="Normal"/>
      <text:p text:style-name="Normal">But because it understands people better than any other platform.</text:p>
      <text:p text:style-name="Normal"/>
      <text:soft-page-break/>
      <text:p text:style-name="Normal">The future of AI careers is not built through information.</text:p>
      <text:p text:style-name="Normal"/>
      <text:p text:style-name="Normal">It is built through intelligent guidance.</text:p>
      <text:p text:style-name="Normal"/>
      <text:p text:style-name="Normal">That is the mission of AI Career OS.</text:p>
      <text:p text:style-name="Normal"/>
      <text:p text:style-name="Normal">That is the product we are building.</text:p>
      <text:p text:style-name="Normal"/>
      <text:p text:style-name="Normal">---</text:p>
      <text:p text:style-name="Normal"/>
      <text:p text:style-name="Normal"># Product Bible Conclusion</text:p>
      <text:p text:style-name="Normal"/>
      <text:p text:style-name="Normal">This Product Bible establishes the strategic foundation of AI Career OS.</text:p>
      <text:p text:style-name="Normal"/>
      <text:p text:style-name="Normal">Every future decision—</text:p>
      <text:p text:style-name="Normal"/>
      <text:p text:style-name="Normal">whether related to design, engineering, artificial intelligence, content, marketing, partnerships, business strategy, or product development—</text:p>
      <text:p text:style-name="Normal"/>
      <text:p text:style-name="Normal">should align with the principles defined throughout these twenty-four volumes.</text:p>
      <text:p text:style-name="Normal"/>
      <text:p text:style-name="Normal">Technology will evolve.</text:p>
      <text:p text:style-name="Normal"/>
      <text:p text:style-name="Normal">Artificial Intelligence will evolve.</text:p>
      <text:p text:style-name="Normal"/>
      <text:p text:style-name="Normal">Careers will evolve.</text:p>
      <text:p text:style-name="Normal"/>
      <text:p text:style-name="Normal">The product will evolve.</text:p>
      <text:p text:style-name="Normal"/>
      <text:p text:style-name="Normal">But one principle must remain constant:</text:p>
      <text:p text:style-name="Normal"/>
      <text:p text:style-name="Normal">&gt; **Our mission is not to build software.**</text:p>
      <text:p text:style-name="Normal">&gt;</text:p>
      <text:p text:style-name="Normal">&gt; **Our mission is to help people build meaningful careers in Artificial Intelligence.**</text:p>
      <text:p text:style-name="Normal"/>
      <text:p text:style-name="Normal">Everything else is in service of that purpose.</text:p>
      <text:p text:style-name="Normal"/>
      <text:p text:style-name="Normal">---</text:p>
      <text:p text:style-name="Normal"/>
      <text:p text:style-name="Normal"># End of Product Bible</text:p>
      <text:p text:style-name="Normal"/>
      <text:p text:style-name="Normal">## AI Career OS</text:p>
      <text:p text:style-name="Normal"/>
      <text:p text:style-name="Normal">### Product Bible</text:p>
      <text:p text:style-name="Normal"/>
      <text:p text:style-name="Normal">**Version:** 1.0</text:p>
      <text:p text:style-name="Normal"/>
      <text:p text:style-name="Normal">**Status:** Foundation Complete</text:p>
      <text:p text:style-name="Normal"/>
      <text:p text:style-name="Normal">**Next Planned Edition:** Version 2.0 — Investor Edition &amp; Product Execution Bluepri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er Tayyebialashti</meta:initial-creator>
    <dc:creator>Yaser Tayyebialashti</dc:creator>
    <meta:creation-date>2026-06-26T07:35:00Z</meta:creation-date>
    <dc:date>2026-06-26T07:51:00Z</dc:date>
    <meta:template xlink:href="Normal" xlink:type="simple"/>
    <meta:editing-cycles>1</meta:editing-cycles>
    <meta:editing-duration>PT840S</meta:editing-duration>
    <meta:document-statistic meta:page-count="267" meta:paragraph-count="205" meta:word-count="15391" meta:character-count="102916" meta:row-count="731" meta:non-whitespace-character-count="87730"/>
  </office:meta>
</office:document-meta>
</file>